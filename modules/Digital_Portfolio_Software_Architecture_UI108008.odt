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8" loext:marker-style-name="T7"><text:a xlink:type="simple" xlink:href="https://github.com/Ryboster/Uni-year2/blob/main/learning_outcomes/Data_Transformation/LO1.md" text:style-name="Internet_20_link" text:visited-style-name="Visited_20_Internet_20_Link">https://github.com/Ryboster/Uni-year2/blob/main/learning_outcomes/Data_Transformation/LO1.md</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1"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1"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a xlink:type="simple" xlink:href="https://github.com/Ryboster/Uni-year2/tree/main/presentations/lucid_dreamer" text:style-name="Internet_20_link" text:visited-style-name="Visited_20_Internet_20_Link">https://github.com/Ryboster/Uni-year2/tree/main/presentations/lucid_dreamer</text:a></text:p></text:list-item><text:list-item><text:p text:style-name="P12"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2" loext:marker-style-name="T7"><text:a xlink:type="simple" xlink:href="https://github.com/Ryboster/Uni-year2/blob/main/learning_outcomes/Data_Transformation/LO1.md" text:style-name="Internet_20_link" text:visited-style-name="Visited_20_Internet_20_Link">https://github.com/Ryboster/Uni-year2/blob/main/learning_outcomes/Data_Transformation/LO1.md</text:a></text:p></text:list-item><text:list-item><text:p text:style-name="P12" loext:marker-style-name="T7"/></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5"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6"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6" loext:marker-style-name="T7">https://github.com/Ryboster/Uni-year2/blob/main/learning_outcomes/Data_Transformation/LO1.md</text:p></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54</meta:editing-cycles>
    <meta:creation-date>2025-08-29T09:16:00</meta:creation-date>
    <dc:date>2026-05-24T23:34:36.503451537</dc:date>
    <meta:editing-duration>PT1H14M56S</meta:editing-duration>
    <meta:generator>LibreOffice/25.8.3.2$Linux_X86_64 LibreOffice_project/8ca8d55c161d602844f5428fa4b58097424e324e</meta:generator>
    <meta:document-statistic meta:table-count="1" meta:image-count="0" meta:object-count="0" meta:page-count="3" meta:paragraph-count="108" meta:word-count="653" meta:character-count="9674" meta:non-whitespace-character-count="9192"/>
    <meta:user-defined meta:name="AppVersion">16.0000</meta:user-defined>
    <meta:template xlink:type="simple" xlink:actuate="onRequest" xlink:title="Normal.dotm" xlink:href=""/>
  </office:meta>
</office:document-meta>
</file>