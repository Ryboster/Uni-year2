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automatic-styles>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P1" style:family="paragraph" style:parent-style-name="Standard">
      <style:text-properties style:font-name="Calibri" fo:font-size="10pt" fo:language="en" fo:country="GB" style:font-size-asian="10pt" style:language-asian="en" style:country-asian="GB" style:font-name-complex="Calibri1" style:font-size-complex="10pt"/>
    </style:style>
    <style:style style:name="P2" style:family="paragraph" style:parent-style-name="Heading_20_1">
      <style:paragraph-properties fo:text-align="center" style:justify-single-word="false" fo:orphans="2" fo:widows="2"/>
      <style:text-properties style:language-complex="ar" style:country-complex="SA"/>
    </style:style>
    <style:style style:name="P3" style:family="paragraph" style:parent-style-name="Standard">
      <style:paragraph-properties fo:margin-top="0.071cm" fo:margin-bottom="0.071cm" style:contextual-spacing="false" fo:text-align="start" style:justify-single-word="false" fo:orphans="2" fo:widows="2"/>
      <style:text-properties style:font-name="Times New Roman" style:font-name-complex="Times New Roman1" style:language-complex="ar" style:country-complex="SA"/>
    </style:style>
    <style:style style:name="P4" style:family="paragraph" style:parent-style-name="Standard">
      <style:paragraph-properties fo:margin-top="0.071cm" fo:margin-bottom="0.071cm" style:contextual-spacing="false" fo:text-align="center" style:justify-single-word="false" fo:orphans="2" fo:widows="2"/>
      <style:text-properties style:font-name="Times New Roman" style:font-name-complex="Times New Roman1" style:language-complex="ar" style:country-complex="SA"/>
    </style:style>
    <style:style style:name="P5" style:family="paragraph" style:parent-style-name="Standard">
      <style:paragraph-properties fo:margin-top="0cm" fo:margin-bottom="0.353cm" style:contextual-spacing="false" fo:text-align="start" style:justify-single-word="false" fo:orphans="2" fo:widows="2">
        <style:tab-stops>
          <style:tab-stop style:position="1.252cm"/>
        </style:tab-stops>
      </style:paragraph-properties>
      <style:text-properties style:font-name="Times New Roman" style:font-name-complex="Times New Roman1" style:language-complex="ar" style:country-complex="SA"/>
    </style:style>
    <style:style style:name="P6" style:family="paragraph" style:parent-style-name="Standard">
      <style:paragraph-properties fo:margin-top="0.071cm" fo:margin-bottom="0.071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font-weight-complex="bold"/>
    </style:style>
    <style:style style:name="P7"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rsid="00065a8e" officeooo:paragraph-rsid="0006fe2b" style:font-size-asian="10pt" style:font-name-complex="Calibri1" style:font-size-complex="10pt" style:language-complex="ar" style:country-complex="SA"/>
    </style:style>
    <style:style style:name="P8"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paragraph-rsid="0006fe2b" style:font-size-asian="10pt" style:font-name-complex="Calibri1" style:font-size-complex="10pt" style:language-complex="ar" style:country-complex="SA"/>
    </style:style>
    <style:style style:name="P9" style:family="paragraph" style:parent-style-name="Standard">
      <style:paragraph-properties fo:margin-top="0.071cm" fo:margin-bottom="0.071cm" style:contextual-spacing="false" fo:text-align="center" style:justify-single-word="false" fo:orphans="2" fo:widows="2" fo:text-indent="-1.199cm" style:auto-text-indent="false"/>
      <style:text-properties style:font-name="Times New Roman" style:font-name-complex="Times New Roman1" style:language-complex="ar" style:country-complex="SA"/>
    </style:style>
    <style:style style:name="P10"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1"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20d786" style:font-size-asian="10pt" style:font-name-complex="Calibri1" style:font-size-complex="10pt" style:language-complex="ar" style:country-complex="SA"/>
    </style:style>
    <style:style style:name="P12" style:family="paragraph" style:parent-style-name="Standard" style:list-style-name="L3">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3" style:family="paragraph" style:parent-style-name="Standard">
      <style:paragraph-properties fo:margin-top="0.071cm" fo:margin-bottom="0.071cm" style:contextual-spacing="false" fo:text-align="start" style:justify-single-word="false" fo:orphans="2" fo:widows="2"/>
      <style:text-properties fo:color="#000000" loext:opacity="100%" style:font-name="Calibri" fo:font-size="10pt" style:font-size-asian="10pt" style:font-name-complex="Calibri1" style:font-size-complex="10pt" style:language-complex="ar" style:country-complex="SA"/>
    </style:style>
    <style:style style:name="P14"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5"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25547a" style:font-size-asian="10pt" style:font-name-complex="Calibri1" style:font-size-complex="10pt" style:language-complex="ar" style:country-complex="SA"/>
    </style:style>
    <style:style style:name="P16" style:family="paragraph" style:parent-style-name="Standard" style:list-style-name="L5">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7" style:family="paragraph" style:parent-style-name="Standard" style:list-style-name="L6">
      <style:paragraph-properties fo:margin-top="0cm" fo:margin-bottom="0.353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style>
    <style:style style:name="T1" style:family="text">
      <style:text-properties style:font-name="Calibri" fo:font-size="10pt" fo:language="en" fo:country="GB" style:font-size-asian="10pt" style:language-asian="en" style:country-asian="GB" style:font-name-complex="Calibri1" style:font-size-complex="10pt"/>
    </style:style>
    <style:style style:name="T2" style:family="text">
      <style:text-properties style:font-name="Calibri" fo:font-size="10pt" fo:font-weight="bold" style:font-size-asian="10pt" style:font-weight-asian="bold" style:font-name-complex="Calibri1" style:font-size-complex="10pt" style:font-weight-complex="bold"/>
    </style:style>
    <style:style style:name="T3" style:family="text">
      <style:text-properties style:font-name="Calibri" fo:font-size="10pt" style:font-size-asian="10pt" style:font-name-complex="Calibri1" style:font-size-complex="10pt" style:font-weight-complex="bold"/>
    </style:style>
    <style:style style:name="T4" style:family="text">
      <style:text-properties style:font-name="Calibri" fo:font-size="10pt" fo:language="en" fo:country="GB" fo:font-weight="bold" style:font-size-asian="10pt" style:font-weight-asian="bold" style:font-name-complex="Calibri1" style:font-size-complex="10pt" style:font-weight-complex="bold"/>
    </style:style>
    <style:style style:name="T5" style:family="text">
      <style:text-properties style:font-name="Calibri" fo:font-size="10pt" fo:language="en" fo:country="GB" style:font-size-asian="10pt" style:font-name-complex="Calibri1" style:font-size-complex="10pt"/>
    </style:style>
    <style:style style:name="T6" style:family="text">
      <style:text-properties fo:color="#000000" loext:opacity="100%" style:font-name="Calibri" fo:font-size="10pt" style:font-size-asian="10pt" style:font-name-complex="Calibri1" style:font-size-complex="10pt"/>
    </style:style>
    <style:style style:name="T7" style:family="text">
      <style:text-properties style:font-name="Calibri" fo:font-size="10pt" style:font-size-asian="10pt" style:font-name-complex="Calibri1" style:font-size-complex="10pt"/>
    </style:style>
    <style:style style:name="T8" style:family="text">
      <style:text-properties officeooo:rsid="001a7d33"/>
    </style:style>
    <style:style style:name="T9" style:family="text">
      <style:text-properties officeooo:rsid="00198171"/>
    </style:style>
    <style:style style:name="T10" style:family="text">
      <style:text-properties officeooo:rsid="000b912f"/>
    </style:style>
    <style:style style:name="T11" style:family="text">
      <style:text-properties officeooo:rsid="0016e4d9"/>
    </style:style>
    <style:style style:name="T12" style:family="text">
      <style:text-properties officeooo:rsid="000c4a7d"/>
    </style:style>
    <style:style style:name="T13" style:family="text">
      <style:text-properties officeooo:rsid="00188291"/>
    </style:style>
    <style:style style:name="T14" style:family="text">
      <style:text-properties officeooo:rsid="00156ccd"/>
    </style:style>
    <style:style style:name="T15" style:family="text">
      <style:text-properties officeooo:rsid="0033049a"/>
    </style:style>
    <style:style style:name="T16" style:family="text">
      <style:text-properties officeooo:rsid="00208def"/>
    </style:style>
    <style:style style:name="T17" style:family="text">
      <style:text-properties officeooo:rsid="00128e39"/>
    </style:style>
    <style:style style:name="fr1" style:family="graphic" style:parent-style-name="Frame">
      <style:graphic-properties fo:margin-left="0.318cm" fo:margin-right="0.318cm" fo:margin-top="0cm" fo:margin-bottom="0cm" style:vertical-pos="from-top" style:vertical-rel="page" style:horizontal-pos="from-left" style:horizontal-rel="page-content" draw:opacity="0%"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Frame1" text:anchor-type="paragraph" svg:x="-0.009cm" svg:y="1.586cm" svg:width="39.837cm" draw:z-index="2" loext:may-break-between-pages="true"><draw:text-box fo:min-height="0.041cm"><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table:number-columns-spanned="5" office:value-type="string"><text:h text:style-name="P2" text:outline-level="1">UI108008 Software Architecture Digital Portfolio</text:h></table:table-cell><table:covered-table-cell/><table:covered-table-cell/><table:covered-table-cell/><table:covered-table-cell/></table:table-row><table:table-row table:style-name="Table1.1"><table:table-cell table:style-name="Table1.A1" table:number-columns-spanned="5" office:value-type="string"><text:p text:style-name="P3" loext:marker-style-name="T2"><text:span text:style-name="T2">This is a portfolio of evidence you have collected over the course of your project. Where software, charts (for example Gantt), materials, written work (including minutes, emails, even random notes etc) and any other media have been produced, link to them in here!</text:span></text:p></table:table-cell><table:covered-table-cell/><table:covered-table-cell/><table:covered-table-cell/><table:covered-table-cell/></table:table-row><table:table-row table:style-name="Table1.1"><table:table-cell table:style-name="Table1.A1" office:value-type="string"><text:p text:style-name="P3" loext:marker-style-name="T2"><text:span text:style-name="T2">LO</text:span></text:p></table:table-cell><table:table-cell table:style-name="Table1.A1" office:value-type="string"><text:p text:style-name="P3" loext:marker-style-name="T2"><text:span text:style-name="T2">Theme</text:span></text:p></table:table-cell><table:table-cell table:style-name="Table1.A1" office:value-type="string"><text:p text:style-name="P3" loext:marker-style-name="T2"><text:span text:style-name="T2">Learning Outcome</text:span></text:p></table:table-cell><table:table-cell table:style-name="Table1.A1" office:value-type="string"><text:p text:style-name="P3" loext:marker-style-name="T2"><text:span text:style-name="T2">Suggested Evidence</text:span></text:p></table:table-cell><table:table-cell table:style-name="Table1.A1" office:value-type="string"><text:p text:style-name="P3" loext:marker-style-name="T2"><text:span text:style-name="T2">Your Actual Evidence </text:span></text:p></table:table-cell></table:table-row><table:table-row table:style-name="Table1.1"><table:table-cell table:style-name="Table1.A1" office:value-type="string"><text:p text:style-name="P4" loext:marker-style-name="T3"><text:span text:style-name="T3">1</text:span></text:p></table:table-cell><table:table-cell table:style-name="Table1.A1" office:value-type="string"><text:p text:style-name="P3" loext:marker-style-name="T3"><text:span text:style-name="T3">Agile</text:span></text:p></table:table-cell><table:table-cell table:style-name="Table1.A1" office:value-type="string"><text:p text:style-name="P5" loext:marker-style-name="T4"><text:span text:style-name="T5">Analyse digital development activities, estimating financial, effort, and environmental costs to effectively manage software development projects.</text:span></text:p><text:p text:style-name="P6" loext:marker-style-name="T3"/></table:table-cell><table:table-cell table:style-name="Table1.A1" office:value-type="string"><text:p text:style-name="P3" loext:marker-style-name="T6"><text:span text:style-name="T6">During your project/sprints these points should have been considered as part of your scoping and tracked as the project progresses. This may be evidenced as part of your project documentation and software utilized for managing the project, for example project management software, budgeting software etc.</text:span></text:p></table:table-cell><table:table-cell table:style-name="Table1.A1" office:value-type="string"><text:p text:style-name="Standard"/><text:list text:style-name="L1"><text:list-item><text:p text:style-name="P7"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7"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7" loext:marker-style-name="T7"><text:a xlink:type="simple" xlink:href="https://teams.cloud.microsoft/l/chat/19:b2871b2ffd35412cbeefc57047d47035@thread.v2/conversations?context=%7B%22contextType%22%3A%22chat%22%7D" text:style-name="Internet_20_link" text:visited-style-name="Visited_20_Internet_20_Link">The OG Brewing Game</text:a></text:p></text:list-item><text:list-item><text:p text:style-name="P7" loext:marker-style-name="T7"><text:a xlink:type="simple" xlink:href="https://teams.cloud.microsoft/l/chat/19:75d4dedc2edf4f12ba89f7d2eaa12096@thread.v2/conversations?context=%7B%22contextType%22%3A%22chat%22%7D" text:style-name="Internet_20_link" text:visited-style-name="Visited_20_Internet_20_Link">Shadows of Vahlvadell</text:a></text:p></text:list-item><text:list-item><text:p text:style-name="P7" loext:marker-style-name="T7"><text:a xlink:type="simple" xlink:href="https://github.com/orgs/Brewing-Game/projects/1" text:style-name="Internet_20_link" text:visited-style-name="Visited_20_Internet_20_Link">https://github.com/orgs/Brewing-Game/projects/1</text:a></text:p></text:list-item><text:list-item><text:p text:style-name="P7" loext:marker-style-name="T7"><text:a xlink:type="simple" xlink:href="https://github.com/users/Strivion/projects/2" text:style-name="Internet_20_link" text:visited-style-name="Visited_20_Internet_20_Link">https://github.com/users/Strivion/projects/2</text:a></text:p></text:list-item><text:list-item><text:p text:style-name="P8"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8"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8"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8" loext:marker-style-name="T7"/></text:list-item></text:list></table:table-cell></table:table-row><table:table-row table:style-name="Table1.1"><table:table-cell table:style-name="Table1.A1" office:value-type="string"><text:p text:style-name="P9" loext:marker-style-name="T3"><text:span text:style-name="T3">2</text:span></text:p></table:table-cell><table:table-cell table:style-name="Table1.A1" office:value-type="string"><text:p text:style-name="P3" loext:marker-style-name="T3"><text:span text:style-name="T3">Business</text:span></text:p></table:table-cell><table:table-cell table:style-name="Table1.A1" office:value-type="string"><text:p text:style-name="P3" loext:marker-style-name="T3"><text:span text:style-name="T6">Compare, from a provider’s perspective, threat, risk, and vulnerability, examining typical attacks and exploits that might arise in software architectures.</text:span></text:p></table:table-cell><table:table-cell table:style-name="Table1.A1" office:value-type="string"><text:p text:style-name="P3" loext:marker-style-name="T6"><text:span text:style-name="T6">Consider the impact on business, of threats that may exist (loss of data (flood, fire, etc), attacks on the system by third parties. What contingencies for these can be put in place?</text:span></text:p></table:table-cell><table:table-cell table:style-name="Table1.A1" office:value-type="string"><text:list text:style-name="L2"><text:list-item><text:p text:style-name="P10"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0"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8">(section 2)</text:span></text:p></text:list-item><text:list-item><text:p text:style-name="P10"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11"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1" loext:marker-style-name="T7"><text:a xlink:type="simple" xlink:href="https://github.com/Ryboster/Uni-year2/blob/main/daily_logs/Sep2025/day14_Sun21Sep2025.md" text:style-name="Internet_20_link" text:visited-style-name="Visited_20_Internet_20_Link">https://github.com/Ryboster/Uni-year2/blob/main/daily_logs/Sep2025/day14_Sun21Sep2025.md</text:a></text:p></text:list-item><text:list-item><text:p text:style-name="P11" loext:marker-style-name="T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1"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11" loext:marker-style-name="T7"/></text:list-item></text:list></table:table-cell></table:table-row><table:table-row table:style-name="Table1.6"><table:table-cell table:style-name="Table1.A1" office:value-type="string"><text:p text:style-name="P4" loext:marker-style-name="T3"><text:span text:style-name="T3">3</text:span></text:p></table:table-cell><table:table-cell table:style-name="Table1.A1" office:value-type="string"><text:p text:style-name="P3" loext:marker-style-name="T3"><text:span text:style-name="T3">Meta-skills**</text:span></text:p></table:table-cell><table:table-cell table:style-name="Table1.A1" office:value-type="string"><text:p text:style-name="P3" loext:marker-style-name="T3"><text:span text:style-name="T5">Use analytical and critical thinking to develop technology solutions, with consideration given to systems security, systematically applying structured problem-solving techniques.</text:span></text:p></table:table-cell><table:table-cell table:style-name="Table1.A1" office:value-type="string"><text:p text:style-name="P3" loext:marker-style-name="T6"><text:span text:style-name="T6">Your sprints themselves would evidence this outcome – please provide a description or links to Sprint review documentation e.g. PowerPoints, videos and so on.</text:span></text:p></table:table-cell><table:table-cell table:style-name="Table1.A1" office:value-type="string"><text:list text:style-name="L3"><text:list-item><text:p text:style-name="P12"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2"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12"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2" loext:marker-style-name="T7"><text:a xlink:type="simple" xlink:href="https://github.com/Ryboster/Uni-year2/blob/main/presentations/mash_it/Sprint%20Review%208.odp" text:style-name="Internet_20_link" text:visited-style-name="Visited_20_Internet_20_Link">https://github.com/Ryboster/Uni-year2/blob/main/presentations/mash_it/Sprint%20Review%208.odp</text:a></text:p></text:list-item><text:list-item><text:p text:style-name="P12" loext:marker-style-name="T7"><text:a xlink:type="simple" xlink:href="https://github.com/Ryboster/Uni-year2/blob/main/presentations/mash_it/final.odp" text:style-name="Internet_20_link" text:visited-style-name="Visited_20_Internet_20_Link">https://github.com/Ryboster/Uni-year2/blob/main/presentations/mash_it/final.odp</text:a></text:p></text:list-item><text:list-item><text:p text:style-name="P12" loext:marker-style-name="T7"><text:a xlink:type="simple" xlink:href="https://github.com/Ryboster/Uni-year2/blob/main/presentations/mash_it/midsprint7.odp" text:style-name="Internet_20_link" text:visited-style-name="Visited_20_Internet_20_Link">https://github.com/Ryboster/Uni-year2/blob/main/presentations/mash_it/midsprint7.odp</text:a></text:p></text:list-item><text:list-item><text:p text:style-name="P12" loext:marker-style-name="T7"><text:a xlink:type="simple" xlink:href="https://github.com/Ryboster/Uni-year2/blob/main/presentations/mash_it/sprint1.odp" text:style-name="Internet_20_link" text:visited-style-name="Visited_20_Internet_20_Link">https://github.com/Ryboster/Uni-year2/blob/main/presentations/mash_it/sprint1.odp</text:a></text:p></text:list-item><text:list-item><text:p text:style-name="P12" loext:marker-style-name="T7"><text:a xlink:type="simple" xlink:href="https://github.com/Ryboster/Uni-year2/blob/main/presentations/mash_it/sprint10.odp" text:style-name="Internet_20_link" text:visited-style-name="Visited_20_Internet_20_Link">https://github.com/Ryboster/Uni-year2/blob/main/presentations/mash_it/sprint10.odp</text:a></text:p></text:list-item><text:list-item><text:p text:style-name="P12" loext:marker-style-name="T7"><text:a xlink:type="simple" xlink:href="https://github.com/Ryboster/Uni-year2/blob/main/presentations/mash_it/sprint5.odp" text:style-name="Internet_20_link" text:visited-style-name="Visited_20_Internet_20_Link">https://github.com/Ryboster/Uni-year2/blob/main/presentations/mash_it/sprint5.odp</text:a></text:p></text:list-item><text:list-item><text:p text:style-name="P12" loext:marker-style-name="T7"><text:a xlink:type="simple" xlink:href="https://github.com/Ryboster/Uni-year2/blob/main/presentations/mash_it/sprint7.odp" text:style-name="Internet_20_link" text:visited-style-name="Visited_20_Internet_20_Link">https://github.com/Ryboster/Uni-year2/blob/main/presentations/mash_it/sprint7.odp</text:a></text:p></text:list-item><text:list-item><text:p text:style-name="P12" loext:marker-style-name="T7"><text:a xlink:type="simple" xlink:href="https://github.com/Ryboster/Uni-year2/blob/main/presentations/mash_it/sprint9.odp" text:style-name="Internet_20_link" text:visited-style-name="Visited_20_Internet_20_Link">https://github.com/Ryboster/Uni-year2/blob/main/presentations/mash_it/sprint9.odp</text:a></text:p></text:list-item><text:list-item><text:p text:style-name="P12" loext:marker-style-name="T7"><text:a xlink:type="simple" xlink:href="https://github.com/Ryboster/Uni-year2/blob/main/presentations/mash_it/sprint6.odp" text:style-name="Internet_20_link" text:visited-style-name="Visited_20_Internet_20_Link">https://github.com/Ryboster/Uni-year2/blob/main/presentations/mash_it/sprint6.odp</text:a></text:p></text:list-item><text:list-item><text:p text:style-name="P12" loext:marker-style-name="T7"><text:a xlink:type="simple" xlink:href="https://github.com/Ryboster/Uni-year2/blob/main/presentations/SoV/ShadowsOfVahlvadell%20Midsprint%20Review.odp" text:style-name="Internet_20_link" text:visited-style-name="Visited_20_Internet_20_Link">https://github.com/Ryboster/Uni-year2/blob/main/presentations/SoV/ShadowsOfVahlvadell%20Midsprint%20Review.odp</text:a></text:p></text:list-item><text:list-item><text:p text:style-name="P12" loext:marker-style-name="T7"><text:a xlink:type="simple" xlink:href="https://github.com/Ryboster/Uni-year2/blob/main/presentations/lucid%20dreamer.odp" text:style-name="Internet_20_link" text:visited-style-name="Visited_20_Internet_20_Link">https://github.com/Ryboster/Uni-year2/blob/main/presentations/lucid%20dreamer.odp</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7_Fri12Sep2025.md" text:style-name="Internet_20_link" text:visited-style-name="Visited_20_Internet_20_Link">https://github.com/Ryboster/Uni-year2/blob/main/daily_logs/Sep2025/day7_Fri12Sep2025.md</text:a></text:p></text:list-item><text:list-item><text:p text:style-name="P12" loext:marker-style-name="T7"><text:a xlink:type="simple" xlink:href="https://github.com/Ryboster/Uni-year2/blob/main/daily_logs/Sep2025/day17_Wed24Sep2025.md" text:style-name="Internet_20_link" text:visited-style-name="Visited_20_Internet_20_Link">https://github.com/Ryboster/Uni-year2/blob/main/daily_logs/Sep2025/day17_Wed24Sep2025.md</text:a></text:p></text:list-item><text:list-item><text:p text:style-name="P12" loext:marker-style-name="T7"><text:a xlink:type="simple" xlink:href="https://github.com/Ryboster/Uni-year2/blob/main/daily_logs/Sep2025/day16_Tue23Sep2025.md" text:style-name="Internet_20_link" text:visited-style-name="Visited_20_Internet_20_Link">https://github.com/Ryboster/Uni-year2/blob/main/daily_logs/Sep2025/day16_Tue23Sep2025.md</text:a></text:p></text:list-item><text:list-item><text:p text:style-name="P12"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2"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2" loext:marker-style-name="T7"/></text:list-item></text:list></table:table-cell></table:table-row><table:table-row table:style-name="Table1.1"><table:table-cell table:style-name="Table1.A1" office:value-type="string"><text:p text:style-name="P4" loext:marker-style-name="T3"><text:span text:style-name="T3">4</text:span></text:p></table:table-cell><table:table-cell table:style-name="Table1.A1" office:value-type="string"><text:p text:style-name="P3" loext:marker-style-name="T3"><text:span text:style-name="T3">Security</text:span></text:p></table:table-cell><table:table-cell table:style-name="Table1.A1" office:value-type="string"><text:p text:style-name="P3" loext:marker-style-name="T6"><text:span text:style-name="T6">Evaluate software vulnerabilities through common testing methods and implement strategies to enhance software resilience against threats.</text:span></text:p></table:table-cell><table:table-cell table:style-name="Table1.A1" office:value-type="string"><text:p text:style-name="P3" loext:marker-style-name="T6"><text:span text:style-name="T6">You may have investigated this as part of your own projects if so, please provide a description of what you did and how you did it, even if it was only considered but not implemented. <text:s/>If not, please provide some evidence of your understanding of software vulnerabilities, and how they can be mitigated.</text:span></text:p><text:p text:style-name="P13" loext:marker-style-name="T6"/></table:table-cell><table:table-cell table:style-name="Table1.A1" office:value-type="string"><text:list text:style-name="L4"><text:list-item><text:p text:style-name="P14"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4" loext:marker-style-name="T7"><text:a xlink:type="simple" xlink:href="https://github.com/Ryboster/Personal_RESTful_API" text:style-name="Internet_20_link" text:visited-style-name="Visited_20_Internet_20_Link">https://github.com/Ryboster/Personal_RESTful_API</text:a></text:p></text:list-item><text:list-item><text:p text:style-name="P14"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9">(1(c) &amp; 1(d))</text:span></text:p></text:list-item><text:list-item><text:p text:style-name="P15"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5"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5" loext:marker-style-name="T7"/></text:list-item></text:list></table:table-cell></table:table-row><table:table-row table:style-name="Table1.1"><table:table-cell table:style-name="Table1.A1" office:value-type="string"><text:p text:style-name="P4" loext:marker-style-name="T3"><text:span text:style-name="T3">5</text:span></text:p></table:table-cell><table:table-cell table:style-name="Table1.A1" office:value-type="string"><text:p text:style-name="P3" loext:marker-style-name="T3"><text:span text:style-name="T3">Technical</text:span></text:p></table:table-cell><table:table-cell table:style-name="Table1.A1" office:value-type="string"><text:p text:style-name="P5" loext:marker-style-name="T4"><text:span text:style-name="T5">Examine key components of technology solutions in modern business environments, assessing their interactions and comparing different system architectures (e.g., game consoles, smartphones, embedded systems).</text:span></text:p><text:p text:style-name="P6" loext:marker-style-name="T3"/></table:table-cell><table:table-cell table:style-name="Table1.A1" office:value-type="string"><text:p text:style-name="P3" loext:marker-style-name="T7"><text:span text:style-name="T7">This can be evidenced through project work – you may taken part in a project that evidence these points. The list provided is an example, which is by no means complete. You may want to consider how different architectures are more or less suitable for your application and others. You may also want to consider interoperability issues as well.</text:span></text:p></table:table-cell><table:table-cell table:style-name="Table1.A1" office:value-type="string"><text:list text:style-name="L5"><text:list-item><text:p text:style-name="P16"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6"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6"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6"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6" loext:marker-style-name="T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6"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6" loext:marker-style-name="T7"/></text:list-item></text:list></table:table-cell></table:table-row><table:table-row table:style-name="Table1.9"><table:table-cell table:style-name="Table1.A1" office:value-type="string"><text:p text:style-name="P4" loext:marker-style-name="T3"><text:span text:style-name="T3">6</text:span></text:p></table:table-cell><table:table-cell table:style-name="Table1.A1" office:value-type="string"><text:p text:style-name="P3" loext:marker-style-name="T3"><text:span text:style-name="T3">Sustainability</text:span></text:p></table:table-cell><table:table-cell table:style-name="Table1.A1" office:value-type="string"><text:p text:style-name="P5" loext:marker-style-name="T5"><text:span text:style-name="T5">Apply sustainable software development principles by considering energy efficiency, resource consumption, and long-term environmental impact in technology solutions.</text:span></text:p></table:table-cell><table:table-cell table:style-name="Table1.A1" office:value-type="string"><text:p text:style-name="P3" loext:marker-style-name="T7"><text:span text:style-name="T7">This should be evidenced in your project portfolio. All compute sources consume energy, what has been done to reduce energy consumption. Remember, producing an efficient system (in terms of compute cycles, systems that run on minimal requirements etc), is likely to have energy saving as a side effect.</text:span></text:p></table:table-cell><table:table-cell table:style-name="Table1.A1" office:value-type="string"><text:list text:style-name="L6"><text:list-item><text:p text:style-name="P17"><text:a xlink:type="simple" xlink:href="https://github.com/Ryboster/Personal_RESTful_API" text:style-name="Internet_20_link" text:visited-style-name="Visited_20_Internet_20_Link">https://github.com/Ryboster/Personal_RESTful_API</text:a> – <text:span text:style-name="T10">Runs on a raspberry pi 4. </text:span><text:span text:style-name="T11">Very low power yet integrates modern web security features.</text:span></text:p></text:list-item><text:list-item><text:p text:style-name="P17"><text:a xlink:type="simple" xlink:href="https://github.com/Brewing-Game/brewing-game" text:style-name="Internet_20_link" text:visited-style-name="Visited_20_Internet_20_Link">https://github.com/Brewing-Game/brewing-game</text:a> – <text:span text:style-name="T12">Optimised for performance. Written for low-end hardware.</text:span></text:p></text:list-item><text:list-item><text:p text:style-name="P17"><text:a xlink:type="simple" xlink:href="https://github.com/Ryboster/QuickEbookReader" text:style-name="Internet_20_link" text:visited-style-name="Visited_20_Internet_20_Link">https://github.com/Ryboster/QuickEbookReader</text:a> – <text:span text:style-name="T13">Written for a raspberry pi 4, specifically to cut on power consumption.</text:span></text:p></text:list-item><text:list-item><text:p text:style-name="P17"><text:a xlink:type="simple" xlink:href="https://github.com/Ryboster/Djalio" text:style-name="Internet_20_link" text:visited-style-name="Visited_20_Internet_20_Link">https://github.com/Ryboster/Djalio</text:a> – <text:span text:style-name="T14">Electronic journal. Runs on raspberry pi 4. Very low power </text:span><text:span text:style-name="T15">requirements</text:span><text:span text:style-name="T14">.</text:span></text:p></text:list-item><text:list-item><text:p text:style-name="P17"><text:a xlink:type="simple" xlink:href="https://github.com/Ryboster/AI-nature-fact-sourcing-tool" text:style-name="Internet_20_link" text:visited-style-name="Visited_20_Internet_20_Link">https://github.com/Ryboster/AI-nature-fact-sourcing-tool</text:a> – <text:span text:style-name="T16">External tool</text:span><text:span text:style-name="T17"> written for Lauren’s project (MauiScreentime).</text:span></text:p></text:list-item><text:list-item><text:p text:style-name="P17"><text:a xlink:type="simple" xlink:href="https://github.com/Ryboster/ebook_dispenser" text:style-name="Internet_20_link" text:visited-style-name="Visited_20_Internet_20_Link">https://github.com/Ryboster/ebook_dispenser</text:a></text:p></text:list-item><text:list-item><text:p text:style-name="P1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7"><text:a xlink:type="simple" xlink:href="https://github.com/Ryboster/Uni-year2/blob/main/reflections/Data_Transformation/data_optimization_RESTfulAPI.md" text:style-name="Internet_20_link" text:visited-style-name="Visited_20_Internet_20_Link">https://github.com/Ryboster/Uni-year2/blob/main/reflections/Data_Transformation/data_optimization_RESTfulAPI.md</text:a></text:p></text:list-item><text:list-item><text:p text:style-name="P17"><text:a xlink:type="simple" xlink:href="https://github.com/Ryboster/Uni-year2/blob/main/reflections/Data_Transformation/data_optimization_mauiscreentime.md" text:style-name="Internet_20_link" text:visited-style-name="Visited_20_Internet_20_Link">https://github.com/Ryboster/Uni-year2/blob/main/reflections/Data_Transformation/data_optimization_mauiscreentime.md</text:a></text:p></text:list-item><text:list-item><text:p text:style-name="P17"/></text:list-item></text:list></table:table-cell></table:table-row></table:table></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GB" style:font-name-complex="Noto Sans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GB"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fo:language="en" fo:country="IE" style:letter-kerning="false" style:font-name-asian="Aptos1" style:font-family-asian="Aptos" style:font-family-generic-asian="system" style:font-pitch-asian="variable" style:font-size-asian="11pt" style:language-asian="en" style:country-asian="IE"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line-height="116%" fo:keep-together="always" fo:keep-with-next="always"/>
      <style:text-properties fo:color="#0f4761" loext:opacity="100%" style:font-name="Aptos Display" fo:font-family="'Aptos Display'" style:font-family-generic="roman" style:font-pitch="variable" fo:font-size="20pt" fo:language="en" fo:country="GB" style:letter-kerning="true" style:font-name-asian="Aptos1" style:font-family-asian="Aptos" style:font-family-generic-asian="system" style:font-pitch-asian="variable" style:font-size-asian="20pt" style:language-asian="en" style:country-asian="GB"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line-height="116%" fo:keep-together="always" fo:keep-with-next="always"/>
      <style:text-properties fo:color="#0f4761" loext:opacity="100%" style:font-name="Aptos Display" fo:font-family="'Aptos Display'" style:font-family-generic="roman" style:font-pitch="variable" fo:font-size="16pt" fo:language="en" fo:country="GB" style:letter-kerning="true" style:font-name-asian="Aptos1" style:font-family-asian="Aptos" style:font-family-generic-asian="system" style:font-pitch-asian="variable" style:font-size-asian="16pt" style:language-asian="en" style:country-asian="GB"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line-height="116%" fo:keep-together="always" fo:keep-with-next="always"/>
      <style:text-properties fo:color="#0f4761" loext:opacity="100%" fo:font-size="14pt" fo:language="en" fo:country="GB" style:letter-kerning="true" style:font-name-asian="Aptos1" style:font-family-asian="Aptos" style:font-family-generic-asian="system" style:font-pitch-asian="variable" style:font-size-asian="14pt" style:language-asian="en" style:country-asian="GB"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line-height="116%" fo:keep-together="always" fo:keep-with-next="always"/>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line-height="116%" fo:keep-together="always" fo:keep-with-next="always"/>
      <style:text-properties fo:color="#0f4761"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line-height="116%" fo:keep-together="always" fo:keep-with-next="always"/>
      <style:text-properties fo:color="#595959"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line-height="116%" fo:keep-together="always" fo:keep-with-next="always"/>
      <style:text-properties fo:color="#595959"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line-height="116%" fo:keep-together="always" fo:keep-with-next="always"/>
      <style:text-properties fo:color="#272727"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line-height="116%" fo:keep-together="always" fo:keep-with-next="always"/>
      <style:text-properties fo:color="#272727"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fo:language="en" fo:country="GB" style:letter-kerning="true" style:font-name-asian="Aptos1" style:font-family-asian="Aptos" style:font-family-generic-asian="system" style:font-pitch-asian="variable" style:font-size-asian="28pt" style:language-asian="en" style:country-asian="GB"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fo:line-height="116%"/>
      <style:text-properties fo:color="#595959" loext:opacity="100%" fo:font-size="14pt" fo:letter-spacing="0.026cm" fo:language="en" fo:country="GB" style:letter-kerning="true" style:font-name-asian="Aptos1" style:font-family-asian="Aptos" style:font-family-generic-asian="system" style:font-pitch-asian="variable" style:font-size-asian="14pt" style:language-asian="en" style:country-asian="GB"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line-height="116%" fo:text-align="center" style:justify-single-word="false"/>
      <style:text-properties fo:color="#404040"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fo:line-height="116%"/>
      <style:text-properties fo:font-size="12pt" fo:language="en" fo:country="GB" style:letter-kerning="true" style:font-name-asian="Aptos1" style:font-family-asian="Aptos" style:font-family-generic-asian="system" style:font-pitch-asian="variable" style:font-size-asian="12pt" style:language-asian="en" style:country-asian="GB" style:font-size-complex="12pt"/>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line-height="116%" fo:text-align="center" style:justify-single-word="false" fo:padding-left="0cm" fo:padding-right="0cm" fo:padding-top="0.353cm" fo:padding-bottom="0.353cm" fo:border-left="none" fo:border-right="none" fo:border-top="0.51pt solid #0f4761" fo:border-bottom="0.51pt solid #0f4761"/>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42cm" fo:page-height="29.7cm" style:num-format="1" style:print-orientation="landscape"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en Williams</meta:initial-creator>
    <meta:editing-cycles>40</meta:editing-cycles>
    <meta:creation-date>2025-08-29T09:16:00</meta:creation-date>
    <dc:date>2026-05-24T23:22:59.822569756</dc:date>
    <meta:editing-duration>PT1H3M27S</meta:editing-duration>
    <meta:generator>LibreOffice/25.8.3.2$Linux_X86_64 LibreOffice_project/8ca8d55c161d602844f5428fa4b58097424e324e</meta:generator>
    <meta:document-statistic meta:table-count="1" meta:image-count="0" meta:object-count="0" meta:page-count="3" meta:paragraph-count="95" meta:word-count="626" meta:character-count="8410" meta:non-whitespace-character-count="7928"/>
    <meta:user-defined meta:name="AppVersion">16.0000</meta:user-defined>
    <meta:template xlink:type="simple" xlink:actuate="onRequest" xlink:title="Normal.dotm" xlink:href=""/>
  </office:meta>
</office:document-meta>
</file>