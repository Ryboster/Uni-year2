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5pt" fo:font-weight="bold" officeooo:rsid="02613432" officeooo:paragraph-rsid="02613432" style:font-size-asian="15pt" style:font-weight-asian="bold" style:font-size-complex="15pt" style:font-weight-complex="bold"/>
    </style:style>
    <style:style style:name="P119" style:family="paragraph" style:parent-style-name="Standard">
      <style:paragraph-properties fo:text-align="start" style:justify-single-word="false"/>
      <style:text-properties fo:font-size="12pt" fo:font-style="normal" style:text-underline-style="none" fo:font-weight="normal" officeooo:rsid="025a1d5c" officeooo:paragraph-rsid="02640e5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265c2e6" officeooo:paragraph-rsid="0265c2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T195" style:family="text">
      <style:text-properties fo:font-size="12pt" fo:font-style="normal" style:text-underline-style="none" fo:font-weight="normal" officeooo:rsid="025bcece" style:font-size-asian="12pt" style:font-style-asian="normal" style:font-weight-asian="normal" style:font-size-complex="12pt" style:font-style-complex="normal" style:font-weight-complex="normal"/>
    </style:style>
    <style:style style:name="T196" style:family="text">
      <style:text-properties fo:font-size="12pt" fo:font-style="normal" style:text-underline-style="none" fo:font-weight="normal" officeooo:rsid="025a1d5c" style:font-size-asian="12pt" style:font-style-asian="normal" style:font-weight-asian="normal" style:font-size-complex="12pt" style:font-style-complex="normal" style:font-weight-complex="normal"/>
    </style:style>
    <style:style style:name="T197" style:family="text">
      <style:text-properties officeooo:rsid="026ab665"/>
    </style:style>
    <style:style style:name="T198" style:family="text">
      <style:text-properties officeooo:rsid="02676511"/>
    </style:style>
    <style:style style:name="T199" style:family="text">
      <style:text-properties officeooo:rsid="02676ead"/>
    </style:style>
    <style:style style:name="T200" style:family="text">
      <style:text-properties officeooo:rsid="026d890b"/>
    </style:style>
    <style:style style:name="T201" style:family="text">
      <style:text-properties officeooo:rsid="026f02d4"/>
    </style:style>
    <style:style style:name="T202" style:family="text">
      <style:text-properties officeooo:rsid="026f56b3"/>
    </style:style>
    <style:style style:name="T203" style:family="text">
      <style:text-properties officeooo:rsid="02706672"/>
    </style:style>
    <style:style style:name="T204" style:family="text">
      <style:text-properties officeooo:rsid="02722b29"/>
    </style:style>
    <style:style style:name="T205" style:family="text">
      <style:text-properties officeooo:rsid="02733507"/>
    </style:style>
    <style:style style:name="T206" style:family="text">
      <style:text-properties officeooo:rsid="027421ed"/>
    </style:style>
    <style:style style:name="T207" style:family="text">
      <style:text-properties officeooo:rsid="0274a345"/>
    </style:style>
    <style:style style:name="T208" style:family="text">
      <style:text-properties officeooo:rsid="02761728"/>
    </style:style>
    <style:style style:name="T209" style:family="text">
      <style:text-properties officeooo:rsid="027893f8"/>
    </style:style>
    <style:style style:name="T210" style:family="text">
      <style:text-properties officeooo:rsid="0278ef53"/>
    </style:style>
    <style:style style:name="T211" style:family="text">
      <style:text-properties officeooo:rsid="027e7264"/>
    </style:style>
    <style:style style:name="T212" style:family="text">
      <style:text-properties officeooo:rsid="0279c692"/>
    </style:style>
    <style:style style:name="T213" style:family="text">
      <style:text-properties officeooo:rsid="027f0ba5"/>
    </style:style>
    <style:style style:name="T214" style:family="text">
      <style:text-properties officeooo:rsid="027bbcc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span text:style-name="T195"> </text:span><text:span text:style-name="T196">From there, the implementation could be written specifically to satisfy those test cases.</text:span></text:p>
      <text:p text:style-name="P116"/>
      <text:p text:style-name="P117"/>
      <text:p text:style-name="P112"/>
      <text:p text:style-name="P118">3. Efficiency Evaluation</text:p>
      <text:p text:style-name="P119"/>
      <text:p text:style-name="P120">Currently, all <text:span text:style-name="T197">14 tests</text:span> complete within <text:span text:style-name="T198">0.51 </text:span><text:span text:style-name="T199">seconds. </text:span><text:span text:style-name="T200">This is perfectly acceptable for a CI/CD pipeline that runs on every commit and where speed and efficiency is of the essence. If the </text:span><text:span text:style-name="T201">test suite was to grow to a 1000 tests, </text:span><text:span text:style-name="T202">the estimated time it would have taken to complete the</text:span><text:span text:style-name="T203">m</text:span><text:span text:style-name="T202"> would have </text:span><text:span text:style-name="T203">rose to</text:span><text:span text:style-name="T202"> around 36 seconds – </text:span><text:span text:style-name="T204">Much less acceptable. </text:span><text:span text:style-name="T205">In such a case, efficiency would need to be improved. </text:span><text:span text:style-name="T206">This could be done by either pruning tests </text:span><text:span text:style-name="T207">(not recommended), or </text:span><text:span text:style-name="T208">by optimising the test execution strategy, </text:span><text:span text:style-name="T209">for example, by </text:span><text:span text:style-name="T210">grouping tests into “slow” and “fast” categor</text:span><text:span text:style-name="T211">ies</text:span><text:span text:style-name="T210">, and only executing the fast tests on every commit, </text:span><text:span text:style-name="T212">while the </text:span><text:span text:style-name="T213">slow tests</text:span><text:span text:style-name="T212"> could run periodically </text:span><text:span text:style-name="T214">or on every merg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30:14.321995676</dc:date>
    <meta:editing-duration>PT9H7S</meta:editing-duration>
    <meta:editing-cycles>502</meta:editing-cycles>
    <meta:document-statistic meta:table-count="0" meta:image-count="21" meta:object-count="0" meta:page-count="11" meta:paragraph-count="85" meta:word-count="2031" meta:character-count="13372" meta:non-whitespace-character-count="11411"/>
  </office:meta>
</office:document-meta>
</file>