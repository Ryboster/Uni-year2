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0A00000096462F6CF5.png" manifest:media-type="image/png"/>
  <manifest:file-entry manifest:full-path="Pictures/100000010000020800000030DA0392BE.png" manifest:media-type="image/png"/>
  <manifest:file-entry manifest:full-path="Pictures/10000001000001E20000005077C883AE.png" manifest:media-type="image/png"/>
  <manifest:file-entry manifest:full-path="Pictures/100000010000022D000000C8F7426F06.png" manifest:media-type="image/png"/>
  <manifest:file-entry manifest:full-path="Pictures/10000001000001E5000000C5A172BF24.png" manifest:media-type="image/png"/>
  <manifest:file-entry manifest:full-path="Pictures/10000001000002AE00000071B6E4150B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roid Sans Mono" svg:font-family="'Droid Sans Mono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fo:font-weight="bold" officeooo:rsid="0002a5b7" officeooo:paragraph-rsid="0002a5b7" style:font-size-asian="24pt" style:font-weight-asian="bold" style:font-size-complex="24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28pt" fo:font-weight="bold" officeooo:rsid="0002a5b7" officeooo:paragraph-rsid="0002a5b7" style:font-size-asian="28pt" style:font-weight-asian="bold" style:font-size-complex="28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3pt" fo:font-weight="bold" officeooo:rsid="0002a5b7" officeooo:paragraph-rsid="0002a5b7" style:font-size-asian="11.3500003814697pt" style:font-weight-asian="bold" style:font-size-complex="13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3pt" fo:font-weight="bold" officeooo:rsid="0002df3a" officeooo:paragraph-rsid="0002df3a" style:font-size-asian="11.3500003814697pt" style:font-weight-asian="bold" style:font-size-complex="13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3pt" fo:font-weight="normal" officeooo:rsid="0002df3a" officeooo:paragraph-rsid="0002df3a" style:font-size-asian="11.3500003814697pt" style:font-weight-asian="normal" style:font-size-complex="13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3pt" fo:font-weight="bold" officeooo:rsid="00307859" officeooo:paragraph-rsid="00307859" style:font-size-asian="11.3500003814697pt" style:font-weight-asian="bold" style:font-size-complex="13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0c21f5" officeooo:paragraph-rsid="000c21f5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3pt" fo:font-weight="normal" officeooo:rsid="000c21f5" officeooo:paragraph-rsid="000c21f5" style:font-size-asian="11.3500003814697pt" style:font-weight-asian="normal" style:font-size-complex="13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3pt" fo:font-weight="bold" officeooo:rsid="0031f879" officeooo:paragraph-rsid="0031f879" style:font-size-asian="11.3500003814697pt" style:font-weight-asian="bold" style:font-size-complex="13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4976de" officeooo:paragraph-rsid="004976de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officeooo:rsid="0014f428" officeooo:paragraph-rsid="001ab48e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3pt" fo:font-weight="normal" officeooo:rsid="0014f428" officeooo:paragraph-rsid="001ab48e" style:font-size-asian="11.3500003814697pt" style:font-weight-asian="normal" style:font-size-complex="13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fo:font-weight="normal" officeooo:rsid="001ab48e" officeooo:paragraph-rsid="001ab48e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3pt" fo:font-weight="normal" officeooo:rsid="001ab48e" officeooo:paragraph-rsid="001ab48e" style:font-size-asian="11.3500003814697pt" style:font-weight-asian="normal" style:font-size-complex="13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3pt" fo:font-weight="normal" officeooo:rsid="0016e436" officeooo:paragraph-rsid="001ab48e" style:font-size-asian="11.3500003814697pt" style:font-weight-asian="normal" style:font-size-complex="13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3pt" fo:font-weight="normal" officeooo:rsid="0010f62b" officeooo:paragraph-rsid="001ab48e" style:font-size-asian="11.3500003814697pt" style:font-weight-asian="normal" style:font-size-complex="13pt" style:font-weight-complex="normal"/>
    </style:style>
    <style:style style:name="P17" style:family="paragraph" style:parent-style-name="Standard">
      <style:paragraph-properties fo:text-align="start" style:justify-single-word="false"/>
      <style:text-properties fo:color="#ffffff" loext:opacity="100%" style:font-name="Droid Sans Mono" fo:font-size="10.5pt" fo:font-weight="normal" officeooo:rsid="00070e4c" officeooo:paragraph-rsid="0002df3a" fo:background-color="transparent"/>
    </style:style>
    <style:style style:name="P18" style:family="paragraph" style:parent-style-name="Standard">
      <style:paragraph-properties fo:text-align="start" style:justify-single-word="false"/>
      <style:text-properties fo:color="#ffffff" loext:opacity="100%" style:font-name="Liberation Serif" fo:font-size="12pt" fo:font-weight="normal" officeooo:rsid="00238259" officeooo:paragraph-rsid="00238259" fo:background-color="transparent" style:font-size-asian="12pt" style:font-size-complex="12pt"/>
    </style:style>
    <style:style style:name="P19" style:family="paragraph" style:parent-style-name="Standard">
      <style:paragraph-properties fo:text-align="start" style:justify-single-word="false"/>
      <style:text-properties fo:color="#ffffff" loext:opacity="100%" style:font-name="Liberation Serif" fo:font-size="12pt" fo:font-weight="normal" officeooo:rsid="0020970b" officeooo:paragraph-rsid="0020970b" fo:background-color="transparent" style:font-size-asian="12pt" style:font-size-complex="12pt"/>
    </style:style>
    <style:style style:name="P20" style:family="paragraph" style:parent-style-name="Standard">
      <style:paragraph-properties fo:text-align="start" style:justify-single-word="false"/>
      <style:text-properties fo:font-size="13pt" fo:font-weight="bold" officeooo:rsid="0031f879" officeooo:paragraph-rsid="0052fe26" style:font-size-asian="11.3500003814697pt" style:font-weight-asian="bold" style:font-size-complex="13pt" style:font-weight-complex="bold"/>
    </style:style>
    <style:style style:name="P21" style:family="paragraph" style:parent-style-name="Standard">
      <style:paragraph-properties fo:text-align="start" style:justify-single-word="false"/>
      <style:text-properties style:font-name="Liberation Serif" fo:font-size="12pt" officeooo:paragraph-rsid="0020970b" style:font-size-asian="12pt" style:font-size-complex="12pt"/>
    </style:style>
    <style:style style:name="P22" style:family="paragraph" style:parent-style-name="Standard">
      <style:paragraph-properties fo:text-align="start" style:justify-single-word="false"/>
      <style:text-properties officeooo:paragraph-rsid="0020970b"/>
    </style:style>
    <style:style style:name="P23" style:family="paragraph" style:parent-style-name="Standard">
      <style:paragraph-properties fo:text-align="start" style:justify-single-word="false"/>
      <style:text-properties fo:font-size="13pt" fo:font-weight="normal" officeooo:rsid="000379d7" officeooo:paragraph-rsid="000379d7" style:font-size-asian="11.3500003814697pt" style:font-weight-asian="normal" style:font-size-complex="13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2pt" fo:font-weight="normal" officeooo:rsid="000379d7" officeooo:paragraph-rsid="000379d7" style:font-size-asian="12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3pt" fo:font-weight="normal" officeooo:rsid="00238259" officeooo:paragraph-rsid="00238259" style:font-size-asian="11.3500003814697pt" style:font-weight-asian="normal" style:font-size-complex="13pt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2pt" fo:font-weight="normal" officeooo:rsid="002a9cd0" officeooo:paragraph-rsid="002a9cd0" style:font-size-asian="12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3pt" fo:font-weight="bold" officeooo:rsid="0031f879" officeooo:paragraph-rsid="0055c7b1" style:font-size-asian="11.3500003814697pt" style:font-weight-asian="bold" style:font-size-complex="13pt" style:font-weight-complex="bold"/>
    </style:style>
    <style:style style:name="P28" style:family="paragraph" style:parent-style-name="Standard">
      <style:paragraph-properties fo:text-align="start" style:justify-single-word="false"/>
      <style:text-properties fo:font-size="12pt" fo:font-weight="normal" officeooo:rsid="00238259" officeooo:paragraph-rsid="00238259" style:font-size-asian="12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ize="13pt" fo:font-weight="normal" officeooo:rsid="0002df3a" officeooo:paragraph-rsid="000379d7" style:font-size-asian="11.3500003814697pt" style:font-weight-asian="normal" style:font-size-complex="13pt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size="12pt" fo:font-weight="normal" officeooo:rsid="00238259" officeooo:paragraph-rsid="003f50b5" style:font-size-asian="12pt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size="12pt" fo:font-weight="normal" officeooo:rsid="0041a5d3" officeooo:paragraph-rsid="0041a5d3" style:font-size-asian="12pt" style:font-weight-asian="normal" style:font-size-complex="12pt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size="13pt" fo:font-weight="bold" officeooo:rsid="0031f879" officeooo:paragraph-rsid="005ac241" style:font-size-asian="11.3500003814697pt" style:font-weight-asian="bold" style:font-size-complex="13pt" style:font-weight-complex="bold"/>
    </style:style>
    <style:style style:name="P33" style:family="paragraph" style:parent-style-name="Standard">
      <style:paragraph-properties fo:text-align="start" style:justify-single-word="false"/>
      <style:text-properties fo:font-size="12pt" fo:font-weight="normal" officeooo:rsid="005b4218" officeooo:paragraph-rsid="005ac241" style:font-size-asian="12pt" style:font-weight-asian="normal" style:font-size-complex="12pt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size="12pt" fo:font-weight="normal" officeooo:rsid="0060f376" officeooo:paragraph-rsid="0060f376" style:font-size-asian="12pt" style:font-weight-asian="normal" style:font-size-complex="12pt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size="13pt" fo:font-weight="bold" officeooo:rsid="0031f879" officeooo:paragraph-rsid="0064d8e3" style:font-size-asian="11.3500003814697pt" style:font-weight-asian="bold" style:font-size-complex="13pt" style:font-weight-complex="bold"/>
    </style:style>
    <style:style style:name="P36" style:family="paragraph" style:parent-style-name="Standard">
      <style:paragraph-properties fo:text-align="start" style:justify-single-word="false"/>
      <style:text-properties fo:font-size="12pt" fo:font-weight="normal" officeooo:rsid="0060f376" officeooo:paragraph-rsid="00675c65" style:font-size-asian="12pt" style:font-weight-asian="normal" style:font-size-complex="12pt" style:font-weight-complex="normal"/>
    </style:style>
    <style:style style:name="T1" style:family="text">
      <style:text-properties officeooo:rsid="004aeffb"/>
    </style:style>
    <style:style style:name="T2" style:family="text">
      <style:text-properties officeooo:rsid="0032f33d"/>
    </style:style>
    <style:style style:name="T3" style:family="text">
      <style:text-properties officeooo:rsid="000d801d"/>
    </style:style>
    <style:style style:name="T4" style:family="text">
      <style:text-properties officeooo:rsid="0034883b"/>
    </style:style>
    <style:style style:name="T5" style:family="text">
      <style:text-properties officeooo:rsid="0050a23e"/>
    </style:style>
    <style:style style:name="T6" style:family="text">
      <style:text-properties officeooo:rsid="004c1871"/>
    </style:style>
    <style:style style:name="T7" style:family="text">
      <style:text-properties officeooo:rsid="0016e436"/>
    </style:style>
    <style:style style:name="T8" style:family="text">
      <style:text-properties officeooo:rsid="001cb2f1"/>
    </style:style>
    <style:style style:name="T9" style:family="text">
      <style:text-properties officeooo:rsid="002505ed"/>
    </style:style>
    <style:style style:name="T10" style:family="text">
      <style:text-properties officeooo:rsid="002618e1"/>
    </style:style>
    <style:style style:name="T11" style:family="text">
      <style:text-properties officeooo:rsid="0053f89c"/>
    </style:style>
    <style:style style:name="T12" style:family="text">
      <style:text-properties officeooo:rsid="0052fe26"/>
    </style:style>
    <style:style style:name="T13" style:family="text">
      <style:text-properties fo:color="#ffffff" loext:opacity="100%" fo:font-weight="normal" officeooo:rsid="0020970b" fo:background-color="transparent" loext:char-shading-value="0"/>
    </style:style>
    <style:style style:name="T14" style:family="text">
      <style:text-properties fo:color="#ffffff" loext:opacity="100%" fo:font-weight="normal" officeooo:rsid="0021bc69" fo:background-color="transparent" loext:char-shading-value="0"/>
    </style:style>
    <style:style style:name="T15" style:family="text">
      <style:text-properties officeooo:rsid="0021bc69"/>
    </style:style>
    <style:style style:name="T16" style:family="text">
      <style:text-properties officeooo:rsid="00562ae4"/>
    </style:style>
    <style:style style:name="T17" style:family="text">
      <style:text-properties officeooo:rsid="0055c7b1"/>
    </style:style>
    <style:style style:name="T18" style:family="text">
      <style:text-properties officeooo:rsid="002bc841"/>
    </style:style>
    <style:style style:name="T19" style:family="text">
      <style:text-properties officeooo:rsid="003751e3"/>
    </style:style>
    <style:style style:name="T20" style:family="text">
      <style:text-properties officeooo:rsid="00391f21"/>
    </style:style>
    <style:style style:name="T21" style:family="text">
      <style:text-properties officeooo:rsid="003f50b5"/>
    </style:style>
    <style:style style:name="T22" style:family="text">
      <style:text-properties officeooo:rsid="0040684a"/>
    </style:style>
    <style:style style:name="T23" style:family="text">
      <style:text-properties officeooo:rsid="006163eb"/>
    </style:style>
    <style:style style:name="T24" style:family="text">
      <style:text-properties officeooo:rsid="005ac241"/>
    </style:style>
    <style:style style:name="T25" style:family="text">
      <style:text-properties officeooo:rsid="0064d8e3"/>
    </style:style>
    <style:style style:name="T26" style:family="text">
      <style:text-properties officeooo:rsid="0066dd6d"/>
    </style:style>
    <style:style style:name="T27" style:family="text">
      <style:text-properties officeooo:rsid="0068ef9c"/>
    </style:style>
    <style:style style:name="T28" style:family="text">
      <style:text-properties officeooo:rsid="00695487"/>
    </style:style>
    <style:style style:name="T29" style:family="text">
      <style:text-properties officeooo:rsid="006a7e30"/>
    </style:style>
    <style:style style:name="fr1" style:family="graphic" style:parent-style-name="Graphics">
      <style:graphic-properties style:vertical-pos="from-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Verification and Testing Report</text:p>
      <text:p text:style-name="P2"/>
      <text:p text:style-name="P3"/>
      <text:p text:style-name="P4">1. Deliverable Management and Quality Impact</text:p>
      <text:p text:style-name="P4"/>
      <text:p text:style-name="P4">1.1. Preliminary Codebase Examination</text:p>
      <text:p text:style-name="P5"/>
      <text:p text:style-name="P6"><text:span text:style-name="T1">A</text:span><text:span text:style-name="T2">.</text:span> Dead Code</text:p>
      <text:p text:style-name="P5"/>
      <text:p text:style-name="P7">Initial examination reveals three dead functions; “validate_priority”, “format_task_for_display”, and “calculate_workload”. <text:span text:style-name="T3">A comment in “validate_priority” informs the user about this. This suggests that while validation logic was planned for and implemented, it was never integrated, suggesting rushed delivery.</text:span></text:p>
      <text:p text:style-name="P7"/>
      <text:p text:style-name="P7">“<text:span text:style-name="T3">flask.render_template_string” is imported but never used.</text:span></text:p>
      <text:p text:style-name="P7"/>
      <text:p text:style-name="P8"/>
      <text:p text:style-name="P9"><text:span text:style-name="T1">B</text:span><text:span text:style-name="T4">.</text:span> <text:span text:style-name="T5">Query</text:span><text:span text:style-name="T6"> Inconsistencies</text:span></text:p>
      <text:p text:style-name="P10"/>
      <text:p text:style-name="P11">The codebase contains inconsistent SQL queries. <text:span text:style-name="T7">The “login” function uses string formatting in its query:</text:span></text:p>
      <text:p text:style-name="P12"><draw:frame draw:style-name="fr1" draw:name="Image2" text:anchor-type="char" svg:y="0.476cm" svg:width="17cm" svg:height="2.799cm" draw:z-index="1"><draw:image xlink:href="Pictures/10000001000002AE00000071B6E4150B.png" xlink:type="simple" xlink:show="embed" xlink:actuate="onLoad" draw:mime-type="image/png"/></draw:frame></text:p>
      <text:p text:style-name="P13">, which is insecure, while the “get_task” function uses <text:span text:style-name="T8">context-</text:span>appropriate parameterised queries:</text:p>
      <text:p text:style-name="P14"><draw:frame draw:style-name="fr2" draw:name="Image1" text:anchor-type="char" svg:y="0.319cm" svg:width="14.737cm" svg:height="5.292cm" draw:z-index="0"><draw:image xlink:href="Pictures/100000010000022D000000C8F7426F06.png" xlink:type="simple" xlink:show="embed" xlink:actuate="onLoad" draw:mime-type="image/png"/></draw:frame></text:p>
      <text:p text:style-name="P12"/>
      <text:p text:style-name="P12"/>
      <text:p text:style-name="P15"><text:s/></text:p>
      <text:p text:style-name="P12"/>
      <text:p text:style-name="P12"/>
      <text:p text:style-name="P12"/>
      <text:p text:style-name="P12"/>
      <text:p text:style-name="P12"/>
      <text:p text:style-name="P12"/>
      <text:p text:style-name="P16">.</text:p>
      <text:p text:style-name="P17"/>
      <text:p text:style-name="P18"><text:span text:style-name="T9">One other place where</text:span> string formatting <text:span text:style-name="T9">is </text:span>being used in place of parameterised queries <text:span text:style-name="T10">is the</text:span> “<text:span text:style-name="T9">search_tasks</text:span>” <text:span text:style-name="T10">function.</text:span></text:p>
      <text:p text:style-name="P19"/>
      <text:p text:style-name="P19"/>
      <text:p text:style-name="P19"/>
      <text:p text:style-name="P19"/>
      <text:p text:style-name="P20"><text:soft-page-break/><text:span text:style-name="T11">C</text:span><text:span text:style-name="T4">.</text:span> <text:span text:style-name="T12">Input Validation Inconsistencies</text:span></text:p>
      <text:p text:style-name="P21"><text:span text:style-name="T13">Input validation inconsistencies were also found. </text:span><text:span text:style-name="T14">The “create_task”</text:span> <text:span text:style-name="T15">function validates input properly:</text:span></text:p>
      <text:p text:style-name="P22"><draw:frame draw:style-name="fr3" draw:name="Image3" text:anchor-type="char" svg:width="13.758cm" svg:height="1.27cm" draw:z-index="2"><draw:image xlink:href="Pictures/100000010000020800000030DA0392BE.png" xlink:type="simple" xlink:show="embed" xlink:actuate="onLoad" draw:mime-type="image/png"/></draw:frame></text:p>
      <text:p text:style-name="P17"/>
      <text:p text:style-name="P23"/>
      <text:p text:style-name="P24">, <text:span text:style-name="T15">while “update_task” does not:</text:span></text:p>
      <text:p text:style-name="P23"><draw:frame draw:style-name="fr3" draw:name="Image4" text:anchor-type="char" svg:width="12.753cm" svg:height="2.117cm" draw:z-index="3"><draw:image xlink:href="Pictures/10000001000001E20000005077C883AE.png" xlink:type="simple" xlink:show="embed" xlink:actuate="onLoad" draw:mime-type="image/png"/></draw:frame></text:p>
      <text:p text:style-name="P23"/>
      <text:p text:style-name="P23"/>
      <text:p text:style-name="P25"/>
      <text:p text:style-name="P25"/>
      <text:p text:style-name="P26">One other example of this is the “add_comment” function, where input is not being validated either.</text:p>
      <text:p text:style-name="P27"/>
      <text:p text:style-name="P27"><text:span text:style-name="T16">D</text:span><text:span text:style-name="T4">.</text:span> <text:span text:style-name="T17">Error-Handling</text:span><text:span text:style-name="T6"> Inconsistencies</text:span></text:p>
      <text:p text:style-name="P27"/>
      <text:p text:style-name="P28"><text:span text:style-name="T18">E</text:span>rror-handling inconsistencies <text:span text:style-name="T18">were found </text:span><text:span text:style-name="T19">as well. </text:span><text:span text:style-name="T20">Some functions like “get_task” incorporate proper error handling:</text:span></text:p>
      <text:p text:style-name="P28"><draw:frame draw:style-name="fr3" draw:name="Image5" text:anchor-type="char" svg:width="12.832cm" svg:height="5.212cm" draw:z-index="4"><draw:image xlink:href="Pictures/10000001000001E5000000C5A172BF24.png" xlink:type="simple" xlink:show="embed" xlink:actuate="onLoad" draw:mime-type="image/png"/></draw:frame></text:p>
      <text:p text:style-name="P28"/>
      <text:p text:style-name="P25"/>
      <text:p text:style-name="P25"/>
      <text:p text:style-name="P23"/>
      <text:p text:style-name="P23"/>
      <text:p text:style-name="P23"/>
      <text:p text:style-name="P23"/>
      <text:p text:style-name="P23"/>
      <text:p text:style-name="P29"/>
      <text:p text:style-name="P29"/>
      <text:p text:style-name="P30">, <text:span text:style-name="T21">while </text:span><text:span text:style-name="T22">other functions like “delete_task” do not:</text:span></text:p>
      <text:p text:style-name="P30"><draw:frame draw:style-name="fr3" draw:name="Image6" text:anchor-type="char" svg:width="13.811cm" svg:height="3.969cm" draw:z-index="5"><draw:image xlink:href="Pictures/100000010000020A00000096462F6CF5.png" xlink:type="simple" xlink:show="embed" xlink:actuate="onLoad" draw:mime-type="image/png"/></draw:frame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1">(Existence of record is never verified before deletion attempt – <text:span text:style-name="T23">This fails silently</text:span>).<text:line-break/></text:p>
      <text:p text:style-name="P32"><text:span text:style-name="T24">E</text:span><text:span text:style-name="T4">.</text:span> <text:span text:style-name="T24">Authentication</text:span><text:span text:style-name="T6"> Inconsistencies</text:span></text:p>
      <text:p text:style-name="P33"/>
      <text:p text:style-name="P34">Authentication only exists at the /login endpoint. No other endpoint requires it. This effectively makes authentication a feature rather than a system-wide integration.</text:p>
      <text:p text:style-name="P30"/>
      <text:p text:style-name="P30"/>
      <text:p text:style-name="P35"><text:span text:style-name="T25">F</text:span><text:span text:style-name="T4">.</text:span> <text:span text:style-name="T26">No Database Error Handling</text:span></text:p>
      <text:p text:style-name="P30"/>
      <text:p text:style-name="P36">A<text:span text:style-name="T27">cross the entire file, not one database call includes error handling. If an error was to occur in a “db.execute” call, </text:span><text:span text:style-name="T28">the application would fail. </text:span><text:span text:style-name="T29">This could be remedied with try-except blocks. </text:span></text:p>
      <text:p text:style-name="P30"><text:soft-page-break/></text:p>
      <text:p text:style-name="P3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roid Sans Mono" svg:font-family="'Droid Sans Mono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24T13:25:54.934564791</meta:creation-date>
    <meta:generator>LibreOffice/25.8.3.2$Linux_X86_64 LibreOffice_project/8ca8d55c161d602844f5428fa4b58097424e324e</meta:generator>
    <dc:date>2026-05-24T16:16:34.646441574</dc:date>
    <meta:editing-duration>PT2H49M58S</meta:editing-duration>
    <meta:editing-cycles>78</meta:editing-cycles>
    <meta:document-statistic meta:table-count="0" meta:image-count="6" meta:object-count="0" meta:page-count="3" meta:paragraph-count="24" meta:word-count="246" meta:character-count="1821" meta:non-whitespace-character-count="1594"/>
  </office:meta>
</office:document-meta>
</file>