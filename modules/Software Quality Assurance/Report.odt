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0f62b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T1" style:family="text">
      <style:text-properties officeooo:rsid="000d801d"/>
    </style:style>
    <style:style style:name="T2" style:family="text">
      <style:text-properties officeooo:rsid="000a79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1"/>
      <text:p text:style-name="P2"/>
      <text:p text:style-name="P3">1. Deliverable Management and Quality Impact</text:p>
      <text:p text:style-name="P3"/>
      <text:p text:style-name="P4">1.1. Preliminary Codebase Examination</text:p>
      <text:p text:style-name="P4"/>
      <text:p text:style-name="P5">Initial examination reveals three dead functions; “validate_priority”, “format_task_for_display”, and “calculate_workload”. <text:span text:style-name="T1">A comment in “validate_priority” informs the user about this. This suggests that while validation logic was planned for and implemented, it was never integrated, suggesting rushed delivery.</text:span></text:p>
      <text:p text:style-name="P5"/>
      <text:p text:style-name="P5">“<text:span text:style-name="T1">flask.render_template_string” is imported but never used.</text:span></text:p>
      <text:p text:style-name="P5"/>
      <text:p text:style-name="P6">Inconsistencies between similar endpoints were found as well. </text:p>
      <text:p text:style-name="P7"/>
      <text:p text:style-name="P7"/>
      <text:p text:style-name="P8"/>
      <text:p text:style-name="P8"/>
      <text:p text:style-name="P8">1.1(b) <text:span text:style-name="T2">Comments suggesting incomplete workflow</text:span></text:p>
      <text:p text:style-name="P8"/>
      <text:p text:style-name="P8">1.1(c)</text:p>
      <text:p text:style-name="P8">1.1(d)</text:p>
      <text:p text:style-name="P8">1.1(e)</text:p>
      <text:p text:style-name="P8"/>
      <text:p text:style-name="P4"/>
      <text:p text:style-name="P4"/>
      <text:p text:style-name="P4">1.2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5:25:00.370263978</dc:date>
    <meta:editing-duration>PT1H58M59S</meta:editing-duration>
    <meta:editing-cycles>14</meta:editing-cycles>
    <meta:document-statistic meta:table-count="0" meta:image-count="0" meta:object-count="0" meta:page-count="1" meta:paragraph-count="11" meta:word-count="74" meta:character-count="613" meta:non-whitespace-character-count="548"/>
  </office:meta>
</office:document-meta>
</file>