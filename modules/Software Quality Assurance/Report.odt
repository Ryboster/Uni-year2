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ffff" loext:opacity="100%" fo:font-size="13pt" fo:font-weight="normal" officeooo:paragraph-rsid="000379d7" fo:background-color="transparent"/>
    </style:style>
    <style:style style:name="P7" style:family="paragraph" style:parent-style-name="Standard">
      <style:paragraph-properties fo:text-align="start" style:justify-single-word="false"/>
      <style:text-properties fo:font-size="10.5pt" fo:font-weight="normal" officeooo:rsid="00070e4c" officeooo:paragraph-rsid="00070e4c"/>
    </style:style>
    <style:style style:name="T1" style:family="text">
      <style:text-properties officeooo:rsid="000379d7" style:font-size-asian="11.3500003814697pt" style:font-weight-asian="normal" style:font-size-complex="13pt" style:font-weight-complex="normal"/>
    </style:style>
    <style:style style:name="T2" style:family="text">
      <style:text-properties fo:font-family="'Droid Sans Mono', monospace" fo:font-size="10.5pt"/>
    </style:style>
    <style:style style:name="T3" style:family="text">
      <style:text-properties fo:color="#ffffff" loext:opacity="100%" fo:font-family="'Droid Sans Mono', monospace" fo:background-color="transparent" loext:char-shading-value="0"/>
    </style:style>
    <style:style style:name="T4" style:family="text">
      <style:text-properties officeooo:rsid="000a7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1.1(a) Dead Code</text:p>
      <text:p text:style-name="P6"><text:span text:style-name="T1">Initial examination reveals the following dead lines of code: 303, 310, 319. Those lines correspond to the following methods: </text:span><text:span text:style-name="T2">validate_priority, format_task_for_display, calculate_workload.</text:span></text:p>
      <text:p text:style-name="P7"><text:span text:style-name="T3">Additionally, render_template_string is imported but never used.</text:span></text:p>
      <text:p text:style-name="P5"/>
      <text:p text:style-name="P5"/>
      <text:p text:style-name="P5">1.1(b) <text:span text:style-name="T4">Comments suggesting incomplete workflow</text:span></text:p>
      <text:p text:style-name="P5"/>
      <text:p text:style-name="P5">1.1(c)</text:p>
      <text:p text:style-name="P5">1.1(d)</text:p>
      <text:p text:style-name="P5">1.1(e)</text:p>
      <text:p text:style-name="P5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19:33.647915658</dc:date>
    <meta:editing-duration>PT1H53M34S</meta:editing-duration>
    <meta:editing-cycles>9</meta:editing-cycles>
    <meta:document-statistic meta:table-count="0" meta:image-count="0" meta:object-count="0" meta:page-count="1" meta:paragraph-count="11" meta:word-count="55" meta:character-count="449" meta:non-whitespace-character-count="404"/>
  </office:meta>
</office:document-meta>
</file>