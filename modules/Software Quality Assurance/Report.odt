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47587"/>
    </style:style>
    <style:style style:name="T138" style:family="text">
      <style:text-properties officeooo:rsid="01a626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proves that </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2"/>
      <text:p text:style-name="P82"/>
      <text:p text:style-name="P81">These tests were chosen to test the core functionalities of the API. The functions being tested constitute the very core of the application. <text:span text:style-name="T137">If they were to fail silently, </text:span><text:span text:style-name="T138">the whole application would break, which justifies unit tests</text:span></text:p>
      <text:p text:style-name="P82"/>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23:40.092138391</dc:date>
    <meta:editing-duration>PT6H54M57S</meta:editing-duration>
    <meta:editing-cycles>335</meta:editing-cycles>
    <meta:document-statistic meta:table-count="0" meta:image-count="15" meta:object-count="0" meta:page-count="7" meta:paragraph-count="57" meta:word-count="1226" meta:character-count="8230" meta:non-whitespace-character-count="7047"/>
  </office:meta>
</office:document-meta>
</file>