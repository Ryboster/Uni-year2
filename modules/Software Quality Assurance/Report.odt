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70000012BDE73539F.png" manifest:media-type="image/png"/>
  <manifest:file-entry manifest:full-path="Pictures/1000000100000272000000ECFEA7B1B8.png" manifest:media-type="image/png"/>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40759c"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4fd8f0"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01ff5"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414e6c" style:font-style-asian="normal" style:font-style-complex="normal"/>
    </style:style>
    <style:style style:name="T111" style:family="text">
      <style:text-properties fo:font-style="normal" style:text-underline-style="none" officeooo:rsid="0145f3a0" style:font-style-asian="normal" style:font-style-complex="normal"/>
    </style:style>
    <style:style style:name="T112" style:family="text">
      <style:text-properties fo:font-style="normal" style:text-underline-style="none" officeooo:rsid="0146d432" style:font-style-asian="normal" style:font-style-complex="normal"/>
    </style:style>
    <style:style style:name="T113" style:family="text">
      <style:text-properties fo:font-style="normal" style:text-underline-style="none" officeooo:rsid="01501ff5" style:font-style-asian="normal" style:font-style-complex="normal"/>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login”, “/tasks”, “/tasks/&lt;id&gt;”</text:span><text:span text:style-name="T108">. Following are the rationale behind the </text:span><text:span text:style-name="T110">tests.</text:span></text:p>
      <text:p text:style-name="P66"/>
      <text:p text:style-name="P67"><text:span text:style-name="T108">First, a test of the “/login” endpoint was conducted due to the fact that the </text:span><text:span text:style-name="T111">development team is currently integrating authentication. To ensure that the implemented function can safely be integrated, the “/login” endpoint must be evaluated and proven to work, </text:span><text:span text:style-name="T112">i.e. that you can log in.</text:span></text:p>
      <text:p text:style-name="P68"/>
      <text:p text:style-name="P68"><draw:frame draw:style-name="fr5" draw:name="Image7" text:anchor-type="char" svg:width="17cm" svg:height="7.486cm" draw:z-index="6"><draw:image xlink:href="Pictures/10000001000002A70000012BDE73539F.png" xlink:type="simple" xlink:show="embed" xlink:actuate="onLoad" draw:mime-type="image/png"/></draw:frame></text:p>
      <text:p text:style-name="P68"/>
      <text:p text:style-name="P69"><text:span text:style-name="T108">Next, a test was conducted to ensure that incorrect credentials are met with an appropriate error response. </text:span><text:span text:style-name="T113">This is important as this proves that “/login” endpoint carries out actual authentication instead of just responding with 201.</text:span></text:p>
      <text:p text:style-name="P70"/>
      <text:p text:style-name="P68"><draw:frame draw:style-name="fr6" draw:name="Image8" text:anchor-type="char" svg:width="16.563cm" svg:height="6.244cm" draw:z-index="7"><draw:image xlink:href="Pictures/1000000100000272000000ECFEA7B1B8.png" xlink:type="simple" xlink:show="embed" xlink:actuate="onLoad" draw:mime-type="image/png"/></draw:frame></text:p>
      <text:p text:style-name="P71"><text:span text:style-name="T108">Lastly, a boundary test was conducted to </text:span></text:p>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9:51:27.517144212</dc:date>
    <meta:editing-duration>PT6H23M14S</meta:editing-duration>
    <meta:editing-cycles>275</meta:editing-cycles>
    <meta:document-statistic meta:table-count="0" meta:image-count="8" meta:object-count="0" meta:page-count="6" meta:paragraph-count="48" meta:word-count="969" meta:character-count="6574" meta:non-whitespace-character-count="5641"/>
  </office:meta>
</office:document-meta>
</file>