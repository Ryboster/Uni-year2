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7c0c72" officeooo:paragraph-rsid="007c0c7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7f15c3" officeooo:paragraph-rsid="007f15c3" fo:background-color="transparen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officeooo:paragraph-rsid="0020970b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71261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6be63c" officeooo:paragraph-rsid="006be63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64d8e3" style:font-size-asian="11.3500003814697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75c65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7c2e90"/>
    </style:style>
    <style:style style:name="T5" style:family="text">
      <style:text-properties officeooo:rsid="0034883b"/>
    </style:style>
    <style:style style:name="T6" style:family="text">
      <style:text-properties officeooo:rsid="0050a23e"/>
    </style:style>
    <style:style style:name="T7" style:family="text">
      <style:text-properties officeooo:rsid="004c1871"/>
    </style:style>
    <style:style style:name="T8" style:family="text">
      <style:text-properties officeooo:rsid="0016e436"/>
    </style:style>
    <style:style style:name="T9" style:family="text">
      <style:text-properties officeooo:rsid="001cb2f1"/>
    </style:style>
    <style:style style:name="T10" style:family="text">
      <style:text-properties officeooo:rsid="002505ed"/>
    </style:style>
    <style:style style:name="T11" style:family="text">
      <style:text-properties officeooo:rsid="002618e1"/>
    </style:style>
    <style:style style:name="T12" style:family="text">
      <style:text-properties officeooo:rsid="0053f89c"/>
    </style:style>
    <style:style style:name="T13" style:family="text">
      <style:text-properties officeooo:rsid="0052fe26"/>
    </style:style>
    <style:style style:name="T14" style:family="text">
      <style:text-properties fo:color="#ffffff" loext:opacity="100%" fo:font-weight="normal" officeooo:rsid="0020970b" fo:background-color="transparent" loext:char-shading-value="0"/>
    </style:style>
    <style:style style:name="T15" style:family="text">
      <style:text-properties fo:color="#ffffff" loext:opacity="100%" fo:font-weight="normal" officeooo:rsid="0021bc69" fo:background-color="transparent" loext:char-shading-value="0"/>
    </style:style>
    <style:style style:name="T16" style:family="text">
      <style:text-properties officeooo:rsid="0021bc69"/>
    </style:style>
    <style:style style:name="T17" style:family="text">
      <style:text-properties officeooo:rsid="00562ae4"/>
    </style:style>
    <style:style style:name="T18" style:family="text">
      <style:text-properties officeooo:rsid="0055c7b1"/>
    </style:style>
    <style:style style:name="T19" style:family="text">
      <style:text-properties officeooo:rsid="002bc841"/>
    </style:style>
    <style:style style:name="T20" style:family="text">
      <style:text-properties officeooo:rsid="003751e3"/>
    </style:style>
    <style:style style:name="T21" style:family="text">
      <style:text-properties officeooo:rsid="00391f21"/>
    </style:style>
    <style:style style:name="T22" style:family="text">
      <style:text-properties officeooo:rsid="003f50b5"/>
    </style:style>
    <style:style style:name="T23" style:family="text">
      <style:text-properties officeooo:rsid="0040684a"/>
    </style:style>
    <style:style style:name="T24" style:family="text">
      <style:text-properties officeooo:rsid="006163eb"/>
    </style:style>
    <style:style style:name="T25" style:family="text">
      <style:text-properties officeooo:rsid="00712611"/>
    </style:style>
    <style:style style:name="T26" style:family="text">
      <style:text-properties officeooo:rsid="0071dcf4"/>
    </style:style>
    <style:style style:name="T27" style:family="text">
      <style:text-properties officeooo:rsid="0072ed4e"/>
    </style:style>
    <style:style style:name="T28" style:family="text">
      <style:text-properties officeooo:rsid="0074eb40"/>
    </style:style>
    <style:style style:name="T29" style:family="text">
      <style:text-properties officeooo:rsid="0076b094"/>
    </style:style>
    <style:style style:name="T30" style:family="text">
      <style:text-properties officeooo:rsid="007a110e"/>
    </style:style>
    <style:style style:name="T31" style:family="text">
      <style:text-properties officeooo:rsid="00777ba6"/>
    </style:style>
    <style:style style:name="T32" style:family="text">
      <style:text-properties officeooo:rsid="005ac241"/>
    </style:style>
    <style:style style:name="T33" style:family="text">
      <style:text-properties officeooo:rsid="006f03da"/>
    </style:style>
    <style:style style:name="T34" style:family="text">
      <style:text-properties officeooo:rsid="00708cff"/>
    </style:style>
    <style:style style:name="T35" style:family="text">
      <style:text-properties officeooo:rsid="0064d8e3"/>
    </style:style>
    <style:style style:name="T36" style:family="text">
      <style:text-properties officeooo:rsid="0066dd6d"/>
    </style:style>
    <style:style style:name="T37" style:family="text">
      <style:text-properties officeooo:rsid="0068ef9c"/>
    </style:style>
    <style:style style:name="T38" style:family="text">
      <style:text-properties officeooo:rsid="00695487"/>
    </style:style>
    <style:style style:name="T39" style:family="text">
      <style:text-properties officeooo:rsid="006a7e30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>To prevent this in the future, pylint could be incorporated. <text:span text:style-name="T4">Pylint scanning could be carried out automatically in the CI/CD pipeline to catch and prune or integrate dead code before deployment. </text:span></text:p>
      <text:p text:style-name="P7"/>
      <text:p text:style-name="P9"/>
      <text:p text:style-name="P10"><text:span text:style-name="T1">B</text:span><text:span text:style-name="T5">.</text:span> <text:span text:style-name="T6">Query</text:span><text:span text:style-name="T7"> Inconsistencies</text:span></text:p>
      <text:p text:style-name="P11"/>
      <text:p text:style-name="P12">The codebase contains inconsistent SQL queries. <text:span text:style-name="T8">The “login” function uses string formatting in its query:</text:span></text:p>
      <text:p text:style-name="P13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4">, which is insecure, while the “get_task” function uses <text:span text:style-name="T9">context-</text:span>appropriate parameterised queries:</text:p>
      <text:p text:style-name="P15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3"/>
      <text:p text:style-name="P13"/>
      <text:p text:style-name="P16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7">.</text:p>
      <text:p text:style-name="P18"/>
      <text:p text:style-name="P19"><text:span text:style-name="T10">One other place where</text:span> string formatting <text:span text:style-name="T10">is </text:span>being used in place of parameterised queries <text:span text:style-name="T11">is the</text:span> “<text:span text:style-name="T10">search_tasks</text:span>” <text:span text:style-name="T11">function.</text:span></text:p>
      <text:p text:style-name="P19"/>
      <text:p text:style-name="P20"><text:soft-page-break/>To prevent this type of inconsistencies in the future, </text:p>
      <text:p text:style-name="P21"/>
      <text:p text:style-name="P21"/>
      <text:p text:style-name="P21"/>
      <text:p text:style-name="P21"/>
      <text:p text:style-name="P22"><text:span text:style-name="T12">C</text:span><text:span text:style-name="T5">.</text:span> <text:span text:style-name="T13">Input Validation Inconsistencies</text:span></text:p>
      <text:p text:style-name="P23"><text:span text:style-name="T14">Input validation inconsistencies were also found. </text:span><text:span text:style-name="T15">The “create_task”</text:span> <text:span text:style-name="T16">function validates input properly:</text:span></text:p>
      <text:p text:style-name="P24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8"/>
      <text:p text:style-name="P25"/>
      <text:p text:style-name="P26">, <text:span text:style-name="T16">while “update_task” does not:</text:span></text:p>
      <text:p text:style-name="P25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5"/>
      <text:p text:style-name="P25"/>
      <text:p text:style-name="P27"/>
      <text:p text:style-name="P27"/>
      <text:p text:style-name="P28">One other example of this is the “add_comment” function, where input is not being validated either.</text:p>
      <text:p text:style-name="P29"/>
      <text:p text:style-name="P29"><text:span text:style-name="T17">D</text:span><text:span text:style-name="T5">.</text:span> <text:span text:style-name="T18">Error-Handling</text:span><text:span text:style-name="T7"> Inconsistencies</text:span></text:p>
      <text:p text:style-name="P29"/>
      <text:p text:style-name="P30"><text:span text:style-name="T19">E</text:span>rror-handling inconsistencies <text:span text:style-name="T19">were found </text:span><text:span text:style-name="T20">as well. </text:span><text:span text:style-name="T21">Some functions like “get_task” incorporate proper error handling:</text:span></text:p>
      <text:p text:style-name="P30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30"/>
      <text:p text:style-name="P27"/>
      <text:p text:style-name="P27"/>
      <text:p text:style-name="P25"/>
      <text:p text:style-name="P25"/>
      <text:p text:style-name="P25"/>
      <text:p text:style-name="P25"/>
      <text:p text:style-name="P25"/>
      <text:p text:style-name="P31"/>
      <text:p text:style-name="P31"/>
      <text:p text:style-name="P32">, <text:span text:style-name="T22">while </text:span><text:span text:style-name="T23">other functions like “delete_task” do not:</text:span></text:p>
      <text:p text:style-name="P32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(Existence of record is never verified before deletion attempt – <text:span text:style-name="T24">This fails silently</text:span>).</text:p>
      <text:p text:style-name="P33"/>
      <text:p text:style-name="P33"><text:span text:style-name="T25">This quality issue could be prevented by </text:span><text:span text:style-name="T26">including error handling in each CRUD (Create, Read, Update, Delete) operation. Unit tests should be written to </text:span><text:span text:style-name="T27">test for known failure points. </text:span><text:span text:style-name="T28">Execution of said unit tests could be automated in the CI/CD pipeline </text:span><text:span text:style-name="T29">to catch </text:span><text:span text:style-name="T30">such inconsistencies</text:span><text:span text:style-name="T29"> before </text:span><text:span text:style-name="T31">deployment.</text:span><text:line-break/></text:p>
      <text:p text:style-name="P34"><text:soft-page-break/><text:span text:style-name="T32">E</text:span><text:span text:style-name="T5">.</text:span> <text:span text:style-name="T32">Authentication</text:span><text:span text:style-name="T7"> Inconsistencies</text:span></text:p>
      <text:p text:style-name="P35"/>
      <text:p text:style-name="P36">Authentication only exists at the /login endpoint. No other endpoint requires it. This effectively makes authentication a feature rather than a system-wide integration.</text:p>
      <text:p text:style-name="P37"/>
      <text:p text:style-name="P37">This quality issue could be prevented by integrating authentication system-wide. <text:span text:style-name="T33">Integration could be tested automatically with an enumeration script </text:span><text:span text:style-name="T34">that navigates to each endpoint without appropriate permissions. </text:span></text:p>
      <text:p text:style-name="P37"/>
      <text:p text:style-name="P32"/>
      <text:p text:style-name="P32"/>
      <text:p text:style-name="P38"><text:span text:style-name="T35">F</text:span><text:span text:style-name="T5">.</text:span> <text:span text:style-name="T36">No Database Error Handling</text:span></text:p>
      <text:p text:style-name="P32"/>
      <text:p text:style-name="P39">A<text:span text:style-name="T37">cross the entire file, not one database call includes error handling. If an error was to occur in a “db.execute” call, </text:span><text:span text:style-name="T38">the application would fail. </text:span><text:span text:style-name="T39">This could be remedied with try-except blocks. </text:span></text:p>
      <text:p text:style-name="P32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24:53.845315291</dc:date>
    <meta:editing-duration>PT2H58M7S</meta:editing-duration>
    <meta:editing-cycles>94</meta:editing-cycles>
    <meta:document-statistic meta:table-count="0" meta:image-count="6" meta:object-count="0" meta:page-count="3" meta:paragraph-count="28" meta:word-count="360" meta:character-count="2588" meta:non-whitespace-character-count="2248"/>
  </office:meta>
</office:document-meta>
</file>