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6163eb"/>
    </style:style>
    <style:style style:name="T24" style:family="text">
      <style:text-properties officeooo:rsid="00712611"/>
    </style:style>
    <style:style style:name="T25" style:family="text">
      <style:text-properties officeooo:rsid="0071dcf4"/>
    </style:style>
    <style:style style:name="T26" style:family="text">
      <style:text-properties officeooo:rsid="0072ed4e"/>
    </style:style>
    <style:style style:name="T27" style:family="text">
      <style:text-properties officeooo:rsid="0074eb40"/>
    </style:style>
    <style:style style:name="T28" style:family="text">
      <style:text-properties officeooo:rsid="0076b094"/>
    </style:style>
    <style:style style:name="T29" style:family="text">
      <style:text-properties officeooo:rsid="00777ba6"/>
    </style:style>
    <style:style style:name="T30" style:family="text">
      <style:text-properties officeooo:rsid="005ac241"/>
    </style:style>
    <style:style style:name="T31" style:family="text">
      <style:text-properties officeooo:rsid="006f03da"/>
    </style:style>
    <style:style style:name="T32" style:family="text">
      <style:text-properties officeooo:rsid="00708cff"/>
    </style:style>
    <style:style style:name="T33" style:family="text">
      <style:text-properties officeooo:rsid="0064d8e3"/>
    </style:style>
    <style:style style:name="T34" style:family="text">
      <style:text-properties officeooo:rsid="0066dd6d"/>
    </style:style>
    <style:style style:name="T35" style:family="text">
      <style:text-properties officeooo:rsid="0068ef9c"/>
    </style:style>
    <style:style style:name="T36" style:family="text">
      <style:text-properties officeooo:rsid="00695487"/>
    </style:style>
    <style:style style:name="T37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 – <text:span text:style-name="T23">This fails silently</text:span>).</text:p>
      <text:p text:style-name="P31"/>
      <text:p text:style-name="P31"><text:span text:style-name="T24">This quality issue could be prevented by </text:span><text:span text:style-name="T25">including error handling in each CRUD (Create, Read, Update, Delete) operation. Unit tests should be written to </text:span><text:span text:style-name="T26">test for known failure points. </text:span><text:span text:style-name="T27">Execution of said unit tests could be automated in the CI/CD pipeline </text:span><text:span text:style-name="T28">to catch errors before </text:span><text:span text:style-name="T29">deployment.</text:span><text:line-break/></text:p>
      <text:p text:style-name="P32"><text:span text:style-name="T30">E</text:span><text:span text:style-name="T4">.</text:span> <text:span text:style-name="T30">Authentication</text:span><text:span text:style-name="T6"> Inconsistencies</text:span></text:p>
      <text:p text:style-name="P33"/>
      <text:p text:style-name="P34">Authentication only exists at the /login endpoint. No other endpoint requires it. This effectively makes authentication a feature rather than a system-wide integration.</text:p>
      <text:p text:style-name="P35"/>
      <text:p text:style-name="P35"><text:soft-page-break/>This quality issue could be prevented by integrating authentication system-wide. <text:span text:style-name="T31">Integration could be tested automatically with an enumeration script </text:span><text:span text:style-name="T32">that navigates to each endpoint without appropriate permissions. </text:span></text:p>
      <text:p text:style-name="P35"/>
      <text:p text:style-name="P30"/>
      <text:p text:style-name="P30"/>
      <text:p text:style-name="P36"><text:span text:style-name="T33">F</text:span><text:span text:style-name="T4">.</text:span> <text:span text:style-name="T34">No Database Error Handling</text:span></text:p>
      <text:p text:style-name="P30"/>
      <text:p text:style-name="P37">A<text:span text:style-name="T35">cross the entire file, not one database call includes error handling. If an error was to occur in a “db.execute” call, </text:span><text:span text:style-name="T36">the application would fail. </text:span><text:span text:style-name="T37">This could be remedied with try-except blocks. </text:span>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21:00.963519485</dc:date>
    <meta:editing-duration>PT2H54M17S</meta:editing-duration>
    <meta:editing-cycles>89</meta:editing-cycles>
    <meta:document-statistic meta:table-count="0" meta:image-count="6" meta:object-count="0" meta:page-count="3" meta:paragraph-count="26" meta:word-count="319" meta:character-count="2324" meta:non-whitespace-character-count="2025"/>
  </office:meta>
</office:document-meta>
</file>