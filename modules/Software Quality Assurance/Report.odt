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A00000096462F6CF5.png" manifest:media-type="image/png"/>
  <manifest:file-entry manifest:full-path="Pictures/100000010000020800000030DA0392BE.png" manifest:media-type="image/png"/>
  <manifest:file-entry manifest:full-path="Pictures/10000001000001E20000005077C883AE.png" manifest:media-type="image/png"/>
  <manifest:file-entry manifest:full-path="Pictures/100000010000022D000000C8F7426F06.png" manifest:media-type="image/png"/>
  <manifest:file-entry manifest:full-path="Pictures/10000001000001E5000000C5A172BF24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a5b7" officeooo:paragraph-rsid="0002a5b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307859" officeooo:paragraph-rsid="00307859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21f5" officeooo:paragraph-rsid="000c21f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7c0c72" officeooo:paragraph-rsid="007c0c7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31f879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4976de" officeooo:paragraph-rsid="004976d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4f428" officeooo:paragraph-rsid="001ab48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ab48e" officeooo:paragraph-rsid="001ab48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9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38259" officeooo:paragraph-rsid="00238259" fo:background-color="transparent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7f15c3" officeooo:paragraph-rsid="007f15c3" fo:background-color="transparent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8ccfe4" officeooo:paragraph-rsid="008ccfe4" fo:background-color="transparent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0970b" officeooo:paragraph-rsid="0020970b" fo:background-color="transparent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2fe26" style:font-size-asian="11.3500003814697pt" style:font-weight-asian="bold" style:font-size-complex="13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officeooo:paragraph-rsid="0020970b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officeooo:paragraph-rsid="0020970b"/>
    </style:style>
    <style:style style:name="P26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379d7" officeooo:paragraph-rsid="000379d7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fo:font-weight="normal" officeooo:rsid="00238259" officeooo:paragraph-rsid="00238259" style:font-size-asian="11.3500003814697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a9cd0" officeooo:paragraph-rsid="002a9cd0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938a50" officeooo:paragraph-rsid="00938a5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5c7b1" style:font-size-asian="11.3500003814697pt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23825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379d7" style:font-size-asian="11.3500003814697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3f50b5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41a5d3" officeooo:paragraph-rsid="0071261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ac241" style:font-size-asian="11.3500003814697pt" style:font-weight-asian="bold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5b4218" officeooo:paragraph-rsid="005ac241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60f376" officeooo:paragraph-rsid="0060f376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6be63c" officeooo:paragraph-rsid="006be63c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64d8e3" style:font-size-asian="11.3500003814697pt" style:font-weight-asian="bold" style:font-size-complex="13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60f376" officeooo:paragraph-rsid="00675c65" style:font-size-asian="12pt" style:font-weight-asian="normal" style:font-size-complex="12pt" style:font-weight-complex="normal"/>
    </style:style>
    <style:style style:name="T1" style:family="text">
      <style:text-properties officeooo:rsid="004aeffb"/>
    </style:style>
    <style:style style:name="T2" style:family="text">
      <style:text-properties officeooo:rsid="0032f33d"/>
    </style:style>
    <style:style style:name="T3" style:family="text">
      <style:text-properties officeooo:rsid="000d801d"/>
    </style:style>
    <style:style style:name="T4" style:family="text">
      <style:text-properties officeooo:rsid="007c2e90"/>
    </style:style>
    <style:style style:name="T5" style:family="text">
      <style:text-properties officeooo:rsid="0034883b"/>
    </style:style>
    <style:style style:name="T6" style:family="text">
      <style:text-properties officeooo:rsid="0050a23e"/>
    </style:style>
    <style:style style:name="T7" style:family="text">
      <style:text-properties officeooo:rsid="004c1871"/>
    </style:style>
    <style:style style:name="T8" style:family="text">
      <style:text-properties officeooo:rsid="0016e436"/>
    </style:style>
    <style:style style:name="T9" style:family="text">
      <style:text-properties officeooo:rsid="001cb2f1"/>
    </style:style>
    <style:style style:name="T10" style:family="text">
      <style:text-properties officeooo:rsid="002505ed"/>
    </style:style>
    <style:style style:name="T11" style:family="text">
      <style:text-properties officeooo:rsid="002618e1"/>
    </style:style>
    <style:style style:name="T12" style:family="text">
      <style:text-properties officeooo:rsid="00859692"/>
    </style:style>
    <style:style style:name="T13" style:family="text">
      <style:text-properties officeooo:rsid="007f98fc"/>
    </style:style>
    <style:style style:name="T14" style:family="text">
      <style:text-properties officeooo:rsid="00859e12"/>
    </style:style>
    <style:style style:name="T15" style:family="text">
      <style:text-properties officeooo:rsid="0085eaae"/>
    </style:style>
    <style:style style:name="T16" style:family="text">
      <style:text-properties officeooo:rsid="00810935"/>
    </style:style>
    <style:style style:name="T17" style:family="text">
      <style:text-properties officeooo:rsid="0082656c"/>
    </style:style>
    <style:style style:name="T18" style:family="text">
      <style:text-properties officeooo:rsid="0083a7ab"/>
    </style:style>
    <style:style style:name="T19" style:family="text">
      <style:text-properties officeooo:rsid="008904ed"/>
    </style:style>
    <style:style style:name="T20" style:family="text">
      <style:text-properties officeooo:rsid="008a8014"/>
    </style:style>
    <style:style style:name="T21" style:family="text">
      <style:text-properties officeooo:rsid="008afd66"/>
    </style:style>
    <style:style style:name="T22" style:family="text">
      <style:text-properties officeooo:rsid="008c7445"/>
    </style:style>
    <style:style style:name="T23" style:family="text">
      <style:text-properties officeooo:rsid="00924a23"/>
    </style:style>
    <style:style style:name="T24" style:family="text">
      <style:text-properties officeooo:rsid="008fbd41"/>
    </style:style>
    <style:style style:name="T25" style:family="text">
      <style:text-properties officeooo:rsid="009060a1"/>
    </style:style>
    <style:style style:name="T26" style:family="text">
      <style:text-properties officeooo:rsid="0053f89c"/>
    </style:style>
    <style:style style:name="T27" style:family="text">
      <style:text-properties officeooo:rsid="0052fe26"/>
    </style:style>
    <style:style style:name="T28" style:family="text">
      <style:text-properties fo:color="#ffffff" loext:opacity="100%" fo:font-weight="normal" officeooo:rsid="0020970b" fo:background-color="transparent" loext:char-shading-value="0"/>
    </style:style>
    <style:style style:name="T29" style:family="text">
      <style:text-properties fo:color="#ffffff" loext:opacity="100%" fo:font-weight="normal" officeooo:rsid="0021bc69" fo:background-color="transparent" loext:char-shading-value="0"/>
    </style:style>
    <style:style style:name="T30" style:family="text">
      <style:text-properties officeooo:rsid="0021bc69"/>
    </style:style>
    <style:style style:name="T31" style:family="text">
      <style:text-properties officeooo:rsid="0093eaa6"/>
    </style:style>
    <style:style style:name="T32" style:family="text">
      <style:text-properties officeooo:rsid="0095e777"/>
    </style:style>
    <style:style style:name="T33" style:family="text">
      <style:text-properties officeooo:rsid="00964a69"/>
    </style:style>
    <style:style style:name="T34" style:family="text">
      <style:text-properties officeooo:rsid="00562ae4"/>
    </style:style>
    <style:style style:name="T35" style:family="text">
      <style:text-properties officeooo:rsid="0055c7b1"/>
    </style:style>
    <style:style style:name="T36" style:family="text">
      <style:text-properties officeooo:rsid="002bc841"/>
    </style:style>
    <style:style style:name="T37" style:family="text">
      <style:text-properties officeooo:rsid="003751e3"/>
    </style:style>
    <style:style style:name="T38" style:family="text">
      <style:text-properties officeooo:rsid="00391f21"/>
    </style:style>
    <style:style style:name="T39" style:family="text">
      <style:text-properties officeooo:rsid="003f50b5"/>
    </style:style>
    <style:style style:name="T40" style:family="text">
      <style:text-properties officeooo:rsid="0040684a"/>
    </style:style>
    <style:style style:name="T41" style:family="text">
      <style:text-properties officeooo:rsid="006163eb"/>
    </style:style>
    <style:style style:name="T42" style:family="text">
      <style:text-properties officeooo:rsid="00712611"/>
    </style:style>
    <style:style style:name="T43" style:family="text">
      <style:text-properties officeooo:rsid="0071dcf4"/>
    </style:style>
    <style:style style:name="T44" style:family="text">
      <style:text-properties officeooo:rsid="0072ed4e"/>
    </style:style>
    <style:style style:name="T45" style:family="text">
      <style:text-properties officeooo:rsid="0074eb40"/>
    </style:style>
    <style:style style:name="T46" style:family="text">
      <style:text-properties officeooo:rsid="0076b094"/>
    </style:style>
    <style:style style:name="T47" style:family="text">
      <style:text-properties officeooo:rsid="007a110e"/>
    </style:style>
    <style:style style:name="T48" style:family="text">
      <style:text-properties officeooo:rsid="00777ba6"/>
    </style:style>
    <style:style style:name="T49" style:family="text">
      <style:text-properties officeooo:rsid="005ac241"/>
    </style:style>
    <style:style style:name="T50" style:family="text">
      <style:text-properties officeooo:rsid="006f03da"/>
    </style:style>
    <style:style style:name="T51" style:family="text">
      <style:text-properties officeooo:rsid="00708cff"/>
    </style:style>
    <style:style style:name="T52" style:family="text">
      <style:text-properties officeooo:rsid="0064d8e3"/>
    </style:style>
    <style:style style:name="T53" style:family="text">
      <style:text-properties officeooo:rsid="0066dd6d"/>
    </style:style>
    <style:style style:name="T54" style:family="text">
      <style:text-properties officeooo:rsid="0068ef9c"/>
    </style:style>
    <style:style style:name="T55" style:family="text">
      <style:text-properties officeooo:rsid="00695487"/>
    </style:style>
    <style:style style:name="T56" style:family="text">
      <style:text-properties officeooo:rsid="006a7e30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2"/>
      <text:p text:style-name="P3"/>
      <text:p text:style-name="P4">1. Deliverable Management and Quality Impact</text:p>
      <text:p text:style-name="P4"/>
      <text:p text:style-name="P4">1.1. Preliminary Codebase Examination</text:p>
      <text:p text:style-name="P5"/>
      <text:p text:style-name="P6"><text:span text:style-name="T1">A</text:span><text:span text:style-name="T2">.</text:span> Dead Code</text:p>
      <text:p text:style-name="P5"/>
      <text:p text:style-name="P7">Initial examination reveals three dead functions; “validate_priority”, “format_task_for_display”, and “calculate_workload”. <text:span text:style-name="T3">A comment in “validate_priority” informs the user about this. This suggests that while validation logic was planned for and implemented, it was never integrated, suggesting rushed delivery.</text:span></text:p>
      <text:p text:style-name="P7"/>
      <text:p text:style-name="P7">“<text:span text:style-name="T3">flask.render_template_string” is imported but never used.</text:span></text:p>
      <text:p text:style-name="P7"/>
      <text:p text:style-name="P8">To prevent this in the future, pylint could be incorporated. <text:span text:style-name="T4">Pylint scanning could be carried out automatically in the CI/CD pipeline to catch and prune or integrate dead code before deployment. </text:span></text:p>
      <text:p text:style-name="P7"/>
      <text:p text:style-name="P9"/>
      <text:p text:style-name="P10"><text:span text:style-name="T1">B</text:span><text:span text:style-name="T5">.</text:span> <text:span text:style-name="T6">Query</text:span><text:span text:style-name="T7"> Inconsistencies</text:span></text:p>
      <text:p text:style-name="P11"/>
      <text:p text:style-name="P12">The codebase contains inconsistent SQL queries. <text:span text:style-name="T8">The “login” function uses string formatting in its query:</text:span></text:p>
      <text:p text:style-name="P13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14">, which is insecure, while the “get_task” function uses <text:span text:style-name="T9">context-</text:span>appropriate parameterised queries:</text:p>
      <text:p text:style-name="P15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13"/>
      <text:p text:style-name="P13"/>
      <text:p text:style-name="P16"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7">.</text:p>
      <text:p text:style-name="P18"/>
      <text:p text:style-name="P19"><text:span text:style-name="T10">One other place where</text:span> string formatting <text:span text:style-name="T10">is </text:span>being used in place of parameterised queries <text:span text:style-name="T11">is the</text:span> “<text:span text:style-name="T10">search_tasks</text:span>” <text:span text:style-name="T11">function.</text:span></text:p>
      <text:p text:style-name="P19"/>
      <text:p text:style-name="P20"><text:soft-page-break/>To prevent this type of inconsistenc<text:span text:style-name="T12">y</text:span> in the future, <text:span text:style-name="T13">an SQL injection </text:span><text:span text:style-name="T14">scanner</text:span><text:span text:style-name="T13"> could be </text:span><text:span text:style-name="T15">implemented</text:span><text:span text:style-name="T13">. </text:span><text:span text:style-name="T16">By iterating over each POST endpoint </text:span><text:span text:style-name="T17">and attempting to perform a relatively safe SQL injection, </text:span><text:span text:style-name="T18">such inconsistencies could be caught early and before deployment. </text:span><text:span text:style-name="T19">This </text:span><text:span text:style-name="T20">is vital b</text:span><text:span text:style-name="T21">ecause relying on string formatting carries the risk of the </text:span><text:span text:style-name="T22">irreversible</text:span><text:span text:style-name="T21"> loss of all data.</text:span></text:p>
      <text:p text:style-name="P20"/>
      <text:p text:style-name="P21">Additionally, to secure the database against the risk of data loss, backups should be ma<text:span text:style-name="T23">d</text:span>e periodically, <text:span text:style-name="T24">and a roll-back tool should be incorporated to </text:span><text:span text:style-name="T25">allow for remote restoration of data.</text:span></text:p>
      <text:p text:style-name="P21"/>
      <text:p text:style-name="P22"/>
      <text:p text:style-name="P23"><text:span text:style-name="T26">C</text:span><text:span text:style-name="T5">.</text:span> <text:span text:style-name="T27">Input Validation Inconsistencies</text:span></text:p>
      <text:p text:style-name="P24"><text:span text:style-name="T28">Input validation inconsistencies were also found. </text:span><text:span text:style-name="T29">The “create_task”</text:span> <text:span text:style-name="T30">function validates input properly:</text:span></text:p>
      <text:p text:style-name="P25"><draw:frame draw:style-name="fr3" draw:name="Image3" text:anchor-type="char" svg:width="13.758cm" svg:height="1.27cm" draw:z-index="2"><draw:image xlink:href="Pictures/100000010000020800000030DA0392BE.png" xlink:type="simple" xlink:show="embed" xlink:actuate="onLoad" draw:mime-type="image/png"/></draw:frame></text:p>
      <text:p text:style-name="P18"/>
      <text:p text:style-name="P26"/>
      <text:p text:style-name="P27">, <text:span text:style-name="T30">while “update_task” does not:</text:span></text:p>
      <text:p text:style-name="P26"><draw:frame draw:style-name="fr3" draw:name="Image4" text:anchor-type="char" svg:width="12.753cm" svg:height="2.117cm" draw:z-index="3"><draw:image xlink:href="Pictures/10000001000001E20000005077C883AE.png" xlink:type="simple" xlink:show="embed" xlink:actuate="onLoad" draw:mime-type="image/png"/></draw:frame></text:p>
      <text:p text:style-name="P26"/>
      <text:p text:style-name="P26"/>
      <text:p text:style-name="P28"/>
      <text:p text:style-name="P28"/>
      <text:p text:style-name="P29">One other example of this is the “add_comment” function, where input is not being validated either.</text:p>
      <text:p text:style-name="P29"/>
      <text:p text:style-name="P30">This type of inconsistency is relatively easy to test for and to prevent in the future. It can tested for with an enumeration tool that iterates over each POST <text:span text:style-name="T31">endpoint, attempting to </text:span><text:span text:style-name="T32">post incorrect or null data. </text:span><text:span text:style-name="T33">Prevention </text:span></text:p>
      <text:p text:style-name="P31"/>
      <text:p text:style-name="P31"><text:span text:style-name="T34">D</text:span><text:span text:style-name="T5">.</text:span> <text:span text:style-name="T35">Error-Handling</text:span><text:span text:style-name="T7"> Inconsistencies</text:span></text:p>
      <text:p text:style-name="P31"/>
      <text:p text:style-name="P32"><text:span text:style-name="T36">E</text:span>rror-handling inconsistencies <text:span text:style-name="T36">were found </text:span><text:span text:style-name="T37">as well. </text:span><text:span text:style-name="T38">Some functions like “get_task” incorporate proper error handling:</text:span></text:p>
      <text:p text:style-name="P32"><draw:frame draw:style-name="fr3" draw:name="Image5" text:anchor-type="char" svg:width="12.832cm" svg:height="5.212cm" draw:z-index="4"><draw:image xlink:href="Pictures/10000001000001E5000000C5A172BF24.png" xlink:type="simple" xlink:show="embed" xlink:actuate="onLoad" draw:mime-type="image/png"/></draw:frame></text:p>
      <text:p text:style-name="P32"/>
      <text:p text:style-name="P28"/>
      <text:p text:style-name="P28"/>
      <text:p text:style-name="P26"/>
      <text:p text:style-name="P26"/>
      <text:p text:style-name="P26"/>
      <text:p text:style-name="P26"/>
      <text:p text:style-name="P26"/>
      <text:p text:style-name="P33"/>
      <text:p text:style-name="P33"/>
      <text:p text:style-name="P34">, <text:span text:style-name="T39">while </text:span><text:span text:style-name="T40">other functions like “delete_task” do not:</text:span></text:p>
      <text:p text:style-name="P34"><draw:frame draw:style-name="fr3" draw:name="Image6" text:anchor-type="char" svg:width="13.811cm" svg:height="3.969cm" draw:z-index="5"><draw:image xlink:href="Pictures/100000010000020A00000096462F6CF5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5">(Existence of record is never verified before deletion attempt – <text:span text:style-name="T41">This fails silently</text:span>).</text:p>
      <text:p text:style-name="P35"/>
      <text:p text:style-name="P35"><text:span text:style-name="T42">This quality issue could be prevented by </text:span><text:span text:style-name="T43">including error handling in each CRUD (Create, Read, Update, Delete) operation. Unit tests should be written to </text:span><text:span text:style-name="T44">test for known failure points. </text:span><text:span text:style-name="T45">Execution of said unit tests could be automated in the CI/CD pipeline </text:span><text:span text:style-name="T46">to catch </text:span><text:span text:style-name="T47">such inconsistencies</text:span><text:span text:style-name="T46"> before </text:span><text:span text:style-name="T48">deployment.</text:span><text:line-break/></text:p>
      <text:p text:style-name="P36"><text:span text:style-name="T49">E</text:span><text:span text:style-name="T5">.</text:span> <text:span text:style-name="T49">Authentication</text:span><text:span text:style-name="T7"> Inconsistencies</text:span></text:p>
      <text:p text:style-name="P37"/>
      <text:p text:style-name="P38">Authentication only exists at the /login endpoint. No other endpoint requires it. This effectively makes authentication a feature rather than a system-wide integration.</text:p>
      <text:p text:style-name="P39"/>
      <text:p text:style-name="P39">This quality issue could be prevented by integrating authentication system-wide. <text:span text:style-name="T50">Integration could be tested automatically with an enumeration script </text:span><text:span text:style-name="T51">that navigates to each endpoint without appropriate permissions. </text:span></text:p>
      <text:p text:style-name="P39"/>
      <text:p text:style-name="P34"/>
      <text:p text:style-name="P34"/>
      <text:p text:style-name="P40"><text:span text:style-name="T52">F</text:span><text:span text:style-name="T5">.</text:span> <text:span text:style-name="T53">No Database Error Handling</text:span></text:p>
      <text:p text:style-name="P34"/>
      <text:p text:style-name="P41">A<text:span text:style-name="T54">cross the entire file, not one database call includes error handling. If an error was to occur in a “db.execute” call, </text:span><text:span text:style-name="T55">the application would fail. </text:span><text:span text:style-name="T56">This could be remedied with try-except blocks. </text:span></text:p>
      <text:p text:style-name="P34"/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6:31:02.891133192</dc:date>
    <meta:editing-duration>PT3H4M4S</meta:editing-duration>
    <meta:editing-cycles>117</meta:editing-cycles>
    <meta:document-statistic meta:table-count="0" meta:image-count="6" meta:object-count="0" meta:page-count="3" meta:paragraph-count="30" meta:word-count="477" meta:character-count="3313" meta:non-whitespace-character-count="2858"/>
  </office:meta>
</office:document-meta>
</file>