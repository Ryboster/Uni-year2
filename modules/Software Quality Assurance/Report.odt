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This could be remedied with try-except blocks. </text:span></text:p>
      <text:p text:style-name="P35"/>
      <text:p text:style-name="P35"/>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09:38.867672241</dc:date>
    <meta:editing-duration>PT3H42M24S</meta:editing-duration>
    <meta:editing-cycles>151</meta:editing-cycles>
    <meta:document-statistic meta:table-count="0" meta:image-count="6" meta:object-count="0" meta:page-count="3" meta:paragraph-count="33" meta:word-count="553" meta:character-count="3845" meta:non-whitespace-character-count="3318"/>
  </office:meta>
</office:document-meta>
</file>