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1" style:family="paragraph" style:parent-style-name="Standard" style:list-style-name="L3">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Formatting a regular string which could be an 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lask.render_template_string imported but unused.</text:p>
        </text:list-item>
      </text:list>
      <text:p text:style-name="P100"/>
      <text:p text:style-name="P92">Complexity Warnings</text:p>
      <text:list text:style-name="L3">
        <text:list-item>
          <text:p text:style-name="P101">Missing function or method docstring (missing-function-docstring)</text:p>
          <text:list>
            <text:list-item>
              <text:p text:style-name="P101"/>
            </text:list-item>
          </text:list>
        </text:list-item>
      </text:list>
      <text:p text:style-name="P91"><text:soft-page-break/></text:p>
      <text:p text:style-name="P91"/>
      <text:p text:style-name="P91"/>
      <text:p text:style-name="P90"/>
      <text:p text:style-name="P90"/>
      <text:p text:style-name="P90"/>
      <text:p text:style-name="P90"/>
      <text:p text:style-name="P90"/>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1:35:11.346286747</dc:date>
    <meta:editing-duration>PT8H5M58S</meta:editing-duration>
    <meta:editing-cycles>391</meta:editing-cycles>
    <meta:document-statistic meta:table-count="0" meta:image-count="19" meta:object-count="0" meta:page-count="10" meta:paragraph-count="73" meta:word-count="1477" meta:character-count="9852" meta:non-whitespace-character-count="8440"/>
  </office:meta>
</office:document-meta>
</file>