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style:text-underline-style="none" fo:font-weight="normal" officeooo:rsid="01f4b4e6" officeooo:paragraph-rsid="01f4b4e6"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officeooo:rsid="01f6aae2"/>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All of these would’ve gone uncaught if relying on unit testing or integration testing alone. <text:span text:style-name="T162">This showcases the utility of non-execution verification. It is used for </text:span></text:p>
      <text:p text:style-name="P90"/>
      <text:p text:style-name="P90"/>
      <text:p text:style-name="P90"/>
      <text:p text:style-name="P90"/>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41:38.822002132</dc:date>
    <meta:editing-duration>PT8H12M21S</meta:editing-duration>
    <meta:editing-cycles>400</meta:editing-cycles>
    <meta:document-statistic meta:table-count="0" meta:image-count="19" meta:object-count="0" meta:page-count="10" meta:paragraph-count="73" meta:word-count="1518" meta:character-count="10115" meta:non-whitespace-character-count="8662"/>
  </office:meta>
</office:document-meta>
</file>