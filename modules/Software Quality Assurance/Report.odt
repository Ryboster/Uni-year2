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7"/>
      <text:p text:style-name="P74"/>
      <text:p text:style-name="P78">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7" draw:name="Image15" text:anchor-type="char" svg:width="17cm" svg:height="8.925cm" draw:z-index="13"><draw:image xlink:href="Pictures/10000001000002A6000001648100D259.png" xlink:type="simple" xlink:show="embed" xlink:actuate="onLoad" draw:mime-type="image/png"/></draw:frame></text:p>
      <text:p text:style-name="P79"/>
      <text:p text:style-name="P79"/>
      <text:p text:style-name="P79"/>
      <text:p text:style-name="P79"/>
      <text:p text:style-name="P79"/>
      <text:p text:style-name="P79"/>
      <text:p text:style-name="P79"/>
      <text:p text:style-name="P79">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20:58.151530212</dc:date>
    <meta:editing-duration>PT6H52M17S</meta:editing-duration>
    <meta:editing-cycles>329</meta:editing-cycles>
    <meta:document-statistic meta:table-count="0" meta:image-count="15" meta:object-count="0" meta:page-count="7" meta:paragraph-count="54" meta:word-count="1171" meta:character-count="7893" meta:non-whitespace-character-count="6763"/>
  </office:meta>
</office:document-meta>
</file>