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3"/>
      <text:p text:style-name="P90"/>
      <text:p text:style-name="P90"/>
      <text:p text:style-name="P104">The tests cover 72% of the code. <text:span text:style-name="T166">Missing lines include 145, 190, 226, 244-247, 255-260, 266-276, 284-286, 294-298, 305-307, 312, 321-325, 331-334. </text:span></text:p>
      <text:p text:style-name="P104"/>
      <text:p text:style-name="P104"/>
      <text:p text:style-name="P104"><text:s/><text:span text:style-name="T166">Missing </text:span></text:p>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49:14.145745323</dc:date>
    <meta:editing-duration>PT8H19M53S</meta:editing-duration>
    <meta:editing-cycles>408</meta:editing-cycles>
    <meta:document-statistic meta:table-count="0" meta:image-count="20" meta:object-count="0" meta:page-count="10" meta:paragraph-count="76" meta:word-count="1583" meta:character-count="10562" meta:non-whitespace-character-count="9045"/>
  </office:meta>
</office:document-meta>
</file>