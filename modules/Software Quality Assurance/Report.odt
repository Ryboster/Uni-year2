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0E0000013BABDA1CAA.png" manifest:media-type="image/png"/>
  <manifest:file-entry manifest:full-path="Pictures/1000000100000466000000FE965E3CDE.png" manifest:media-type="image/png"/>
  <manifest:file-entry manifest:full-path="Pictures/10000001000002BF000001E8AEEAFC08.png" manifest:media-type="image/png"/>
  <manifest:file-entry manifest:full-path="Pictures/100000010000023E0000014916B8939E.png" manifest:media-type="image/png"/>
  <manifest:file-entry manifest:full-path="Pictures/10000001000001E5000000C5A172BF24.png" manifest:media-type="image/png"/>
  <manifest:file-entry manifest:full-path="Pictures/10000001000002AE00000071B6E4150B.png" manifest:media-type="image/png"/>
  <manifest:file-entry manifest:full-path="Pictures/100000010000022D000000C8F7426F06.png" manifest:media-type="image/png"/>
  <manifest:file-entry manifest:full-path="Pictures/10000001000001E20000005077C883AE.png" manifest:media-type="image/png"/>
  <manifest:file-entry manifest:full-path="Pictures/100000010000027A000001066ECD5BB4.png" manifest:media-type="image/png"/>
  <manifest:file-entry manifest:full-path="Pictures/10000001000001EA000000D4A8118BA5.png" manifest:media-type="image/png"/>
  <manifest:file-entry manifest:full-path="Pictures/100000010000026A000000ED2D43131D.png" manifest:media-type="image/png"/>
  <manifest:file-entry manifest:full-path="Pictures/100000010000020800000030DA0392BE.png" manifest:media-type="image/png"/>
  <manifest:file-entry manifest:full-path="Pictures/100000010000020A00000096462F6CF5.png" manifest:media-type="image/png"/>
  <manifest:file-entry manifest:full-path="Pictures/100000010000020000000114D5F44112.png" manifest:media-type="image/png"/>
  <manifest:file-entry manifest:full-path="Pictures/10000001000001F3000000CD67D27DDF.png" manifest:media-type="image/png"/>
  <manifest:file-entry manifest:full-path="Pictures/10000001000002C50000010D638F523D.png" manifest:media-type="image/png"/>
  <manifest:file-entry manifest:full-path="Pictures/100000010000035100000126A317F146.png" manifest:media-type="image/png"/>
  <manifest:file-entry manifest:full-path="Pictures/10000001000002A6000001648100D259.png" manifest:media-type="image/png"/>
  <manifest:file-entry manifest:full-path="Pictures/10000001000001C2000000D444FA64E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02a5b7" officeooo:paragraph-rsid="0002a5b7"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8pt" fo:font-weight="bold" officeooo:rsid="0002a5b7" officeooo:paragraph-rsid="0002a5b7" style:font-size-asian="28pt" style:font-weight-asian="bold" style:font-size-complex="28pt" style:font-weight-complex="bold"/>
    </style:style>
    <style:style style:name="P3" style:family="paragraph" style:parent-style-name="Standard">
      <style:paragraph-properties fo:text-align="start" style:justify-single-word="false"/>
      <style:text-properties fo:font-size="13pt" fo:font-weight="bold" officeooo:rsid="0002a5b7" officeooo:paragraph-rsid="0002a5b7"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font-size="15pt" fo:font-weight="bold" officeooo:rsid="0002df3a" officeooo:paragraph-rsid="0002df3a" style:font-size-asian="15pt" style:font-weight-asian="bold" style:font-size-complex="15pt" style:font-weight-complex="bold"/>
    </style:style>
    <style:style style:name="P5" style:family="paragraph" style:parent-style-name="Standard">
      <style:paragraph-properties fo:text-align="start" style:justify-single-word="false"/>
      <style:text-properties fo:font-size="13pt" fo:font-weight="normal" officeooo:rsid="0002df3a" officeooo:paragraph-rsid="0002df3a"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bold" officeooo:rsid="00307859" officeooo:paragraph-rsid="00307859"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fo:font-size="12pt" fo:font-weight="normal" officeooo:rsid="000c21f5" officeooo:paragraph-rsid="000c21f5"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7c0c72" officeooo:paragraph-rsid="007c0c72"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3pt" fo:font-weight="normal" officeooo:rsid="000c21f5" officeooo:paragraph-rsid="000c21f5"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bold" officeooo:rsid="0031f879" officeooo:paragraph-rsid="0031f879"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fo:font-size="12pt" fo:font-weight="normal" officeooo:rsid="004976de" officeooo:paragraph-rsid="004976d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4f428" officeooo:paragraph-rsid="001ab48e"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3pt" fo:font-weight="normal" officeooo:rsid="0014f428" officeooo:paragraph-rsid="001ab48e"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2pt" fo:font-weight="normal" officeooo:rsid="001ab48e" officeooo:paragraph-rsid="001ab48e"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3pt" fo:font-weight="normal" officeooo:rsid="001ab48e" officeooo:paragraph-rsid="001ab48e"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fo:font-weight="normal" officeooo:rsid="0016e436" officeooo:paragraph-rsid="001ab48e"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fo:font-weight="normal" officeooo:rsid="0010f62b" officeooo:paragraph-rsid="001ab48e"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color="#ffffff" loext:opacity="100%" style:font-name="Droid Sans Mono" fo:font-size="10.5pt" fo:font-weight="normal" officeooo:rsid="00070e4c" officeooo:paragraph-rsid="0002df3a" fo:background-color="transparent"/>
    </style:style>
    <style:style style:name="P19" style:family="paragraph" style:parent-style-name="Standard">
      <style:paragraph-properties fo:text-align="start" style:justify-single-word="false"/>
      <style:text-properties fo:color="#ffffff" loext:opacity="100%" style:font-name="Liberation Serif" fo:font-size="12pt" fo:font-weight="normal" officeooo:rsid="00238259" officeooo:paragraph-rsid="00238259" fo:background-color="transparent" style:font-size-asian="12pt" style:font-size-complex="12pt"/>
    </style:style>
    <style:style style:name="P20" style:family="paragraph" style:parent-style-name="Standard">
      <style:paragraph-properties fo:text-align="start" style:justify-single-word="false"/>
      <style:text-properties fo:color="#ffffff" loext:opacity="100%" style:font-name="Liberation Serif" fo:font-size="12pt" fo:font-weight="normal" officeooo:rsid="007f15c3" officeooo:paragraph-rsid="007f15c3" fo:background-color="transparent" style:font-size-asian="12pt" style:font-size-complex="12pt"/>
    </style:style>
    <style:style style:name="P21" style:family="paragraph" style:parent-style-name="Standard">
      <style:paragraph-properties fo:text-align="start" style:justify-single-word="false"/>
      <style:text-properties fo:color="#ffffff" loext:opacity="100%" style:font-name="Liberation Serif" fo:font-size="12pt" fo:font-weight="normal" officeooo:rsid="009c9a60" officeooo:paragraph-rsid="009f9c12" fo:background-color="transparent" style:font-size-asian="12pt" style:font-size-complex="12pt"/>
    </style:style>
    <style:style style:name="P22" style:family="paragraph" style:parent-style-name="Standard">
      <style:paragraph-properties fo:text-align="start" style:justify-single-word="false"/>
      <style:text-properties fo:color="#ffffff" loext:opacity="100%" style:font-name="Liberation Serif" fo:font-size="12pt" fo:font-weight="normal" officeooo:rsid="008ccfe4" officeooo:paragraph-rsid="008ccfe4" fo:background-color="transparent" style:font-size-asian="12pt" style:font-size-complex="12pt"/>
    </style:style>
    <style:style style:name="P23" style:family="paragraph" style:parent-style-name="Standard">
      <style:paragraph-properties fo:text-align="start" style:justify-single-word="false"/>
      <style:text-properties fo:color="#ffffff" loext:opacity="100%" style:font-name="Liberation Serif" fo:font-size="12pt" fo:font-weight="normal" officeooo:rsid="0020970b" officeooo:paragraph-rsid="0020970b" fo:background-color="transparent" style:font-size-asian="12pt" style:font-size-complex="12pt"/>
    </style:style>
    <style:style style:name="P24" style:family="paragraph" style:parent-style-name="Standard">
      <style:paragraph-properties fo:text-align="start" style:justify-single-word="false"/>
      <style:text-properties fo:font-size="13pt" fo:font-weight="bold" officeooo:rsid="0031f879" officeooo:paragraph-rsid="0052fe26" style:font-size-asian="11.3500003814697pt" style:font-weight-asian="bold" style:font-size-complex="13pt" style:font-weight-complex="bold"/>
    </style:style>
    <style:style style:name="P25" style:family="paragraph" style:parent-style-name="Standard">
      <style:paragraph-properties fo:text-align="start" style:justify-single-word="false"/>
      <style:text-properties style:font-name="Liberation Serif" fo:font-size="12pt" officeooo:paragraph-rsid="0020970b" style:font-size-asian="12pt" style:font-size-complex="12pt"/>
    </style:style>
    <style:style style:name="P26" style:family="paragraph" style:parent-style-name="Standard">
      <style:paragraph-properties fo:text-align="start" style:justify-single-word="false"/>
      <style:text-properties officeooo:paragraph-rsid="0020970b"/>
    </style:style>
    <style:style style:name="P27" style:family="paragraph" style:parent-style-name="Standard">
      <style:paragraph-properties fo:text-align="start" style:justify-single-word="false"/>
      <style:text-properties fo:font-size="13pt" fo:font-weight="normal" officeooo:rsid="000379d7" officeooo:paragraph-rsid="000379d7"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fo:font-size="12pt" fo:font-weight="normal" officeooo:rsid="000379d7" officeooo:paragraph-rsid="000379d7"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3pt" fo:font-weight="normal" officeooo:rsid="00238259" officeooo:paragraph-rsid="00238259"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fo:font-size="12pt" fo:font-weight="normal" officeooo:rsid="002a9cd0" officeooo:paragraph-rsid="002a9cd0"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9864ff" officeooo:paragraph-rsid="009864ff"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3pt" fo:font-weight="bold" officeooo:rsid="0031f879" officeooo:paragraph-rsid="0055c7b1" style:font-size-asian="11.3500003814697pt" style:font-weight-asian="bold" style:font-size-complex="13pt" style:font-weight-complex="bold"/>
    </style:style>
    <style:style style:name="P33" style:family="paragraph" style:parent-style-name="Standard">
      <style:paragraph-properties fo:text-align="start" style:justify-single-word="false"/>
      <style:text-properties fo:font-size="12pt" fo:font-weight="normal" officeooo:rsid="00238259" officeooo:paragraph-rsid="00238259"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3pt" fo:font-weight="normal" officeooo:rsid="0002df3a" officeooo:paragraph-rsid="000379d7" style:font-size-asian="11.3500003814697pt" style:font-weight-asian="normal" style:font-size-complex="13pt" style:font-weight-complex="normal"/>
    </style:style>
    <style:style style:name="P35" style:family="paragraph" style:parent-style-name="Standard">
      <style:paragraph-properties fo:text-align="start" style:justify-single-word="false"/>
      <style:text-properties fo:font-size="12pt" fo:font-weight="normal" officeooo:rsid="00238259" officeooo:paragraph-rsid="003f50b5"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41a5d3" officeooo:paragraph-rsid="00b52751"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41a5d3" officeooo:paragraph-rsid="00712611"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3pt" fo:font-weight="bold" officeooo:rsid="0031f879" officeooo:paragraph-rsid="005ac241" style:font-size-asian="11.3500003814697pt" style:font-weight-asian="bold" style:font-size-complex="13pt" style:font-weight-complex="bold"/>
    </style:style>
    <style:style style:name="P39" style:family="paragraph" style:parent-style-name="Standard">
      <style:paragraph-properties fo:text-align="start" style:justify-single-word="false"/>
      <style:text-properties fo:font-size="12pt" fo:font-weight="normal" officeooo:rsid="005b4218" officeooo:paragraph-rsid="005ac241"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60f376" officeooo:paragraph-rsid="0060f376"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6be63c" officeooo:paragraph-rsid="006be63c"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6be63c" officeooo:paragraph-rsid="00b85358"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b85358" officeooo:paragraph-rsid="00b85358"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3pt" fo:font-weight="bold" officeooo:rsid="0031f879" officeooo:paragraph-rsid="0064d8e3" style:font-size-asian="11.3500003814697pt" style:font-weight-asian="bold" style:font-size-complex="13pt" style:font-weight-complex="bold"/>
    </style:style>
    <style:style style:name="P45" style:family="paragraph" style:parent-style-name="Standard">
      <style:paragraph-properties fo:text-align="start" style:justify-single-word="false"/>
      <style:text-properties fo:font-size="12pt" fo:font-weight="normal" officeooo:rsid="0060f376" officeooo:paragraph-rsid="00675c65"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be2c4d" officeooo:paragraph-rsid="00d36685"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d36685" officeooo:paragraph-rsid="00d36685"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font-size="13pt" fo:font-weight="bold" officeooo:rsid="0031f879" officeooo:paragraph-rsid="00d62d33" style:font-size-asian="11.3500003814697pt" style:font-weight-asian="bold" style:font-size-complex="13pt" style:font-weight-complex="bold"/>
    </style:style>
    <style:style style:name="P49" style:family="paragraph" style:parent-style-name="Standard">
      <style:paragraph-properties fo:text-align="start" style:justify-single-word="false"/>
      <style:text-properties fo:font-size="12pt" fo:font-weight="normal" officeooo:rsid="00be2c4d" officeooo:paragraph-rsid="00dce7d5"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e10b8b" officeooo:paragraph-rsid="00e10b8b"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style="normal" style:text-underline-style="none" fo:font-weight="normal" officeooo:rsid="00e31117" officeooo:paragraph-rsid="00e31117"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2pt" fo:font-style="normal" style:text-underline-style="none" fo:font-weight="normal" officeooo:rsid="00f00ef9" officeooo:paragraph-rsid="00f07ecf"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ize="13pt" fo:font-weight="bold" officeooo:rsid="0031f879" officeooo:paragraph-rsid="00feb589" style:font-size-asian="11.3500003814697pt" style:font-weight-asian="bold" style:font-size-complex="13pt" style:font-weight-complex="bold"/>
    </style:style>
    <style:style style:name="P54" style:family="paragraph" style:parent-style-name="Standard">
      <style:paragraph-properties fo:text-align="start" style:justify-single-word="false"/>
      <style:text-properties fo:font-size="12pt" fo:font-style="normal" style:text-underline-style="none" fo:font-weight="normal" officeooo:rsid="00f00ef9" officeooo:paragraph-rsid="0100c40f"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size="12pt" fo:font-style="normal" style:text-underline-style="none" fo:font-weight="normal" officeooo:rsid="0102978e" officeooo:paragraph-rsid="0102978e"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size="12pt" fo:font-style="normal" style:text-underline-style="none" fo:font-weight="normal" officeooo:rsid="01088ed4" officeooo:paragraph-rsid="01088ed4"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font-style="normal" style:text-underline-style="none" fo:font-weight="normal" officeooo:rsid="01088ed4" officeooo:paragraph-rsid="0119bb98"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font-style="normal" style:text-underline-style="none" fo:font-weight="normal" officeooo:rsid="011a5e9b" officeooo:paragraph-rsid="011a5e9b"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size="12pt" fo:font-style="normal" style:text-underline-style="none" fo:font-weight="normal" officeooo:rsid="01200cbd" officeooo:paragraph-rsid="012ae7e8"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size="12pt" fo:font-style="normal" style:text-underline-style="none" fo:font-weight="normal" officeooo:rsid="01200cbd" officeooo:paragraph-rsid="01200cbd"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size="15pt" fo:font-weight="bold" officeooo:rsid="0002df3a" officeooo:paragraph-rsid="012d82e6" style:font-size-asian="15pt" style:font-weight-asian="bold" style:font-size-complex="15pt" style:font-weight-complex="bold"/>
    </style:style>
    <style:style style:name="P62" style:family="paragraph" style:parent-style-name="Standard">
      <style:paragraph-properties fo:text-align="start" style:justify-single-word="false"/>
      <style:text-properties fo:font-size="13pt" fo:font-weight="bold" officeooo:rsid="0002df3a" officeooo:paragraph-rsid="012d82e6" style:font-size-asian="11.3500003814697pt" style:font-weight-asian="bold" style:font-size-complex="13pt" style:font-weight-complex="bold"/>
    </style:style>
    <style:style style:name="P63" style:family="paragraph" style:parent-style-name="Standard">
      <style:paragraph-properties fo:text-align="start" style:justify-single-word="false"/>
      <style:text-properties fo:font-size="13pt" fo:font-weight="bold" officeooo:rsid="0031f879" officeooo:paragraph-rsid="013a9a9f" style:font-size-asian="11.3500003814697pt" style:font-weight-asian="bold" style:font-size-complex="13pt" style:font-weight-complex="bold"/>
    </style:style>
    <style:style style:name="P64" style:family="paragraph" style:parent-style-name="Standard">
      <style:paragraph-properties fo:text-align="start" style:justify-single-word="false"/>
      <style:text-properties fo:font-size="12pt" fo:font-style="normal" style:text-underline-style="none" fo:font-weight="normal" officeooo:rsid="01200cbd" officeooo:paragraph-rsid="013f43c5"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fo:font-size="12pt" fo:font-weight="normal" officeooo:rsid="0140759c" officeooo:paragraph-rsid="01962295" style:font-size-asian="12pt" style:font-weight-asian="normal" style:font-size-complex="12pt" style:font-weight-complex="normal"/>
    </style:style>
    <style:style style:name="P66" style:family="paragraph" style:parent-style-name="Standard">
      <style:paragraph-properties fo:text-align="start" style:justify-single-word="false"/>
      <style:text-properties fo:font-size="12pt" fo:font-style="normal" style:text-underline-style="none" fo:font-weight="normal" officeooo:rsid="0145d1c3" officeooo:paragraph-rsid="0145d1c3" style:font-size-asian="12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fo:font-size="12pt" fo:font-weight="normal" officeooo:rsid="0145d1c3" officeooo:paragraph-rsid="0145f3a0" style:font-size-asian="12pt" style:font-weight-asian="normal" style:font-size-complex="12pt" style:font-weight-complex="normal"/>
    </style:style>
    <style:style style:name="P68" style:family="paragraph" style:parent-style-name="Standard">
      <style:paragraph-properties fo:text-align="start" style:justify-single-word="false"/>
      <style:text-properties fo:font-size="13pt" fo:font-weight="bold" officeooo:rsid="013efe32" officeooo:paragraph-rsid="013efe32" style:font-size-asian="11.3500003814697pt" style:font-weight-asian="bold" style:font-size-complex="13pt" style:font-weight-complex="bold"/>
    </style:style>
    <style:style style:name="P69" style:family="paragraph" style:parent-style-name="Standard">
      <style:paragraph-properties fo:text-align="start" style:justify-single-word="false"/>
      <style:text-properties fo:font-size="12pt" fo:font-weight="normal" officeooo:rsid="014fd8f0" officeooo:paragraph-rsid="019759b4" style:font-size-asian="12pt" style:font-weight-asian="normal" style:font-size-complex="12pt" style:font-weight-complex="normal"/>
    </style:style>
    <style:style style:name="P70" style:family="paragraph" style:parent-style-name="Standard">
      <style:paragraph-properties fo:text-align="start" style:justify-single-word="false"/>
      <style:text-properties fo:font-size="12pt" fo:font-style="normal" style:text-underline-style="none" fo:font-weight="normal" officeooo:rsid="01542813" officeooo:paragraph-rsid="014fd8f0" style:font-size-asian="12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fo:font-size="12pt" fo:font-weight="normal" officeooo:rsid="01542813" officeooo:paragraph-rsid="01542813" style:font-size-asian="12pt" style:font-weight-asian="normal" style:font-size-complex="12pt" style:font-weight-complex="normal"/>
    </style:style>
    <style:style style:name="P72" style:family="paragraph" style:parent-style-name="Standard">
      <style:paragraph-properties fo:text-align="start" style:justify-single-word="false"/>
      <style:text-properties fo:font-size="12pt" fo:font-style="normal" style:text-underline-style="none" fo:font-weight="normal" officeooo:rsid="0158aafe" officeooo:paragraph-rsid="01542813" style:font-size-asian="12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fo:font-size="12pt" fo:font-style="normal" style:text-underline-style="none" fo:font-weight="normal" officeooo:rsid="0162ae01" officeooo:paragraph-rsid="01992c8b" style:font-size-asian="12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fo:font-size="12pt" fo:font-style="normal" style:text-underline-style="none" fo:font-weight="normal" officeooo:rsid="01542813" officeooo:paragraph-rsid="015b817c" style:font-size-asian="12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fo:font-size="12pt" fo:font-style="normal" style:text-underline-style="none" fo:font-weight="normal" officeooo:rsid="01827db3" officeooo:paragraph-rsid="01827db3" style:font-size-asian="12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fo:font-size="12pt" fo:font-style="normal" style:text-underline-style="none" fo:font-weight="normal" officeooo:rsid="018d21f6" officeooo:paragraph-rsid="018d21f6" style:font-size-asian="12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fo:font-size="12pt" fo:font-style="normal" style:text-underline-style="none" fo:font-weight="normal" officeooo:rsid="0194cd1f" officeooo:paragraph-rsid="01992c8b" style:font-size-asian="12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fo:font-size="12pt" fo:font-style="normal" style:text-underline-style="none" fo:font-weight="normal" officeooo:rsid="01542813" officeooo:paragraph-rsid="01992c8b" style:font-size-asian="12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fo:font-size="12pt" fo:font-style="normal" style:text-underline-style="none" fo:font-weight="normal" officeooo:rsid="019f4c05" officeooo:paragraph-rsid="019f4c05" style:font-size-asian="12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fo:font-size="12pt" fo:font-style="normal" style:text-underline-style="none" fo:font-weight="normal" officeooo:rsid="01a2e16a" officeooo:paragraph-rsid="015b817c" style:font-size-asian="12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fo:font-size="12pt" fo:font-style="normal" style:text-underline-style="none" fo:font-weight="normal" officeooo:rsid="01a2e16a" officeooo:paragraph-rsid="01a2e16a" style:font-size-asian="12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fo:font-size="12pt" fo:font-style="normal" style:text-underline-style="none" fo:font-weight="normal" officeooo:rsid="018aec95" officeooo:paragraph-rsid="018aec95" style:font-size-asian="12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fo:font-size="12pt" fo:font-style="normal" style:text-underline-style="none" fo:font-weight="normal" officeooo:rsid="01a98ae7" officeooo:paragraph-rsid="01a98ae7" style:font-size-asian="12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fo:font-size="13pt" fo:font-weight="bold" officeooo:rsid="0031f879" officeooo:paragraph-rsid="01b173b4" style:font-size-asian="11.3500003814697pt" style:font-weight-asian="bold" style:font-size-complex="13pt" style:font-weight-complex="bold"/>
    </style:style>
    <style:style style:name="P85" style:family="paragraph" style:parent-style-name="Standard">
      <style:paragraph-properties fo:text-align="start" style:justify-single-word="false"/>
      <style:text-properties fo:font-size="12pt" fo:font-style="normal" style:text-underline-style="none" fo:font-weight="normal" officeooo:rsid="01b921bd" officeooo:paragraph-rsid="01b921bd" style:font-size-asian="12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fo:font-size="12pt" fo:font-style="normal" style:text-underline-style="none" fo:font-weight="normal" officeooo:rsid="01b921bd" officeooo:paragraph-rsid="01bfee32" style:font-size-asian="12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fo:font-size="12pt" fo:font-style="normal" style:text-underline-style="none" fo:font-weight="normal" officeooo:rsid="01b921bd" officeooo:paragraph-rsid="01c32546" style:font-size-asian="12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fo:font-size="12pt" fo:font-style="normal" style:text-underline-style="none" fo:font-weight="normal" officeooo:rsid="01c64320" officeooo:paragraph-rsid="01c64320" style:font-size-asian="12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fo:font-size="13pt" fo:font-weight="bold" officeooo:rsid="0031f879" officeooo:paragraph-rsid="01d214b4" style:font-size-asian="11.3500003814697pt" style:font-weight-asian="bold" style:font-size-complex="13pt" style:font-weight-complex="bold"/>
    </style:style>
    <style:style style:name="P90" style:family="paragraph" style:parent-style-name="Standard">
      <style:paragraph-properties fo:text-align="start" style:justify-single-word="false"/>
      <style:text-properties fo:font-size="12pt" fo:font-style="normal" style:text-underline-style="none" fo:font-weight="normal" officeooo:rsid="01c64320" officeooo:paragraph-rsid="01d79a95" style:font-size-asian="12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fo:font-size="12pt" fo:font-style="normal" style:text-underline-style="none" fo:font-weight="normal" officeooo:rsid="01d79a95" officeooo:paragraph-rsid="01d79a95" style:font-size-asian="12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fo:font-size="12pt" fo:font-style="normal" style:text-underline-style="none" fo:font-weight="bold" officeooo:rsid="01dd3514" officeooo:paragraph-rsid="01dd3514" style:font-size-asian="12pt" style:font-style-asian="normal" style:font-weight-asian="bold" style:font-size-complex="12pt" style:font-style-complex="normal" style:font-weight-complex="bold"/>
    </style:style>
    <style:style style:name="P93" style:family="paragraph" style:parent-style-name="Standard" style:list-style-name="L1">
      <style:paragraph-properties fo:text-align="start" style:justify-single-word="false"/>
      <style:text-properties fo:font-size="12pt" fo:font-style="normal" style:text-underline-style="none" fo:font-weight="normal" officeooo:rsid="01dfbce9" officeooo:paragraph-rsid="01e63bcd" style:font-size-asian="12pt" style:font-style-asian="normal" style:font-weight-asian="normal" style:font-size-complex="12pt" style:font-style-complex="normal" style:font-weight-complex="normal"/>
    </style:style>
    <style:style style:name="P94" style:family="paragraph" style:parent-style-name="Standard" style:list-style-name="L1">
      <style:paragraph-properties fo:text-align="start" style:justify-single-word="false"/>
      <style:text-properties fo:font-size="12pt" fo:font-style="normal" style:text-underline-style="none" fo:font-weight="normal" officeooo:rsid="01dfbce9" officeooo:paragraph-rsid="01dfbce9" style:font-size-asian="12pt" style:font-style-asian="normal" style:font-weight-asian="normal" style:font-size-complex="12pt" style:font-style-complex="normal" style:font-weight-complex="normal"/>
    </style:style>
    <style:style style:name="P95" style:family="paragraph" style:parent-style-name="Standard" style:list-style-name="L1">
      <style:paragraph-properties fo:text-align="start" style:justify-single-word="false"/>
      <style:text-properties fo:font-size="12pt" fo:font-style="normal" style:text-underline-style="none" fo:font-weight="normal" officeooo:rsid="01e4743a" officeooo:paragraph-rsid="01e4743a" style:font-size-asian="12pt" style:font-style-asian="normal" style:font-weight-asian="normal" style:font-size-complex="12pt" style:font-style-complex="normal" style:font-weight-complex="normal"/>
    </style:style>
    <style:style style:name="P96" style:family="paragraph" style:parent-style-name="Standard">
      <style:paragraph-properties fo:text-align="start" style:justify-single-word="false"/>
      <style:text-properties fo:font-size="12pt" fo:font-style="normal" style:text-underline-style="none" fo:font-weight="normal" officeooo:rsid="01dd3514" officeooo:paragraph-rsid="01dd3514" style:font-size-asian="12pt" style:font-style-asian="normal" style:font-weight-asian="normal" style:font-size-complex="12pt" style:font-style-complex="normal" style:font-weight-complex="normal"/>
    </style:style>
    <style:style style:name="P97" style:family="paragraph" style:parent-style-name="Standard" style:list-style-name="L2">
      <style:paragraph-properties fo:text-align="start" style:justify-single-word="false"/>
      <style:text-properties fo:font-size="12pt" fo:font-style="normal" style:text-underline-style="none" fo:font-weight="normal" officeooo:rsid="01dddb38" officeooo:paragraph-rsid="01dddb38" style:font-size-asian="12pt" style:font-style-asian="normal" style:font-weight-asian="normal" style:font-size-complex="12pt" style:font-style-complex="normal" style:font-weight-complex="normal"/>
    </style:style>
    <style:style style:name="P98" style:family="paragraph" style:parent-style-name="Standard">
      <style:paragraph-properties fo:text-align="start" style:justify-single-word="false"/>
      <style:text-properties fo:font-size="12pt" fo:font-style="normal" style:text-underline-style="none" fo:font-weight="normal" officeooo:rsid="01dd3514" officeooo:paragraph-rsid="01dd46ad" style:font-size-asian="12pt" style:font-style-asian="normal" style:font-weight-asian="normal" style:font-size-complex="12pt" style:font-style-complex="normal" style:font-weight-complex="normal"/>
    </style:style>
    <style:style style:name="P99" style:family="paragraph" style:parent-style-name="Standard" style:list-style-name="L3">
      <style:paragraph-properties fo:text-align="start" style:justify-single-word="false"/>
      <style:text-properties fo:font-size="12pt" fo:font-style="normal" style:text-underline-style="none" fo:font-weight="normal" officeooo:rsid="01dd3514" officeooo:paragraph-rsid="01dd3514" style:font-size-asian="12pt" style:font-style-asian="normal" style:font-weight-asian="normal" style:font-size-complex="12pt" style:font-style-complex="normal" style:font-weight-complex="normal"/>
    </style:style>
    <style:style style:name="T1" style:family="text">
      <style:text-properties officeooo:rsid="01349806"/>
    </style:style>
    <style:style style:name="T2" style:family="text">
      <style:text-properties officeooo:rsid="004aeffb"/>
    </style:style>
    <style:style style:name="T3" style:family="text">
      <style:text-properties officeooo:rsid="0032f33d"/>
    </style:style>
    <style:style style:name="T4" style:family="text">
      <style:text-properties officeooo:rsid="000d801d"/>
    </style:style>
    <style:style style:name="T5" style:family="text">
      <style:text-properties officeooo:rsid="007c2e90"/>
    </style:style>
    <style:style style:name="T6" style:family="text">
      <style:text-properties officeooo:rsid="0034883b"/>
    </style:style>
    <style:style style:name="T7" style:family="text">
      <style:text-properties officeooo:rsid="0050a23e"/>
    </style:style>
    <style:style style:name="T8" style:family="text">
      <style:text-properties officeooo:rsid="004c1871"/>
    </style:style>
    <style:style style:name="T9" style:family="text">
      <style:text-properties officeooo:rsid="0016e436"/>
    </style:style>
    <style:style style:name="T10" style:family="text">
      <style:text-properties officeooo:rsid="001cb2f1"/>
    </style:style>
    <style:style style:name="T11" style:family="text">
      <style:text-properties officeooo:rsid="002505ed"/>
    </style:style>
    <style:style style:name="T12" style:family="text">
      <style:text-properties officeooo:rsid="002618e1"/>
    </style:style>
    <style:style style:name="T13" style:family="text">
      <style:text-properties officeooo:rsid="009f9c12"/>
    </style:style>
    <style:style style:name="T14" style:family="text">
      <style:text-properties officeooo:rsid="00a0c28f"/>
    </style:style>
    <style:style style:name="T15" style:family="text">
      <style:text-properties officeooo:rsid="00859692"/>
    </style:style>
    <style:style style:name="T16" style:family="text">
      <style:text-properties officeooo:rsid="007f98fc"/>
    </style:style>
    <style:style style:name="T17" style:family="text">
      <style:text-properties officeooo:rsid="00859e12"/>
    </style:style>
    <style:style style:name="T18" style:family="text">
      <style:text-properties officeooo:rsid="0085eaae"/>
    </style:style>
    <style:style style:name="T19" style:family="text">
      <style:text-properties officeooo:rsid="00810935"/>
    </style:style>
    <style:style style:name="T20" style:family="text">
      <style:text-properties officeooo:rsid="0082656c"/>
    </style:style>
    <style:style style:name="T21" style:family="text">
      <style:text-properties officeooo:rsid="00a29adf"/>
    </style:style>
    <style:style style:name="T22" style:family="text">
      <style:text-properties officeooo:rsid="0083a7ab"/>
    </style:style>
    <style:style style:name="T23" style:family="text">
      <style:text-properties officeooo:rsid="008904ed"/>
    </style:style>
    <style:style style:name="T24" style:family="text">
      <style:text-properties officeooo:rsid="008a8014"/>
    </style:style>
    <style:style style:name="T25" style:family="text">
      <style:text-properties officeooo:rsid="008afd66"/>
    </style:style>
    <style:style style:name="T26" style:family="text">
      <style:text-properties officeooo:rsid="008c7445"/>
    </style:style>
    <style:style style:name="T27" style:family="text">
      <style:text-properties officeooo:rsid="00a51396"/>
    </style:style>
    <style:style style:name="T28" style:family="text">
      <style:text-properties officeooo:rsid="00a656f3"/>
    </style:style>
    <style:style style:name="T29" style:family="text">
      <style:text-properties officeooo:rsid="00924a23"/>
    </style:style>
    <style:style style:name="T30" style:family="text">
      <style:text-properties officeooo:rsid="008fbd41"/>
    </style:style>
    <style:style style:name="T31" style:family="text">
      <style:text-properties officeooo:rsid="009060a1"/>
    </style:style>
    <style:style style:name="T32" style:family="text">
      <style:text-properties officeooo:rsid="0053f89c"/>
    </style:style>
    <style:style style:name="T33" style:family="text">
      <style:text-properties officeooo:rsid="0052fe26"/>
    </style:style>
    <style:style style:name="T34" style:family="text">
      <style:text-properties fo:color="#ffffff" loext:opacity="100%" fo:font-weight="normal" officeooo:rsid="0020970b" fo:background-color="transparent" loext:char-shading-value="0"/>
    </style:style>
    <style:style style:name="T35" style:family="text">
      <style:text-properties fo:color="#ffffff" loext:opacity="100%" fo:font-weight="normal" officeooo:rsid="0021bc69" fo:background-color="transparent" loext:char-shading-value="0"/>
    </style:style>
    <style:style style:name="T36" style:family="text">
      <style:text-properties officeooo:rsid="0021bc69"/>
    </style:style>
    <style:style style:name="T37" style:family="text">
      <style:text-properties officeooo:rsid="0099b404"/>
    </style:style>
    <style:style style:name="T38" style:family="text">
      <style:text-properties officeooo:rsid="009a5da0"/>
    </style:style>
    <style:style style:name="T39" style:family="text">
      <style:text-properties officeooo:rsid="00562ae4"/>
    </style:style>
    <style:style style:name="T40" style:family="text">
      <style:text-properties officeooo:rsid="0055c7b1"/>
    </style:style>
    <style:style style:name="T41" style:family="text">
      <style:text-properties officeooo:rsid="002bc841"/>
    </style:style>
    <style:style style:name="T42" style:family="text">
      <style:text-properties officeooo:rsid="003751e3"/>
    </style:style>
    <style:style style:name="T43" style:family="text">
      <style:text-properties officeooo:rsid="00391f21"/>
    </style:style>
    <style:style style:name="T44" style:family="text">
      <style:text-properties officeooo:rsid="003f50b5"/>
    </style:style>
    <style:style style:name="T45" style:family="text">
      <style:text-properties officeooo:rsid="0040684a"/>
    </style:style>
    <style:style style:name="T46" style:family="text">
      <style:text-properties officeooo:rsid="006163eb"/>
    </style:style>
    <style:style style:name="T47" style:family="text">
      <style:text-properties officeooo:rsid="00712611"/>
    </style:style>
    <style:style style:name="T48" style:family="text">
      <style:text-properties officeooo:rsid="0071dcf4"/>
    </style:style>
    <style:style style:name="T49" style:family="text">
      <style:text-properties officeooo:rsid="0072ed4e"/>
    </style:style>
    <style:style style:name="T50" style:family="text">
      <style:text-properties officeooo:rsid="0074eb40"/>
    </style:style>
    <style:style style:name="T51" style:family="text">
      <style:text-properties officeooo:rsid="0076b094"/>
    </style:style>
    <style:style style:name="T52" style:family="text">
      <style:text-properties officeooo:rsid="007a110e"/>
    </style:style>
    <style:style style:name="T53" style:family="text">
      <style:text-properties officeooo:rsid="00777ba6"/>
    </style:style>
    <style:style style:name="T54" style:family="text">
      <style:text-properties officeooo:rsid="005ac241"/>
    </style:style>
    <style:style style:name="T55" style:family="text">
      <style:text-properties officeooo:rsid="00ba9bf2"/>
    </style:style>
    <style:style style:name="T56" style:family="text">
      <style:text-properties officeooo:rsid="006f03da"/>
    </style:style>
    <style:style style:name="T57" style:family="text">
      <style:text-properties officeooo:rsid="00708cff"/>
    </style:style>
    <style:style style:name="T58" style:family="text">
      <style:text-properties officeooo:rsid="0064d8e3"/>
    </style:style>
    <style:style style:name="T59" style:family="text">
      <style:text-properties officeooo:rsid="0066dd6d"/>
    </style:style>
    <style:style style:name="T60" style:family="text">
      <style:text-properties officeooo:rsid="0068ef9c"/>
    </style:style>
    <style:style style:name="T61" style:family="text">
      <style:text-properties officeooo:rsid="00695487"/>
    </style:style>
    <style:style style:name="T62" style:family="text">
      <style:text-properties officeooo:rsid="00c096f2"/>
    </style:style>
    <style:style style:name="T63" style:family="text">
      <style:text-properties officeooo:rsid="00d28935"/>
    </style:style>
    <style:style style:name="T64" style:family="text">
      <style:text-properties officeooo:rsid="00d36685"/>
    </style:style>
    <style:style style:name="T65" style:family="text">
      <style:text-properties officeooo:rsid="00d3c164"/>
    </style:style>
    <style:style style:name="T66" style:family="text">
      <style:text-properties officeooo:rsid="00d62d33"/>
    </style:style>
    <style:style style:name="T67" style:family="text">
      <style:text-properties officeooo:rsid="00ffa1a8"/>
    </style:style>
    <style:style style:name="T68" style:family="text">
      <style:text-properties officeooo:rsid="00daf0b1"/>
    </style:style>
    <style:style style:name="T69" style:family="text">
      <style:text-properties officeooo:rsid="00e04467"/>
    </style:style>
    <style:style style:name="T70" style:family="text">
      <style:text-properties officeooo:rsid="00ee5d02"/>
    </style:style>
    <style:style style:name="T71" style:family="text">
      <style:text-properties officeooo:rsid="00e53b62"/>
    </style:style>
    <style:style style:name="T72" style:family="text">
      <style:text-properties officeooo:rsid="00fd35fb"/>
    </style:style>
    <style:style style:name="T73" style:family="text">
      <style:text-properties officeooo:rsid="00e5de6c"/>
    </style:style>
    <style:style style:name="T74" style:family="text">
      <style:text-properties officeooo:rsid="00e7c890"/>
    </style:style>
    <style:style style:name="T75" style:family="text">
      <style:text-properties officeooo:rsid="00e7ff9d"/>
    </style:style>
    <style:style style:name="T76" style:family="text">
      <style:text-properties officeooo:rsid="00e8d30f"/>
    </style:style>
    <style:style style:name="T77" style:family="text">
      <style:text-properties officeooo:rsid="00ebe782"/>
    </style:style>
    <style:style style:name="T78" style:family="text">
      <style:text-properties officeooo:rsid="00ec0ec1"/>
    </style:style>
    <style:style style:name="T79" style:family="text">
      <style:text-properties officeooo:rsid="00f07ecf"/>
    </style:style>
    <style:style style:name="T80" style:family="text">
      <style:text-properties officeooo:rsid="00f14083"/>
    </style:style>
    <style:style style:name="T81" style:family="text">
      <style:text-properties officeooo:rsid="00f212d9"/>
    </style:style>
    <style:style style:name="T82" style:family="text">
      <style:text-properties officeooo:rsid="00f458d7"/>
    </style:style>
    <style:style style:name="T83" style:family="text">
      <style:text-properties officeooo:rsid="00f64f8f"/>
    </style:style>
    <style:style style:name="T84" style:family="text">
      <style:text-properties officeooo:rsid="00feb589"/>
    </style:style>
    <style:style style:name="T85" style:family="text">
      <style:text-properties officeooo:rsid="0103904b"/>
    </style:style>
    <style:style style:name="T86" style:family="text">
      <style:text-properties officeooo:rsid="01071a9e"/>
    </style:style>
    <style:style style:name="T87" style:family="text">
      <style:text-properties officeooo:rsid="01077a47"/>
    </style:style>
    <style:style style:name="T88" style:family="text">
      <style:text-properties officeooo:rsid="01113b12"/>
    </style:style>
    <style:style style:name="T89" style:family="text">
      <style:text-properties officeooo:rsid="010a71c6"/>
    </style:style>
    <style:style style:name="T90" style:family="text">
      <style:text-properties officeooo:rsid="010b50ce"/>
    </style:style>
    <style:style style:name="T91" style:family="text">
      <style:text-properties officeooo:rsid="010c89db"/>
    </style:style>
    <style:style style:name="T92" style:family="text">
      <style:text-properties officeooo:rsid="0113f17d"/>
    </style:style>
    <style:style style:name="T93" style:family="text">
      <style:text-properties officeooo:rsid="010de5ac"/>
    </style:style>
    <style:style style:name="T94" style:family="text">
      <style:text-properties officeooo:rsid="011522c2"/>
    </style:style>
    <style:style style:name="T95" style:family="text">
      <style:text-properties officeooo:rsid="011c3121"/>
    </style:style>
    <style:style style:name="T96" style:family="text">
      <style:text-properties officeooo:rsid="01220a7c"/>
    </style:style>
    <style:style style:name="T97" style:family="text">
      <style:text-properties officeooo:rsid="0122538b"/>
    </style:style>
    <style:style style:name="T98" style:family="text">
      <style:text-properties officeooo:rsid="01255cd4"/>
    </style:style>
    <style:style style:name="T99" style:family="text">
      <style:text-properties officeooo:rsid="012710fb"/>
    </style:style>
    <style:style style:name="T100" style:family="text">
      <style:text-properties officeooo:rsid="012ae7e8"/>
    </style:style>
    <style:style style:name="T101" style:family="text">
      <style:text-properties officeooo:rsid="012830f4"/>
    </style:style>
    <style:style style:name="T102" style:family="text">
      <style:text-properties officeooo:rsid="0128b4e7"/>
    </style:style>
    <style:style style:name="T103" style:family="text">
      <style:text-properties officeooo:rsid="0128fab6"/>
    </style:style>
    <style:style style:name="T104" style:family="text">
      <style:text-properties officeooo:rsid="012d82e6"/>
    </style:style>
    <style:style style:name="T105" style:family="text">
      <style:text-properties officeooo:rsid="013166d1"/>
    </style:style>
    <style:style style:name="T106" style:family="text">
      <style:text-properties officeooo:rsid="013a9a9f"/>
    </style:style>
    <style:style style:name="T107" style:family="text">
      <style:text-properties fo:font-style="normal" style:text-underline-style="none" officeooo:rsid="01568f90" style:font-style-asian="normal" style:font-style-complex="normal"/>
    </style:style>
    <style:style style:name="T108" style:family="text">
      <style:text-properties fo:font-style="normal" style:text-underline-style="none" style:font-style-asian="normal" style:font-style-complex="normal"/>
    </style:style>
    <style:style style:name="T109" style:family="text">
      <style:text-properties fo:font-style="normal" style:text-underline-style="none" officeooo:rsid="01425f65" style:font-style-asian="normal" style:font-style-complex="normal"/>
    </style:style>
    <style:style style:name="T110" style:family="text">
      <style:text-properties fo:font-style="normal" style:text-underline-style="none" officeooo:rsid="01962295" style:font-style-asian="normal" style:font-style-complex="normal"/>
    </style:style>
    <style:style style:name="T111" style:family="text">
      <style:text-properties fo:font-style="normal" style:text-underline-style="none" officeooo:rsid="01414e6c" style:font-style-asian="normal" style:font-style-complex="normal"/>
    </style:style>
    <style:style style:name="T112" style:family="text">
      <style:text-properties fo:font-style="normal" style:text-underline-style="none" officeooo:rsid="0145f3a0" style:font-style-asian="normal" style:font-style-complex="normal"/>
    </style:style>
    <style:style style:name="T113" style:family="text">
      <style:text-properties fo:font-style="normal" style:text-underline-style="none" officeooo:rsid="0146d432" style:font-style-asian="normal" style:font-style-complex="normal"/>
    </style:style>
    <style:style style:name="T114" style:family="text">
      <style:text-properties fo:font-style="normal" style:text-underline-style="none" officeooo:rsid="01501ff5" style:font-style-asian="normal" style:font-style-complex="normal"/>
    </style:style>
    <style:style style:name="T115" style:family="text">
      <style:text-properties fo:font-style="normal" style:text-underline-style="none" officeooo:rsid="019759b4" style:font-style-asian="normal" style:font-style-complex="normal"/>
    </style:style>
    <style:style style:name="T116" style:family="text">
      <style:text-properties fo:font-style="normal" style:text-underline-style="none" officeooo:rsid="01589549" style:font-style-asian="normal" style:font-style-complex="normal"/>
    </style:style>
    <style:style style:name="T117" style:family="text">
      <style:text-properties fo:font-style="normal" style:text-underline-style="none" officeooo:rsid="0158a72a" style:font-style-asian="normal" style:font-style-complex="normal"/>
    </style:style>
    <style:style style:name="T118" style:family="text">
      <style:text-properties fo:font-style="normal" style:text-underline-style="none" officeooo:rsid="0158aafe" style:font-style-asian="normal" style:font-style-complex="normal"/>
    </style:style>
    <style:style style:name="T119" style:family="text">
      <style:text-properties fo:font-style="normal" style:text-underline-style="none" officeooo:rsid="015d8a4d" style:font-style-asian="normal" style:font-style-complex="normal"/>
    </style:style>
    <style:style style:name="T120" style:family="text">
      <style:text-properties fo:font-style="normal" style:text-underline-style="none" officeooo:rsid="015e327b" style:font-style-asian="normal" style:font-style-complex="normal"/>
    </style:style>
    <style:style style:name="T121" style:family="text">
      <style:text-properties officeooo:rsid="01425f65"/>
    </style:style>
    <style:style style:name="T122" style:family="text">
      <style:text-properties officeooo:rsid="01962295"/>
    </style:style>
    <style:style style:name="T123" style:family="text">
      <style:text-properties officeooo:rsid="0167737e"/>
    </style:style>
    <style:style style:name="T124" style:family="text">
      <style:text-properties officeooo:rsid="0175248a"/>
    </style:style>
    <style:style style:name="T125" style:family="text">
      <style:text-properties officeooo:rsid="0178b005"/>
    </style:style>
    <style:style style:name="T126" style:family="text">
      <style:text-properties officeooo:rsid="017b9889"/>
    </style:style>
    <style:style style:name="T127" style:family="text">
      <style:text-properties officeooo:rsid="017d36f0"/>
    </style:style>
    <style:style style:name="T128" style:family="text">
      <style:text-properties officeooo:rsid="018461e7"/>
    </style:style>
    <style:style style:name="T129" style:family="text">
      <style:text-properties officeooo:rsid="0186d500"/>
    </style:style>
    <style:style style:name="T130" style:family="text">
      <style:text-properties officeooo:rsid="0187ba35"/>
    </style:style>
    <style:style style:name="T131" style:family="text">
      <style:text-properties officeooo:rsid="018d468e"/>
    </style:style>
    <style:style style:name="T132" style:family="text">
      <style:text-properties officeooo:rsid="018fdbd7"/>
    </style:style>
    <style:style style:name="T133" style:family="text">
      <style:text-properties officeooo:rsid="019591a3"/>
    </style:style>
    <style:style style:name="T134" style:family="text">
      <style:text-properties officeooo:rsid="01a0e27f"/>
    </style:style>
    <style:style style:name="T135" style:family="text">
      <style:text-properties officeooo:rsid="01a123fb"/>
    </style:style>
    <style:style style:name="T136" style:family="text">
      <style:text-properties officeooo:rsid="01a97e39"/>
    </style:style>
    <style:style style:name="T137" style:family="text">
      <style:text-properties officeooo:rsid="01a9e510"/>
    </style:style>
    <style:style style:name="T138" style:family="text">
      <style:text-properties officeooo:rsid="01a47587"/>
    </style:style>
    <style:style style:name="T139" style:family="text">
      <style:text-properties officeooo:rsid="01a6269e"/>
    </style:style>
    <style:style style:name="T140" style:family="text">
      <style:text-properties officeooo:rsid="01acbfd2"/>
    </style:style>
    <style:style style:name="T141" style:family="text">
      <style:text-properties officeooo:rsid="01ad5248"/>
    </style:style>
    <style:style style:name="T142" style:family="text">
      <style:text-properties officeooo:rsid="01ae6492"/>
    </style:style>
    <style:style style:name="T143" style:family="text">
      <style:text-properties officeooo:rsid="01b32d9e"/>
    </style:style>
    <style:style style:name="T144" style:family="text">
      <style:text-properties officeooo:rsid="01d3dd9d"/>
    </style:style>
    <style:style style:name="T145" style:family="text">
      <style:text-properties officeooo:rsid="01c32546"/>
    </style:style>
    <style:style style:name="T146" style:family="text">
      <style:text-properties officeooo:rsid="01c55cb8"/>
    </style:style>
    <style:style style:name="T147" style:family="text">
      <style:text-properties officeooo:rsid="01c83915"/>
    </style:style>
    <style:style style:name="T148" style:family="text">
      <style:text-properties officeooo:rsid="01ca468c"/>
    </style:style>
    <style:style style:name="T149" style:family="text">
      <style:text-properties officeooo:rsid="01c8e819"/>
    </style:style>
    <style:style style:name="T150" style:family="text">
      <style:text-properties officeooo:rsid="01c96731"/>
    </style:style>
    <style:style style:name="T151" style:family="text">
      <style:text-properties fo:font-style="italic" officeooo:rsid="01c96731" style:font-style-asian="italic" style:font-style-complex="italic"/>
    </style:style>
    <style:style style:name="T152" style:family="text">
      <style:text-properties officeooo:rsid="01ca246d"/>
    </style:style>
    <style:style style:name="T153" style:family="text">
      <style:text-properties officeooo:rsid="01cdda7f"/>
    </style:style>
    <style:style style:name="T154" style:family="text">
      <style:text-properties officeooo:rsid="01cf5f83"/>
    </style:style>
    <style:style style:name="T155" style:family="text">
      <style:text-properties officeooo:rsid="01d0a08b"/>
    </style:style>
    <style:style style:name="T156" style:family="text">
      <style:text-properties officeooo:rsid="01d214b4"/>
    </style:style>
    <style:style style:name="T157" style:family="text">
      <style:text-properties officeooo:rsid="01d5a709"/>
    </style:style>
    <style:style style:name="T158" style:family="text">
      <style:text-properties officeooo:rsid="01dab665"/>
    </style:style>
    <style:style style:name="T159" style:family="text">
      <style:text-properties officeooo:rsid="01e63bcd"/>
    </style:style>
    <style:style style:name="T160" style:family="text">
      <style:text-properties officeooo:rsid="01e6b5e7"/>
    </style:style>
    <style:style style:name="T161" style:family="text">
      <style:text-properties officeooo:rsid="01e7c21f"/>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rification and Testing Report</text:p>
      <text:p text:style-name="P2"/>
      <text:p text:style-name="P3"/>
      <text:p text:style-name="P4">1. <text:span text:style-name="T1">Preliminary Codebase Examination</text:span></text:p>
      <text:p text:style-name="P5"/>
      <text:p text:style-name="P6"><text:span text:style-name="T2">A</text:span><text:span text:style-name="T3">.</text:span> Dead Code</text:p>
      <text:p text:style-name="P5"/>
      <text:p text:style-name="P7">Initial examination reveals three dead functions; “validate_priority”, “format_task_for_display”, and “calculate_workload”. <text:span text:style-name="T4">A comment in “validate_priority” informs the user about this. </text:span></text:p>
      <text:p text:style-name="P7"/>
      <text:p text:style-name="P7">“<text:span text:style-name="T4">flask.render_template_string” is imported but never used.</text:span></text:p>
      <text:p text:style-name="P7"/>
      <text:p text:style-name="P8">To prevent this in the future, pylint could be incorporated. <text:span text:style-name="T5">Pylint scanning could be carried out automatically in the CI/CD pipeline to catch and prune or integrate dead code before deployment. </text:span></text:p>
      <text:p text:style-name="P7"/>
      <text:p text:style-name="P9"/>
      <text:p text:style-name="P10"><text:span text:style-name="T2">B</text:span><text:span text:style-name="T6">.</text:span> <text:span text:style-name="T7">Query</text:span><text:span text:style-name="T8"> Inconsistencies</text:span></text:p>
      <text:p text:style-name="P11"/>
      <text:p text:style-name="P12">The codebase contains inconsistent SQL queries. <text:span text:style-name="T9">The “login” function uses string formatting in its query:</text:span></text:p>
      <text:p text:style-name="P13"><draw:frame draw:style-name="fr1" draw:name="Image2" text:anchor-type="char" svg:y="0.476cm" svg:width="17cm" svg:height="2.799cm" draw:z-index="1"><draw:image xlink:href="Pictures/10000001000002AE00000071B6E4150B.png" xlink:type="simple" xlink:show="embed" xlink:actuate="onLoad" draw:mime-type="image/png"/></draw:frame></text:p>
      <text:p text:style-name="P14">, which is insecure, while the “get_task” function uses <text:span text:style-name="T10">context-</text:span>appropriate parameterised queries:</text:p>
      <text:p text:style-name="P15"><draw:frame draw:style-name="fr2" draw:name="Image1" text:anchor-type="char" svg:y="0.319cm" svg:width="14.737cm" svg:height="5.292cm" draw:z-index="0"><draw:image xlink:href="Pictures/100000010000022D000000C8F7426F06.png" xlink:type="simple" xlink:show="embed" xlink:actuate="onLoad" draw:mime-type="image/png"/></draw:frame></text:p>
      <text:p text:style-name="P13"/>
      <text:p text:style-name="P13"/>
      <text:p text:style-name="P16"><text:s/></text:p>
      <text:p text:style-name="P13"/>
      <text:p text:style-name="P13"/>
      <text:p text:style-name="P13"/>
      <text:p text:style-name="P13"/>
      <text:p text:style-name="P13"/>
      <text:p text:style-name="P13"/>
      <text:p text:style-name="P17">.</text:p>
      <text:p text:style-name="P18"/>
      <text:p text:style-name="P19"><text:span text:style-name="T11">One other place where</text:span> string formatting <text:span text:style-name="T11">is </text:span>being used in place of parameterised queries <text:span text:style-name="T12">is the</text:span> “<text:span text:style-name="T11">search_tasks</text:span>” <text:span text:style-name="T12">function.</text:span></text:p>
      <text:p text:style-name="P19"/>
      <text:p text:style-name="P20"/>
      <text:p text:style-name="P21">To patch this, all <text:span text:style-name="T13">queries should move away from string formatting, instead opting for parameterised </text:span><text:span text:style-name="T14">queries</text:span><text:span text:style-name="T13">.</text:span></text:p>
      <text:p text:style-name="P21"/>
      <text:p text:style-name="P20"><text:soft-page-break/>To prevent this type of inconsistenc<text:span text:style-name="T15">y</text:span> in the future, <text:span text:style-name="T16">an SQL injection </text:span><text:span text:style-name="T17">scanner</text:span><text:span text:style-name="T16"> could be </text:span><text:span text:style-name="T18">implemented</text:span><text:span text:style-name="T16">. </text:span><text:span text:style-name="T19">By iterating over each POST endpoint </text:span><text:span text:style-name="T20">and attempting </text:span><text:span text:style-name="T21">controlled injection payloads</text:span><text:span text:style-name="T20">, </text:span><text:span text:style-name="T22">such inconsistencies could be caught early and before deployment. </text:span><text:span text:style-name="T23">This </text:span><text:span text:style-name="T24">is vital b</text:span><text:span text:style-name="T25">ecause relying on string formatting carries the risk of </text:span><text:span text:style-name="T26">irreversible</text:span><text:span text:style-name="T25"> </text:span><text:span text:style-name="T27">and complete</text:span><text:span text:style-name="T25"> data </text:span><text:span text:style-name="T28">loss</text:span><text:span text:style-name="T25">.</text:span></text:p>
      <text:p text:style-name="P20"/>
      <text:p text:style-name="P22">Additionally, to secure the database against the risk of data loss, backups should be ma<text:span text:style-name="T29">d</text:span>e periodically, <text:span text:style-name="T30">and a roll-back tool should be incorporated to </text:span><text:span text:style-name="T31">allow for remote restoration of data.</text:span></text:p>
      <text:p text:style-name="P22"/>
      <text:p text:style-name="P23"/>
      <text:p text:style-name="P24"><text:span text:style-name="T32">C</text:span><text:span text:style-name="T6">.</text:span> <text:span text:style-name="T33">Input Validation Inconsistencies</text:span></text:p>
      <text:p text:style-name="P25"><text:span text:style-name="T34">Input validation inconsistencies were also found. </text:span><text:span text:style-name="T35">The “create_task”</text:span> <text:span text:style-name="T36">function validates input properly:</text:span></text:p>
      <text:p text:style-name="P26"><draw:frame draw:style-name="fr3" draw:name="Image3" text:anchor-type="char" svg:width="13.758cm" svg:height="1.27cm" draw:z-index="2"><draw:image xlink:href="Pictures/100000010000020800000030DA0392BE.png" xlink:type="simple" xlink:show="embed" xlink:actuate="onLoad" draw:mime-type="image/png"/></draw:frame></text:p>
      <text:p text:style-name="P18"/>
      <text:p text:style-name="P27"/>
      <text:p text:style-name="P28">, <text:span text:style-name="T36">while “update_task” does not:</text:span></text:p>
      <text:p text:style-name="P27"><draw:frame draw:style-name="fr3" draw:name="Image4" text:anchor-type="char" svg:width="12.753cm" svg:height="2.117cm" draw:z-index="3"><draw:image xlink:href="Pictures/10000001000001E20000005077C883AE.png" xlink:type="simple" xlink:show="embed" xlink:actuate="onLoad" draw:mime-type="image/png"/></draw:frame></text:p>
      <text:p text:style-name="P27"/>
      <text:p text:style-name="P27"/>
      <text:p text:style-name="P29"/>
      <text:p text:style-name="P29"/>
      <text:p text:style-name="P30">One other example of this is the “add_comment” function, where input is not being validated either.</text:p>
      <text:p text:style-name="P30"/>
      <text:p text:style-name="P31">To prevent this in the future, all endpoints should validate input data types and return appropriate HTTP error codes for invalid input. To test for such inconsistencies, an enumeration tool could be developed and <text:span text:style-name="T37">i</text:span><text:span text:style-name="T38">ntegrated</text:span><text:span text:style-name="T37">.</text:span></text:p>
      <text:p text:style-name="P32"/>
      <text:p text:style-name="P32"><text:span text:style-name="T39">D</text:span><text:span text:style-name="T6">.</text:span> <text:span text:style-name="T40">Error-Handling</text:span><text:span text:style-name="T8"> Inconsistencies</text:span></text:p>
      <text:p text:style-name="P32"/>
      <text:p text:style-name="P33"><text:span text:style-name="T41">E</text:span>rror-handling inconsistencies <text:span text:style-name="T41">were found </text:span><text:span text:style-name="T42">as well. </text:span><text:span text:style-name="T43">Some functions like “get_task” incorporate proper error handling:</text:span></text:p>
      <text:p text:style-name="P33"><draw:frame draw:style-name="fr3" draw:name="Image5" text:anchor-type="char" svg:width="12.832cm" svg:height="5.212cm" draw:z-index="4"><draw:image xlink:href="Pictures/10000001000001E5000000C5A172BF24.png" xlink:type="simple" xlink:show="embed" xlink:actuate="onLoad" draw:mime-type="image/png"/></draw:frame></text:p>
      <text:p text:style-name="P33"/>
      <text:p text:style-name="P29"/>
      <text:p text:style-name="P29"/>
      <text:p text:style-name="P27"/>
      <text:p text:style-name="P27"/>
      <text:p text:style-name="P27"/>
      <text:p text:style-name="P27"/>
      <text:p text:style-name="P27"/>
      <text:p text:style-name="P34"/>
      <text:p text:style-name="P34"/>
      <text:p text:style-name="P35">, <text:span text:style-name="T44">while </text:span><text:span text:style-name="T45">other functions like “delete_task” do not:</text:span></text:p>
      <text:p text:style-name="P35"><draw:frame draw:style-name="fr4" draw:name="Image6" text:anchor-type="char" svg:width="13.811cm" svg:height="3.969cm" draw:z-index="5"><draw:image xlink:href="Pictures/100000010000020A00000096462F6CF5.png" xlink:type="simple" xlink:show="embed" xlink:actuate="onLoad" draw:mime-type="image/png"/></draw:frame></text:p>
      <text:p text:style-name="P35"/>
      <text:p text:style-name="P35"/>
      <text:p text:style-name="P35"/>
      <text:p text:style-name="P35"/>
      <text:p text:style-name="P36"><text:soft-page-break/>(Existence of record is never verified before deletion attempt – <text:span text:style-name="T46">This fails silently</text:span>).</text:p>
      <text:p text:style-name="P36"/>
      <text:p text:style-name="P37"><text:span text:style-name="T47">This quality issue could be prevented by </text:span><text:span text:style-name="T48">including error handling in each CRUD (Create, Read, Update, Delete) operation. Unit tests should be written to </text:span><text:span text:style-name="T49">test for known failure points. </text:span><text:span text:style-name="T50">Execution of said unit tests could be automated in the CI/CD pipeline </text:span><text:span text:style-name="T51">to catch </text:span><text:span text:style-name="T52">such inconsistencies</text:span><text:span text:style-name="T51"> before </text:span><text:span text:style-name="T53">deployment.</text:span><text:line-break/></text:p>
      <text:p text:style-name="P38"><text:span text:style-name="T54">E</text:span><text:span text:style-name="T6">.</text:span> <text:span text:style-name="T54">Authentication</text:span><text:span text:style-name="T8"> Inconsistencies</text:span></text:p>
      <text:p text:style-name="P39"/>
      <text:p text:style-name="P40">Authentication only exists at the /login endpoint. No other endpoint requires it. This effectively makes authentication a feature rather than a system-wide integration.</text:p>
      <text:p text:style-name="P41"/>
      <text:p text:style-name="P42">This quality issue could be prevented by integrating authentication system-wide. </text:p>
      <text:p text:style-name="P43"/>
      <text:p text:style-name="P43">One implementation is to rely on sessions. Each login should generate a unique and time-limited session token. This token should be hashed saved in user’s cookies. Then, each function that requires authentication may access the token from the payload and compare it against the active sessions table. <text:span text:style-name="T55">If it matches, authentication is successful, if not, an appropriate error is returned along redirecting the user to the login portal.</text:span></text:p>
      <text:p text:style-name="P42"/>
      <text:p text:style-name="P42"><text:span text:style-name="T56">Integration could be tested automatically with an enumeration script </text:span><text:span text:style-name="T57">that navigates to each endpoint without appropriate permissions.</text:span></text:p>
      <text:p text:style-name="P35"/>
      <text:p text:style-name="P35"/>
      <text:p text:style-name="P44"><text:span text:style-name="T58">F</text:span><text:span text:style-name="T6">.</text:span> <text:span text:style-name="T59">No Database Error Handling</text:span></text:p>
      <text:p text:style-name="P35"/>
      <text:p text:style-name="P45">A<text:span text:style-name="T60">cross the entire file, not one database call includes error handling. If an error was to occur in a “db.execute” call, </text:span><text:span text:style-name="T61">the application would fail, </text:span><text:span text:style-name="T62">and data could be lost</text:span><text:span text:style-name="T61">.</text:span></text:p>
      <text:p text:style-name="P35"/>
      <text:p text:style-name="P46">To patch this, try-except blocks should be implemented in each database call block, <text:span text:style-name="T63">and appropriate HTTP error responses should be returned. </text:span><text:span text:style-name="T64">Additionally, </text:span><text:span text:style-name="T65">form input validation should be incorporated to prevent the user from being able to submit obviously wrong data.</text:span></text:p>
      <text:p text:style-name="P47"/>
      <text:p text:style-name="P47"/>
      <text:p text:style-name="P48"><text:span text:style-name="T66">G</text:span><text:span text:style-name="T6">.</text:span> <text:span text:style-name="T67">Poor </text:span><text:span text:style-name="T68">Deliverable </text:span><text:span text:style-name="T69">Management</text:span></text:p>
      <text:p text:style-name="P49"/>
      <text:p text:style-name="P49"/>
      <text:p text:style-name="P50">I identified two specific instances in the codebase where better deliverable management would have directly improved quality.</text:p>
      <text:p text:style-name="P50"/>
      <text:p text:style-name="P51">The first <text:span text:style-name="T70">instance</text:span> is the aforementioned utility function “validate_priority”. <text:span text:style-name="T71">It was planned for, implemented, but never integrated. This </text:span><text:span text:style-name="T72">(as well as the comment)</text:span><text:span text:style-name="T71"> is a clear sign of poor deliverable management. </text:span><text:span text:style-name="T73">The task should </text:span><text:span text:style-name="T74">have necessitated integration of this function instead of </text:span><text:span text:style-name="T75">splitting the task into two separate tickets. </text:span><text:span text:style-name="T76">Additionally, a definition of done should have </text:span><text:span text:style-name="T77">demanded </text:span><text:span text:style-name="T78">that the function is being called and works as planned.</text:span></text:p>
      <text:p text:style-name="P51"/>
      <text:p text:style-name="P52">The second instance is the “<text:span text:style-name="T9">login” </text:span><text:span text:style-name="T79">function. </text:span><text:span text:style-name="T80">In it, the query is formatted using string formatting. Th</text:span><text:span text:style-name="T81">is is inconsistent with other functions, and a clear sign of a poor deliverable management. The acceptance criteria for the ticket should’ve demanded that the </text:span><text:span text:style-name="T82">function uses parameterised queries </text:span><text:span text:style-name="T83">instead.</text:span></text:p>
      <text:p text:style-name="P52"/>
      <text:p text:style-name="P52"/>
      <text:p text:style-name="P53"><text:soft-page-break/><text:span text:style-name="T84">H</text:span><text:span text:style-name="T6">.</text:span> <text:span text:style-name="T84">Effective Deliverable Management </text:span></text:p>
      <text:p text:style-name="P54"/>
      <text:p text:style-name="P55">The<text:span text:style-name="T85">re are numerous benefits to effective deliverable management; </text:span><text:span text:style-name="T86">both to the development team as well as the </text:span><text:span text:style-name="T87">end users. </text:span></text:p>
      <text:p text:style-name="P56"/>
      <text:p text:style-name="P57">For developers, it helps reduce workload and deliver features quicker and more robust<text:span text:style-name="T88">ly</text:span>. It also <text:span text:style-name="T89">minimises the need for reworks </text:span><text:span text:style-name="T90">or </text:span><text:span text:style-name="T89">refactor</text:span><text:span text:style-name="T90">s. For example, if the </text:span><text:span text:style-name="T91">task for </text:span><text:span text:style-name="T92">the</text:span><text:span text:style-name="T91"> </text:span><text:span text:style-name="T90">function “validate_priority” had been </text:span><text:span text:style-name="T93">planned out properly, </text:span><text:span text:style-name="T94">the function could’ve been implemented and integrated in a single ticket, by a single developer.</text:span></text:p>
      <text:p text:style-name="P57"/>
      <text:p text:style-name="P58">Similarly, <text:span text:style-name="T95">since the function “login” has been implemented poorly, it now requires a refactor, which vastly increases the workload – both for the original developer, as well as the reviewer.</text:span></text:p>
      <text:p text:style-name="P57"/>
      <text:p text:style-name="P59">For end users, <text:span text:style-name="T96">effective deliverable management </text:span><text:span text:style-name="T97">makes the software more reliable, consistent, and trustworthy. For example, </text:span><text:span text:style-name="T98">the function “get_task” </text:span><text:span text:style-name="T99">works as intended, while “delete_task” silently fails. </text:span><text:span text:style-name="T100">This is a clear inconsistency which makes the software less reliable. </text:span><text:span text:style-name="T101">When a user encounters this issue, </text:span><text:span text:style-name="T102">they may lose trust in the </text:span><text:span text:style-name="T103">product. </text:span></text:p>
      <text:p text:style-name="P60"/>
      <text:p text:style-name="P60"/>
      <text:p text:style-name="P60"/>
      <text:p text:style-name="P61"><text:span text:style-name="T104">2</text:span>. <text:span text:style-name="T105">Verification and Testing</text:span></text:p>
      <text:p text:style-name="P62"/>
      <text:p text:style-name="P63"><text:span text:style-name="T106">A</text:span><text:span text:style-name="T6">.</text:span> <text:span text:style-name="T106">Unit Testing</text:span></text:p>
      <text:p text:style-name="P64"/>
      <text:p text:style-name="P65"><text:span text:style-name="T107">U</text:span><text:span text:style-name="T108">nit test</text:span><text:span text:style-name="T107">s</text:span><text:span text:style-name="T108"> o</text:span><text:span text:style-name="T107">n</text:span><text:span text:style-name="T108"> 3 separate endpoints w</text:span><text:span text:style-name="T107">ere</text:span><text:span text:style-name="T108"> conducted; </text:span><text:span text:style-name="T109">“/</text:span><text:span text:style-name="T110">api</text:span><text:span text:style-name="T109">/login”, “/</text:span><text:span text:style-name="T110">api</text:span><text:span text:style-name="T109">/tasks”, “/</text:span><text:span text:style-name="T110">api</text:span><text:span text:style-name="T109">/tasks/&lt;id&gt;”</text:span><text:span text:style-name="T108">. Following are the rationale behind the </text:span><text:span text:style-name="T111">tests.</text:span></text:p>
      <text:p text:style-name="P66"/>
      <text:p text:style-name="P67"><text:span text:style-name="T108">First, a test of the “/login” endpoint was conducted due to the fact that the </text:span><text:span text:style-name="T112">development team is currently integrating authentication. To ensure that the implemented function can safely be integrated, the “/login” endpoint must be evaluated and proven to work, </text:span><text:span text:style-name="T113">i.e. that you can log in.</text:span></text:p>
      <text:p text:style-name="P68"/>
      <text:p text:style-name="P68"><draw:frame draw:style-name="fr5" draw:name="Image7" text:anchor-type="char" svg:width="16.775cm" svg:height="6.932cm" draw:z-index="6"><draw:image xlink:href="Pictures/100000010000027A000001066ECD5BB4.png" xlink:type="simple" xlink:show="embed" xlink:actuate="onLoad" draw:mime-type="image/png"/></draw:frame></text:p>
      <text:p text:style-name="P69"><text:span text:style-name="T108">Next, a test was conducted to ensure that incorrect credentials are met with an appropriate error response. </text:span><text:span text:style-name="T114">This is important as this proves that “</text:span><text:span text:style-name="T109">/</text:span><text:span text:style-name="T110">api</text:span><text:span text:style-name="T109">/</text:span><text:span text:style-name="T115">l</text:span><text:span text:style-name="T114">ogin” endpoint carries out actual authentication instead of just responding with 201.</text:span></text:p>
      <text:p text:style-name="P70"><draw:frame draw:style-name="fr5" draw:name="Image8" text:anchor-type="char" svg:width="16.351cm" svg:height="6.271cm" draw:z-index="7"><draw:image xlink:href="Pictures/100000010000026A000000ED2D43131D.png" xlink:type="simple" xlink:show="embed" xlink:actuate="onLoad" draw:mime-type="image/png"/></draw:frame><text:soft-page-break/></text:p>
      <text:p text:style-name="P71"><text:span text:style-name="T108">Lastly, a boundary test was conducted to </text:span><text:span text:style-name="T116">ensure that the input behaves predictably. </text:span><text:span text:style-name="T117">This test sends the correct data type, but </text:span><text:span text:style-name="T118">incorrect values. </text:span><text:span text:style-name="T119">This is important because incorrect values like these could cause </text:span><text:span text:style-name="T120">the server to crash if not handled correctly</text:span><text:span text:style-name="T119">. </text:span></text:p>
      <text:p text:style-name="P72"/>
      <text:p text:style-name="P72"><draw:frame draw:style-name="fr6" draw:name="Image9" text:anchor-type="char" svg:width="17cm" svg:height="6.449cm" draw:z-index="8"><draw:image xlink:href="Pictures/10000001000002C50000010D638F523D.png" xlink:type="simple" xlink:show="embed" xlink:actuate="onLoad" draw:mime-type="image/png"/></draw:frame></text:p>
      <text:p text:style-name="P73">Second, the “<text:span text:style-name="T121">/</text:span><text:span text:style-name="T122">api</text:span><text:span text:style-name="T121">/</text:span>tasks” endpoint was tested in context of creating new task<text:span text:style-name="T123">s</text:span> (POST as opposed to GET). <text:span text:style-name="T124">This is the core functionality </text:span><text:span text:style-name="T125">of this application so it needs to </text:span><text:span text:style-name="T126">function properly. Correctly formatted payloads must respond with 201, while incorrectly formatted payloads need to fail safely. </text:span><text:span text:style-name="T127">If this feature were to not work, all other features (like task retrieval) will fail as well.</text:span></text:p>
      <text:p text:style-name="P74"/>
      <text:p text:style-name="P74"><draw:frame draw:style-name="fr4" draw:name="Image10" text:anchor-type="char" svg:width="13.547cm" svg:height="7.303cm" draw:z-index="9"><draw:image xlink:href="Pictures/100000010000020000000114D5F44112.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74"/>
      <text:p text:style-name="P75"/>
      <text:p text:style-name="P75"/>
      <text:p text:style-name="P75"/>
      <text:p text:style-name="P75"/>
      <text:p text:style-name="P75"><text:soft-page-break/>Similarly to testing correctly formatted payloads, <text:span text:style-name="T128">incorrectly formatted payloads we tested </text:span><text:span text:style-name="T129">to ensure that blank tasks are not being created. </text:span><text:span text:style-name="T130">If they were, it could lead to indexing problems and the loss of sequence of id’s.</text:span></text:p>
      <text:p text:style-name="P74"/>
      <text:p text:style-name="P74"><draw:frame draw:style-name="fr3" draw:name="Image12" text:anchor-type="char" svg:width="13.203cm" svg:height="5.424cm" draw:z-index="10"><draw:image xlink:href="Pictures/10000001000001F3000000CD67D27DDF.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6">Extreme values were tested to <text:span text:style-name="T131">verify whether values are being filtered. It’s important to filter obviously incorrect values, as neglecting to do so could lead to </text:span><text:span text:style-name="T132">vulnerabilities, exploits, and worsened readability. </text:span></text:p>
      <text:p text:style-name="P74"/>
      <text:p text:style-name="P74"><draw:frame draw:style-name="fr6" draw:name="Image11" text:anchor-type="char" svg:width="17cm" svg:height="5.886cm" draw:z-index="11"><draw:image xlink:href="Pictures/100000010000035100000126A317F146.png" xlink:type="simple" xlink:show="embed" xlink:actuate="onLoad" draw:mime-type="image/png"/></draw:frame></text:p>
      <text:p text:style-name="P74"/>
      <text:p text:style-name="P77">Lastly, the “<text:span text:style-name="T121">/</text:span><text:span text:style-name="T122">api</text:span><text:span text:style-name="T121">/</text:span>task<text:span text:style-name="T133">s</text:span>/&lt;id&gt;”:</text:p>
      <text:p text:style-name="P78"/>
      <text:p text:style-name="P79">Similarly to creating tasks, retrieving tasks is of equal importance. It’<text:span text:style-name="T134">s a core functionality of this application, which necessitates a unit test. </text:span><text:span text:style-name="T135">This test proves that tasks with known correct ID can be retrieved.</text:span></text:p>
      <text:p text:style-name="P74"/>
      <text:p text:style-name="P74"><draw:frame draw:style-name="fr3" draw:name="Image13" text:anchor-type="char" svg:width="11.906cm" svg:height="5.609cm" draw:z-index="14"><draw:image xlink:href="Pictures/10000001000001C2000000D444FA64E0.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80"/>
      <text:p text:style-name="P81"/>
      <text:p text:style-name="P81"/>
      <text:p text:style-name="P81"><text:soft-page-break/></text:p>
      <text:p text:style-name="P81">This test <text:span text:style-name="T136">proves that incorrect IDs are met with appropriate error code responses.</text:span></text:p>
      <text:p text:style-name="P74"/>
      <text:p text:style-name="P74"><draw:frame draw:style-name="fr3" draw:name="Image14" text:anchor-type="char" svg:width="12.965cm" svg:height="5.609cm" draw:z-index="12"><draw:image xlink:href="Pictures/10000001000001EA000000D4A8118BA5.png" xlink:type="simple" xlink:show="embed" xlink:actuate="onLoad" draw:mime-type="image/png"/></draw:frame></text:p>
      <text:p text:style-name="P74"/>
      <text:p text:style-name="P74"/>
      <text:p text:style-name="P74"/>
      <text:p text:style-name="P74"/>
      <text:p text:style-name="P82"/>
      <text:p text:style-name="P82"/>
      <text:p text:style-name="P82"/>
      <text:p text:style-name="P82"/>
      <text:p text:style-name="P82"/>
      <text:p text:style-name="P82"/>
      <text:p text:style-name="P82"/>
      <text:p text:style-name="P82"/>
      <text:p text:style-name="P83">This test <text:span text:style-name="T137">ensures that IDs at the edges of available range are retrievable.</text:span></text:p>
      <text:p text:style-name="P82"/>
      <text:p text:style-name="P82"><draw:frame draw:style-name="fr7" draw:name="Image15" text:anchor-type="char" svg:width="17cm" svg:height="8.925cm" draw:z-index="13"><draw:image xlink:href="Pictures/10000001000002A6000001648100D259.png" xlink:type="simple" xlink:show="embed" xlink:actuate="onLoad" draw:mime-type="image/png"/></draw:frame></text:p>
      <text:p text:style-name="P81">These tests were chosen to test the core functionalities of the API. The functions being tested constitute the very core of the application. <text:span text:style-name="T138">If they were to fail silently, </text:span><text:span text:style-name="T139">the whole application would break. </text:span><text:span text:style-name="T140">As such, they are the most appropriate </text:span><text:span text:style-name="T141">tests to be written </text:span><text:span text:style-name="T142">at this point in time.</text:span></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4"><text:soft-page-break/><text:span text:style-name="T143">B</text:span><text:span text:style-name="T6">.</text:span> <text:span text:style-name="T144">Integration</text:span><text:span text:style-name="T106"> Testing</text:span></text:p>
      <text:p text:style-name="P82"/>
      <text:p text:style-name="P82"/>
      <text:p text:style-name="P85"/>
      <text:p text:style-name="P82"><draw:frame draw:style-name="fr4" draw:name="Image16" text:anchor-type="char" svg:width="10.883cm" svg:height="6.239cm" draw:z-index="15"><draw:image xlink:href="Pictures/100000010000023E0000014916B8939E.png" xlink:type="simple" xlink:show="embed" xlink:actuate="onLoad" draw:mime-type="image/png"/></draw:frame></text:p>
      <text:p text:style-name="P82"><draw:frame draw:style-name="fr1" draw:name="Image17" text:anchor-type="char" svg:y="6.791cm" svg:width="12.735cm" svg:height="8.841cm" draw:z-index="16"><draw:image xlink:href="Pictures/10000001000002BF000001E8AEEAFC08.png" xlink:type="simple" xlink:show="embed" xlink:actuate="onLoad" draw:mime-type="image/png"/></draw:frame></text:p>
      <text:p text:style-name="P82"/>
      <text:p text:style-name="P82"/>
      <text:p text:style-name="P86"/>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7">The unit test<text:span text:style-name="T145">s written earlier don’t actually verify the results of their operations. Unit tests in principle only test that a given unit responsible for a given piece of functionality functions as expected, e.g. that the function “create_task” responds with the </text:span><text:span text:style-name="T146">status code 201 when given correct payload.</text:span></text:p>
      <text:p text:style-name="P88"/>
      <text:p text:style-name="P88">To address this blind spot, integration tests are used instead. <text:span text:style-name="T147">By using an integration test, we can test </text:span><text:span text:style-name="T148">integrations between </text:span><text:span text:style-name="T147">multiple units in to </text:span><text:span text:style-name="T149">verify </text:span><text:span text:style-name="T150">a given </text:span><text:span text:style-name="T151">behaviour </text:span><text:span text:style-name="T150">is true, </text:span><text:span text:style-name="T152">e.g. that “</text:span><text:span text:style-name="T148">create_task” actually </text:span><text:span text:style-name="T153">inserts the new record into the database, </text:span><text:span text:style-name="T154">and that “get_tasks” actually detects that </text:span><text:span text:style-name="T155">change</text:span><text:span text:style-name="T154">.</text:span></text:p>
      <text:p text:style-name="P88"/>
      <text:p text:style-name="P88"><draw:frame draw:style-name="fr1" draw:name="Image18" text:anchor-type="char" svg:y="0.415cm" svg:width="17cm" svg:height="3.835cm" draw:z-index="17"><draw:image xlink:href="Pictures/1000000100000466000000FE965E3CDE.png" xlink:type="simple" xlink:show="embed" xlink:actuate="onLoad" draw:mime-type="image/png"/></draw:frame><text:soft-page-break/></text:p>
      <text:p text:style-name="P82"/>
      <text:p text:style-name="P82"><draw:frame draw:style-name="fr3" draw:name="Image19" text:anchor-type="char" svg:width="17cm" svg:height="6.847cm" draw:z-index="18"><draw:image xlink:href="Pictures/100000010000030E0000013BABDA1CAA.png" xlink:type="simple" xlink:show="embed" xlink:actuate="onLoad" draw:mime-type="image/png"/></draw:frame></text:p>
      <text:p text:style-name="P82"/>
      <text:p text:style-name="P82"/>
      <text:p text:style-name="P82"/>
      <text:p text:style-name="P89"><text:span text:style-name="T156">C</text:span><text:span text:style-name="T6">.</text:span> <text:span text:style-name="T157">Non-Execution</text:span><text:span text:style-name="T106"> </text:span><text:span text:style-name="T157">Verification</text:span></text:p>
      <text:p text:style-name="P90"/>
      <text:p text:style-name="P91">The provided script was linted using 2 separate linting libraries; Pylint and flake8. <text:span text:style-name="T158">Each returned slightly different results with a single overlap between them. </text:span></text:p>
      <text:p text:style-name="P91"/>
      <text:p text:style-name="P92">Style Violations</text:p>
      <text:list text:style-name="L1">
        <text:list-item>
          <text:p text:style-name="P93">E501 – This is a flake8 style violation. </text:p>
          <text:list>
            <text:list-item>
              <text:p text:style-name="P93"><text:span text:style-name="T159">This</text:span> means that the specified line of code exceeded the recommended length limit of 79 characters.</text:p>
            </text:list-item>
          </text:list>
        </text:list-item>
        <text:list-item>
          <text:p text:style-name="P94">Missing function or method docstring (missing-function-docstring)</text:p>
          <text:list>
            <text:list-item>
              <text:p text:style-name="P95">This means <text:span text:style-name="T160">that </text:span><text:span text:style-name="T161">the specified function has no docstring; the comment written as a string directly below the function’s definition.</text:span></text:p>
            </text:list-item>
          </text:list>
        </text:list-item>
      </text:list>
      <text:p text:style-name="P96"/>
      <text:p text:style-name="P92">Potential Bugs</text:p>
      <text:list text:style-name="L2">
        <text:list-item>
          <text:p text:style-name="P97">flask.render_template_string imported but unused.</text:p>
        </text:list-item>
      </text:list>
      <text:p text:style-name="P98"/>
      <text:p text:style-name="P92">Complexity Warnings</text:p>
      <text:list text:style-name="L3">
        <text:list-item>
          <text:p text:style-name="P99">Missing function or method docstring (missing-function-docstring)</text:p>
          <text:list>
            <text:list-item>
              <text:p text:style-name="P99"/>
            </text:list-item>
          </text:list>
        </text:list-item>
      </text:list>
      <text:p text:style-name="P91"/>
      <text:p text:style-name="P91"/>
      <text:p text:style-name="P91"/>
      <text:p text:style-name="P90"/>
      <text:p text:style-name="P90"><text:soft-page-break/></text:p>
      <text:p text:style-name="P90"/>
      <text:p text:style-name="P90"/>
      <text:p text:style-name="P90"/>
      <text:p text:style-name="P90"/>
      <text:p text:style-name="P9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4T13:25:54.934564791</meta:creation-date>
    <meta:generator>LibreOffice/25.8.3.2$Linux_X86_64 LibreOffice_project/8ca8d55c161d602844f5428fa4b58097424e324e</meta:generator>
    <dc:date>2026-05-24T21:32:53.553323313</dc:date>
    <meta:editing-duration>PT8H3M41S</meta:editing-duration>
    <meta:editing-cycles>388</meta:editing-cycles>
    <meta:document-statistic meta:table-count="0" meta:image-count="19" meta:object-count="0" meta:page-count="10" meta:paragraph-count="71" meta:word-count="1444" meta:character-count="9659" meta:non-whitespace-character-count="8276"/>
  </office:meta>
</office:document-meta>
</file>