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3pt" fo:font-weight="bold" officeooo:rsid="0031f879" officeooo:paragraph-rsid="022aba60"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fo:font-size="12pt" fo:font-style="normal" style:text-underline-style="none" fo:font-weight="normal" officeooo:rsid="022187e3" officeooo:paragraph-rsid="02393fb1"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239b13a" officeooo:paragraph-rsid="023cbb63"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style:text-underline-style="none" fo:font-weight="normal" officeooo:rsid="0246d9f3" officeooo:paragraph-rsid="0246d9f3"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style:text-underline-style="none" fo:font-weight="normal" officeooo:rsid="023a30b3" officeooo:paragraph-rsid="0246d9f3"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style:text-underline-style="none" fo:font-weight="normal" officeooo:rsid="0239b13a" officeooo:paragraph-rsid="0239b13a"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style:text-underline-style="none" fo:font-weight="normal" officeooo:rsid="0243c099" officeooo:paragraph-rsid="0243c099"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T183" style:family="text">
      <style:text-properties officeooo:rsid="022c8c53"/>
    </style:style>
    <style:style style:name="T184" style:family="text">
      <style:text-properties officeooo:rsid="023a30b3"/>
    </style:style>
    <style:style style:name="T185" style:family="text">
      <style:text-properties officeooo:rsid="023a9a89"/>
    </style:style>
    <style:style style:name="T186" style:family="text">
      <style:text-properties officeooo:rsid="02455c04"/>
    </style:style>
    <style:style style:name="T187" style:family="text">
      <style:text-properties officeooo:rsid="0246d9f3"/>
    </style:style>
    <style:style style:name="T188" style:family="text">
      <style:text-properties officeooo:rsid="024f34c2"/>
    </style:style>
    <style:style style:name="T189" style:family="text">
      <style:text-properties officeooo:rsid="02488339"/>
    </style:style>
    <style:style style:name="T190" style:family="text">
      <style:text-properties fo:font-style="italic" officeooo:rsid="024a1c81" style:font-style-asian="italic" style:font-style-complex="italic"/>
    </style:style>
    <style:style style:name="T191" style:family="text">
      <style:text-properties officeooo:rsid="024a1c81"/>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111"><text:span text:style-name="T183">E</text:span><text:span text:style-name="T6">.</text:span> <text:span text:style-name="T183">TDD / BDD</text:span></text:p>
      <text:p text:style-name="P112"/>
      <text:p text:style-name="P113">Creating new tasks could have been developed differently using TDD (Test-Driven Development). <text:span text:style-name="T184">Currently, the biggest problem with the function is that it does not filter out incorrect</text:span><text:span text:style-name="T185">ly structured payloads or payloads containing incorrect values</text:span><text:span text:style-name="T184">. </text:span><text:span text:style-name="T186">It simply returns 201 status code without applying the changes. </text:span><text:span text:style-name="T187">Instead of creating the feature first, </text:span><text:span text:style-name="T188">it could’ve been done the following way:</text:span></text:p>
      <text:p text:style-name="P114"><text:soft-page-break/></text:p>
      <text:p text:style-name="P114">Once the piece of functionality is planned, a test for it could be devised. You could gather all the ways in which the feature could fail, and then write tests that incorporate those failures. <text:span text:style-name="T189">Once the test is complete, the function could be written </text:span><text:span text:style-name="T190">for </text:span><text:span text:style-name="T191">that test.</text:span></text:p>
      <text:p text:style-name="P115"/>
      <text:p text:style-name="P116"/>
      <text:p text:style-name="P116"/>
      <text:p text:style-name="P116"/>
      <text:p text:style-name="P117">1. Devise tests</text:p>
      <text:p text:style-name="P117">2. Think of all failures</text:p>
      <text:p text:style-name="P117">3. Write the tests</text:p>
      <text:p text:style-name="P117">4. Write the function</text:p>
      <text:p text:style-name="P112"/>
      <text:p text:style-name="P112"/>
      <text:p text:style-name="P112"/>
      <text:p text:style-name="P112"/>
      <text:p text:style-name="P112"/>
      <text:p text:style-name="P112"><text:span text:style-name="T182">coverage</text:span></text:p>
      <text:p text:style-name="P112"/>
      <text:p text:style-name="P112"><text:span text:style-name="T182">coverag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19:52.334393813</dc:date>
    <meta:editing-duration>PT8H50M4S</meta:editing-duration>
    <meta:editing-cycles>462</meta:editing-cycles>
    <meta:document-statistic meta:table-count="0" meta:image-count="21" meta:object-count="0" meta:page-count="11" meta:paragraph-count="89" meta:word-count="1875" meta:character-count="12396" meta:non-whitespace-character-count="10597"/>
  </office:meta>
</office:document-meta>
</file>