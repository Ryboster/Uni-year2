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be2c4d"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c6f0d0" officeooo:paragraph-rsid="00c6f0d0"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c6f0d0" officeooo:paragraph-rsid="00cc9145"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c8eaa6" officeooo:paragraph-rsid="00cc914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cc9145" officeooo:paragraph-rsid="00cc9145"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paragraph-rsid="00cc9145"/>
    </style:style>
    <style:style style:name="P52" style:family="paragraph" style:parent-style-name="Standard">
      <style:paragraph-properties fo:text-align="start" style:justify-single-word="false"/>
      <style:text-properties fo:font-size="12pt" fo:font-weight="normal" officeooo:rsid="00c8eaa6" officeooo:paragraph-rsid="00c8eaa6"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cc9145" officeooo:paragraph-rsid="00cdfc19"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bf5fe1"/>
    </style:style>
    <style:style style:name="T63" style:family="text">
      <style:text-properties officeooo:rsid="00bf8e8c"/>
    </style:style>
    <style:style style:name="T64" style:family="text">
      <style:text-properties officeooo:rsid="00c6f0d0"/>
    </style:style>
    <style:style style:name="T65" style:family="text">
      <style:text-properties officeooo:rsid="00cad8c6" style:font-size-asian="12pt" style:font-weight-asian="normal" style:font-size-complex="12pt" style:font-weight-complex="normal"/>
    </style:style>
    <style:style style:name="T66" style:family="text">
      <style:text-properties officeooo:rsid="00cc9145" style:font-size-asian="12pt" style:font-weight-asian="normal" style:font-size-complex="12pt" style:font-weight-complex="normal"/>
    </style:style>
    <style:style style:name="T67" style:family="text">
      <style:text-properties officeooo:rsid="00cb163e" style:font-size-asian="12pt" style:font-weight-asian="normal" style:font-size-complex="12pt" style:font-weight-complex="normal"/>
    </style:style>
    <style:style style:name="T68" style:family="text">
      <style:text-properties officeooo:rsid="00c8eaa6" style:font-size-asian="12pt" style:font-weight-asian="normal" style:font-size-complex="12pt" style:font-weight-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dditionally, transactions and roll-backs should be implemented in each database query to prevent </text:span><text:span text:style-name="T63">data loss in case of errors; </text:span><text:span text:style-name="T64">e.g.</text:span></text:p>
      <text:p text:style-name="P46"/>
      <text:p text:style-name="P47">the query </text:p>
      <text:p text:style-name="P47"/>
      <text:p text:style-name="P47"/>
      <text:p text:style-name="P48">“ </text:p>
      <text:p text:style-name="P49">INSERT INTO tasks(title, description, priority, assigned_to, created_by) </text:p>
      <text:p text:style-name="P50">VALUES (?, ?, ?, ?, ?)</text:p>
      <text:p text:style-name="P48">“ </text:p>
      <text:p text:style-name="P48"/>
      <text:p text:style-name="P51"><text:span text:style-name="T65">from </text:span><text:span text:style-name="T66">the function </text:span><text:span text:style-name="T65">“</text:span><text:span text:style-name="T67">create_task” </text:span><text:span text:style-name="T68">would become:</text:span></text:p>
      <text:p text:style-name="P52">“</text:p>
      <text:p text:style-name="P50">BEGIN TRY</text:p>
      <text:p text:style-name="P50">BEGIN TRANSACTION</text:p>
      <text:p text:style-name="P50">INSERT INTO tasks(title,description,priority,assigned_to,created_by)</text:p>
      <text:p text:style-name="P53">VALUES (?, ?, ?, ?, ?)</text:p>
      <text:p text:style-name="P53"/>
      <text:p text:style-name="P5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16:50.585053026</dc:date>
    <meta:editing-duration>PT3H49M28S</meta:editing-duration>
    <meta:editing-cycles>165</meta:editing-cycles>
    <meta:document-statistic meta:table-count="0" meta:image-count="6" meta:object-count="0" meta:page-count="3" meta:paragraph-count="46" meta:word-count="622" meta:character-count="4308" meta:non-whitespace-character-count="3722"/>
  </office:meta>
</office:document-meta>
</file>