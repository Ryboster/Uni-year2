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c096f2"/>
    </style:style>
    <style:style style:name="T62" style:family="text">
      <style:text-properties officeooo:rsid="00d28935"/>
    </style:style>
    <style:style style:name="T63" style:family="text">
      <style:text-properties officeooo:rsid="00d36685"/>
    </style:style>
    <style:style style:name="T64" style:family="text">
      <style:text-properties officeooo:rsid="00d3c164"/>
    </style:style>
    <style:style style:name="T65" style:family="text">
      <style:text-properties officeooo:rsid="00d62d33"/>
    </style:style>
    <style:style style:name="T66" style:family="text">
      <style:text-properties officeooo:rsid="00daf0b1"/>
    </style:style>
    <style:style style:name="T67" style:family="text">
      <style:text-properties officeooo:rsid="00e04467"/>
    </style:style>
    <style:style style:name="T68" style:family="text">
      <style:text-properties officeooo:rsid="00e53b62"/>
    </style:style>
    <style:style style:name="T69" style:family="text">
      <style:text-properties officeooo:rsid="00e5de6c"/>
    </style:style>
    <style:style style:name="T70" style:family="text">
      <style:text-properties officeooo:rsid="00e7c890"/>
    </style:style>
    <style:style style:name="T71" style:family="text">
      <style:text-properties officeooo:rsid="00e7ff9d"/>
    </style:style>
    <style:style style:name="T72" style:family="text">
      <style:text-properties officeooo:rsid="00e8d30f"/>
    </style:style>
    <style:style style:name="T73" style:family="text">
      <style:text-properties officeooo:rsid="00ebe782"/>
    </style:style>
    <style:style style:name="T74" style:family="text">
      <style:text-properties officeooo:rsid="00ec0ec1"/>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ext:p>
      <text:p text:style-name="P21">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text:soft-page-break/></text:p>
      <text:p text:style-name="P36">(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and data could be lost</text:span><text:span text:style-name="T60">.</text:span></text:p>
      <text:p text:style-name="P35"/>
      <text:p text:style-name="P46">To patch this, try-except blocks should be implemented in each database call block, <text:span text:style-name="T62">and appropriate HTTP error responses should be returned. </text:span><text:span text:style-name="T63">Additionally, </text:span><text:span text:style-name="T64">form input validation should be incorporated to prevent the user from being able to submit obviously wrong data.</text:span></text:p>
      <text:p text:style-name="P47"/>
      <text:p text:style-name="P47"/>
      <text:p text:style-name="P48"><text:span text:style-name="T65">G</text:span><text:span text:style-name="T5">.</text:span> <text:span text:style-name="T66">Deliverable </text:span><text:span text:style-name="T67">Management </text:span><text:span text:style-name="T66">Impact</text:span></text:p>
      <text:p text:style-name="P49"/>
      <text:p text:style-name="P49"/>
      <text:p text:style-name="P50">I identified two specific instances in the codebase where better deliverable management would have directly improved quality.</text:p>
      <text:p text:style-name="P50"/>
      <text:p text:style-name="P51">The first example is the aforementioned utility function “validate_priority”. <text:span text:style-name="T68">It was planned for, implemented, but never integrated. This is a clear sign of poor deliverable management. </text:span><text:span text:style-name="T69">The task should </text:span><text:span text:style-name="T70">have necessitated integration of this function instead of </text:span><text:span text:style-name="T71">splitting the task into two separate tickets. </text:span><text:span text:style-name="T72">Additionally, a definition of done should have </text:span><text:span text:style-name="T73">demanded </text:span><text:span text:style-name="T74">that the function is being called and works as planned.</text:span></text:p>
      <text:p text:style-name="P51"/>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30:44.423341253</dc:date>
    <meta:editing-duration>PT4H3M9S</meta:editing-duration>
    <meta:editing-cycles>194</meta:editing-cycles>
    <meta:document-statistic meta:table-count="0" meta:image-count="6" meta:object-count="0" meta:page-count="3" meta:paragraph-count="37" meta:word-count="674" meta:character-count="4662" meta:non-whitespace-character-count="4019"/>
  </office:meta>
</office:document-meta>
</file>