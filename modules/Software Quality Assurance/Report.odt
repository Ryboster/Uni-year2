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522c2"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ffa1a8"/>
    </style:style>
    <style:style style:name="T67" style:family="text">
      <style:text-properties officeooo:rsid="00daf0b1"/>
    </style:style>
    <style:style style:name="T68" style:family="text">
      <style:text-properties officeooo:rsid="00e04467"/>
    </style:style>
    <style:style style:name="T69" style:family="text">
      <style:text-properties officeooo:rsid="00ee5d02"/>
    </style:style>
    <style:style style:name="T70" style:family="text">
      <style:text-properties officeooo:rsid="00e53b62"/>
    </style:style>
    <style:style style:name="T71" style:family="text">
      <style:text-properties officeooo:rsid="00fd35fb"/>
    </style:style>
    <style:style style:name="T72" style:family="text">
      <style:text-properties officeooo:rsid="00e5de6c"/>
    </style:style>
    <style:style style:name="T73" style:family="text">
      <style:text-properties officeooo:rsid="00e7c890"/>
    </style:style>
    <style:style style:name="T74" style:family="text">
      <style:text-properties officeooo:rsid="00e7ff9d"/>
    </style:style>
    <style:style style:name="T75" style:family="text">
      <style:text-properties officeooo:rsid="00e8d30f"/>
    </style:style>
    <style:style style:name="T76" style:family="text">
      <style:text-properties officeooo:rsid="00ebe782"/>
    </style:style>
    <style:style style:name="T77" style:family="text">
      <style:text-properties officeooo:rsid="00ec0ec1"/>
    </style:style>
    <style:style style:name="T78" style:family="text">
      <style:text-properties officeooo:rsid="00f07ecf"/>
    </style:style>
    <style:style style:name="T79" style:family="text">
      <style:text-properties officeooo:rsid="00f14083"/>
    </style:style>
    <style:style style:name="T80" style:family="text">
      <style:text-properties officeooo:rsid="00f212d9"/>
    </style:style>
    <style:style style:name="T81" style:family="text">
      <style:text-properties officeooo:rsid="00f458d7"/>
    </style:style>
    <style:style style:name="T82" style:family="text">
      <style:text-properties officeooo:rsid="00f64f8f"/>
    </style:style>
    <style:style style:name="T83" style:family="text">
      <style:text-properties officeooo:rsid="00feb589"/>
    </style:style>
    <style:style style:name="T84" style:family="text">
      <style:text-properties officeooo:rsid="0103904b"/>
    </style:style>
    <style:style style:name="T85" style:family="text">
      <style:text-properties officeooo:rsid="01071a9e"/>
    </style:style>
    <style:style style:name="T86" style:family="text">
      <style:text-properties officeooo:rsid="01077a47"/>
    </style:style>
    <style:style style:name="T87" style:family="text">
      <style:text-properties officeooo:rsid="01113b12"/>
    </style:style>
    <style:style style:name="T88" style:family="text">
      <style:text-properties officeooo:rsid="010a71c6"/>
    </style:style>
    <style:style style:name="T89" style:family="text">
      <style:text-properties officeooo:rsid="010b50ce"/>
    </style:style>
    <style:style style:name="T90" style:family="text">
      <style:text-properties officeooo:rsid="010c89db"/>
    </style:style>
    <style:style style:name="T91" style:family="text">
      <style:text-properties officeooo:rsid="0113f17d"/>
    </style:style>
    <style:style style:name="T92" style:family="text">
      <style:text-properties officeooo:rsid="010de5ac"/>
    </style:style>
    <style:style style:name="T93" style:family="text">
      <style:text-properties officeooo:rsid="011522c2"/>
    </style:style>
    <style:style style:name="T94" style:family="text">
      <style:text-properties officeooo:rsid="0116c309"/>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
      <text:p text:style-name="P21"><text:soft-page-break/>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Poor </text:span><text:span text:style-name="T67">Deliverable </text:span><text:span text:style-name="T68">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9">instance</text:span> is the aforementioned utility function “validate_priority”. <text:span text:style-name="T70">It was planned for, implemented, but never integrated. This </text:span><text:span text:style-name="T71">(as well as the comment)</text:span><text:span text:style-name="T70"> is a clear sign of poor deliverable management. </text:span><text:span text:style-name="T72">The task should </text:span><text:span text:style-name="T73">have necessitated integration of this function instead of </text:span><text:span text:style-name="T74">splitting the task into two separate tickets. </text:span><text:span text:style-name="T75">Additionally, a definition of done should have </text:span><text:span text:style-name="T76">demanded </text:span><text:span text:style-name="T77">that the function is being called and works as planned.</text:span></text:p>
      <text:p text:style-name="P51"/>
      <text:p text:style-name="P52">The second instance is the “<text:span text:style-name="T8">login” </text:span><text:span text:style-name="T78">function. </text:span><text:span text:style-name="T79">In it, the query is formatted using string formatting. Th</text:span><text:span text:style-name="T80">is is inconsistent with other functions, and a clear sign of a poor deliverable management. The acceptance criteria for the ticket should’ve demanded that the </text:span><text:span text:style-name="T81">function uses parameterised queries </text:span><text:span text:style-name="T82">instead.</text:span></text:p>
      <text:p text:style-name="P52"/>
      <text:p text:style-name="P52"/>
      <text:p text:style-name="P53"><text:soft-page-break/><text:span text:style-name="T83">H</text:span><text:span text:style-name="T5">.</text:span> <text:span text:style-name="T83">Effective Deliverable Management </text:span></text:p>
      <text:p text:style-name="P54"/>
      <text:p text:style-name="P55">The<text:span text:style-name="T84">re are numerous benefits to effective deliverable management; </text:span><text:span text:style-name="T85">both to the development team as well as the </text:span><text:span text:style-name="T86">end users. </text:span></text:p>
      <text:p text:style-name="P56"/>
      <text:p text:style-name="P57">For developers, it helps reduce workload and deliver features quicker and more robust<text:span text:style-name="T87">ly</text:span>. It also <text:span text:style-name="T88">minimises the need for reworks </text:span><text:span text:style-name="T89">or </text:span><text:span text:style-name="T88">refactor</text:span><text:span text:style-name="T89">s. For example, if the </text:span><text:span text:style-name="T90">task for </text:span><text:span text:style-name="T91">the</text:span><text:span text:style-name="T90"> </text:span><text:span text:style-name="T89">function “validate_priority” had been </text:span><text:span text:style-name="T92">planned out properly, </text:span><text:span text:style-name="T93">the function could’ve been implemented and integrated in a single ticket, by a single developer. </text:span><text:span text:style-name="T94">Instead, since integration is a separate ticket, a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46:45.578217415</dc:date>
    <meta:editing-duration>PT4H18M53S</meta:editing-duration>
    <meta:editing-cycles>228</meta:editing-cycles>
    <meta:document-statistic meta:table-count="0" meta:image-count="6" meta:object-count="0" meta:page-count="4" meta:paragraph-count="41" meta:word-count="789" meta:character-count="5403" meta:non-whitespace-character-count="4645"/>
  </office:meta>
</office:document-meta>
</file>