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2DF0000034A79C0E4E3.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145d1c3" officeooo:paragraph-rsid="0145f3a0"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officeooo:rsid="01425f65" style:font-style-asian="normal" style:font-style-complex="normal"/>
    </style:style>
    <style:style style:name="T109" style:family="text">
      <style:text-properties fo:font-style="normal" style:text-underline-style="none" officeooo:rsid="01414e6c" style:font-style-asian="normal" style:font-style-complex="normal"/>
    </style:style>
    <style:style style:name="T110" style:family="text">
      <style:text-properties officeooo:rsid="0145f3a0"/>
    </style:style>
    <style:style style:name="T111" style:family="text">
      <style:text-properties officeooo:rsid="0146d43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06">A</text:span><text:span text:style-name="T6">.</text:span> <text:span text:style-name="T106">Unit Testing</text:span></text:p>
      <text:p text:style-name="P64"/>
      <text:p text:style-name="P65"><text:span text:style-name="T107">A unit test of 3 separate endpoints was conducted; </text:span><text:span text:style-name="T108">“/login”, “/tasks”, “/tasks/&lt;id&gt;”</text:span><text:span text:style-name="T107">. Following are the findings as well as the rationale behind the </text:span><text:span text:style-name="T109">tests.</text:span></text:p>
      <text:p text:style-name="P66"/>
      <text:p text:style-name="P67">First, a test of the “/login” endpoint was conducted due to the fact that the <text:span text:style-name="T110">development team is currently integrating authentication. To ensure that the implemented function can safely be integrated, the “/login” endpoint must be evaluated and proven to work, </text:span><text:span text:style-name="T111">i.e. that you can log in.</text:span></text:p>
      <text:p text:style-name="P67"><text:s/></text:p>
      <text:p text:style-name="P68"><draw:frame draw:style-name="fr5" draw:name="Image7" text:anchor-type="char" svg:width="17cm" svg:height="19.475cm" draw:z-index="6"><draw:image xlink:href="Pictures/10000001000002DF0000034A79C0E4E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47:37.510275137</dc:date>
    <meta:editing-duration>PT6H19M30S</meta:editing-duration>
    <meta:editing-cycles>264</meta:editing-cycles>
    <meta:document-statistic meta:table-count="0" meta:image-count="7" meta:object-count="0" meta:page-count="5" meta:paragraph-count="47" meta:word-count="932" meta:character-count="6324" meta:non-whitespace-character-count="5426"/>
  </office:meta>
</office:document-meta>
</file>