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100000126A317F146.png" manifest:media-type="image/png"/>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5"/>
      <text:p text:style-name="P75"><draw:frame draw:style-name="fr6" draw:name="Image11" text:anchor-type="char" svg:width="17cm" svg:height="5.886cm" draw:z-index="11"><draw:image xlink:href="Pictures/100000010000035100000126A317F146.png" xlink:type="simple" xlink:show="embed" xlink:actuate="onLoad" draw:mime-type="image/png"/></draw:frame></text:p>
      <text:p text:style-name="P75"/>
      <text:p text:style-name="P78">Lastly, the “<text:span text:style-name="T121">/</text:span><text:span text:style-name="T122">api</text:span><text:span text:style-name="T121">/</text:span>task<text:span text:style-name="T133">s</text:span>/&lt;id&gt;” wa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9"/>
      <text:p text:style-name="P79"/>
      <text:p text:style-name="P79"/>
      <text:p text:style-name="P79"/>
      <text:p text:style-name="P79"/>
      <text:p text:style-name="P79"/>
      <text:p text:style-name="P79"/>
      <text:p text:style-name="P79"/>
      <text:p text:style-name="P79"/>
      <text:p text:style-name="P79"/>
      <text:p text:style-name="P79">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3:57.998945099</dc:date>
    <meta:editing-duration>PT6H45M21S</meta:editing-duration>
    <meta:editing-cycles>322</meta:editing-cycles>
    <meta:document-statistic meta:table-count="0" meta:image-count="12" meta:object-count="0" meta:page-count="7" meta:paragraph-count="53" meta:word-count="1138" meta:character-count="7680" meta:non-whitespace-character-count="6582"/>
  </office:meta>
</office:document-meta>
</file>