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. </text:span></text:p>
      <text:p text:style-name="P23"/>
      <text:p text:style-name="P23"/>
      <text:p text:style-name="P21"/>
      <text:p text:style-name="P21"/>
      <text:p text:style-name="P21">1.1(b) <text:span text:style-name="T12">Comments suggesting incomplete workflow</text:span></text:p>
      <text:p text:style-name="P21"/>
      <text:p text:style-name="P21">1.1(c)</text:p>
      <text:p text:style-name="P21">1.1(d)</text:p>
      <text:p text:style-name="P21">1.1(e)</text:p>
      <text:p text:style-name="P21"/>
      <text:p text:style-name="P5"/>
      <text:p text:style-name="P5"/>
      <text:p text:style-name="P5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58:50.521675465</dc:date>
    <meta:editing-duration>PT2H32M35S</meta:editing-duration>
    <meta:editing-cycles>41</meta:editing-cycles>
    <meta:document-statistic meta:table-count="0" meta:image-count="4" meta:object-count="0" meta:page-count="2" meta:paragraph-count="21" meta:word-count="154" meta:character-count="1180" meta:non-whitespace-character-count="1043"/>
  </office:meta>
</office:document-meta>
</file>