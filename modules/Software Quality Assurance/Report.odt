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47587"/>
    </style:style>
    <style:style style:name="T137" style:family="text">
      <style:text-properties officeooo:rsid="01a6269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7"/>
      <text:p text:style-name="P74"/>
      <text:p text:style-name="P78">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9"/>
      <text:p text:style-name="P80"><text:soft-page-break/>This test w</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draw:style-name="fr7" draw:name="Image15" text:anchor-type="char" svg:width="17cm" svg:height="8.925cm" draw:z-index="13"><draw:image xlink:href="Pictures/10000001000002A6000001648100D259.png" xlink:type="simple" xlink:show="embed" xlink:actuate="onLoad" draw:mime-type="image/png"/></draw:frame></text:p>
      <text:p text:style-name="P81"/>
      <text:p text:style-name="P81"/>
      <text:p text:style-name="P80">These tests were chosen to test the core functionalities of the API. The functions being tested constitute the very core of the application. <text:span text:style-name="T136">If they were to fail silently, </text:span><text:span text:style-name="T137">the whole application would break, which justifies unit tests</text:span></text:p>
      <text:p text:style-name="P81"/>
      <text:p text:style-name="P81"/>
      <text:p text:style-name="P81"/>
      <text:p text:style-name="P81"/>
      <text:p text:style-name="P81">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22:54.912220251</dc:date>
    <meta:editing-duration>PT6H54M13S</meta:editing-duration>
    <meta:editing-cycles>332</meta:editing-cycles>
    <meta:document-statistic meta:table-count="0" meta:image-count="15" meta:object-count="0" meta:page-count="7" meta:paragraph-count="56" meta:word-count="1212" meta:character-count="8137" meta:non-whitespace-character-count="6968"/>
  </office:meta>
</office:document-meta>
</file>