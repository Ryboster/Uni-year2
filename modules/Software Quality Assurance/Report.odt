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daf0b1"/>
    </style:style>
    <style:style style:name="T67" style:family="text">
      <style:text-properties officeooo:rsid="00e04467"/>
    </style:style>
    <style:style style:name="T68" style:family="text">
      <style:text-properties officeooo:rsid="00ee5d02"/>
    </style:style>
    <style:style style:name="T69" style:family="text">
      <style:text-properties officeooo:rsid="00e53b62"/>
    </style:style>
    <style:style style:name="T70" style:family="text">
      <style:text-properties officeooo:rsid="00fd35fb"/>
    </style:style>
    <style:style style:name="T71" style:family="text">
      <style:text-properties officeooo:rsid="00e5de6c"/>
    </style:style>
    <style:style style:name="T72" style:family="text">
      <style:text-properties officeooo:rsid="00e7c890"/>
    </style:style>
    <style:style style:name="T73" style:family="text">
      <style:text-properties officeooo:rsid="00e7ff9d"/>
    </style:style>
    <style:style style:name="T74" style:family="text">
      <style:text-properties officeooo:rsid="00e8d30f"/>
    </style:style>
    <style:style style:name="T75" style:family="text">
      <style:text-properties officeooo:rsid="00ebe782"/>
    </style:style>
    <style:style style:name="T76" style:family="text">
      <style:text-properties officeooo:rsid="00ec0ec1"/>
    </style:style>
    <style:style style:name="T77" style:family="text">
      <style:text-properties officeooo:rsid="00f07ecf"/>
    </style:style>
    <style:style style:name="T78" style:family="text">
      <style:text-properties officeooo:rsid="00f14083"/>
    </style:style>
    <style:style style:name="T79" style:family="text">
      <style:text-properties officeooo:rsid="00f212d9"/>
    </style:style>
    <style:style style:name="T80" style:family="text">
      <style:text-properties officeooo:rsid="00f458d7"/>
    </style:style>
    <style:style style:name="T81" style:family="text">
      <style:text-properties officeooo:rsid="00f64f8f"/>
    </style:style>
    <style:style style:name="T82" style:family="text">
      <style:text-properties officeooo:rsid="00feb589"/>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
      <text:p text:style-name="P21"><text:soft-page-break/>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Deliverable </text:span><text:span text:style-name="T67">Management </text:span><text:span text:style-name="T66">Impac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68">instance</text:span> is the aforementioned utility function “validate_priority”. <text:span text:style-name="T69">It was planned for, implemented, but never integrated. This </text:span><text:span text:style-name="T70">(as well as the comment)</text:span><text:span text:style-name="T69"> is a clear sign of poor deliverable management. </text:span><text:span text:style-name="T71">The task should </text:span><text:span text:style-name="T72">have necessitated integration of this function instead of </text:span><text:span text:style-name="T73">splitting the task into two separate tickets. </text:span><text:span text:style-name="T74">Additionally, a definition of done should have </text:span><text:span text:style-name="T75">demanded </text:span><text:span text:style-name="T76">that the function is being called and works as planned.</text:span></text:p>
      <text:p text:style-name="P51"/>
      <text:p text:style-name="P52">The second instance is the “<text:span text:style-name="T8">login” </text:span><text:span text:style-name="T77">function. </text:span><text:span text:style-name="T78">In it, the query is formatted using string formatting. Th</text:span><text:span text:style-name="T79">is is inconsistent with other functions, and a clear sign of a poor deliverable management. The acceptance criteria for the ticket should’ve demanded that the </text:span><text:span text:style-name="T80">function uses parameterised queries </text:span><text:span text:style-name="T81">instead.</text:span></text:p>
      <text:p text:style-name="P52"/>
      <text:p text:style-name="P52"/>
      <text:p text:style-name="P53"><text:soft-page-break/><text:span text:style-name="T82">H</text:span><text:span text:style-name="T5">.</text:span> <text:span text:style-name="T82">Effective Deliverable Management </text:span></text:p>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39:00.766050789</dc:date>
    <meta:editing-duration>PT4H11M17S</meta:editing-duration>
    <meta:editing-cycles>209</meta:editing-cycles>
    <meta:document-statistic meta:table-count="0" meta:image-count="6" meta:object-count="0" meta:page-count="4" meta:paragraph-count="39" meta:word-count="711" meta:character-count="4902" meta:non-whitespace-character-count="4222"/>
  </office:meta>
</office:document-meta>
</file>