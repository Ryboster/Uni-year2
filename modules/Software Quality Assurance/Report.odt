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1f4b4e6" officeooo:paragraph-rsid="01f4b4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All of these would’ve gone uncaught if relying on unit testing or integration testing alone. </text:p>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40:16.879350782</dc:date>
    <meta:editing-duration>PT8H11M</meta:editing-duration>
    <meta:editing-cycles>398</meta:editing-cycles>
    <meta:document-statistic meta:table-count="0" meta:image-count="19" meta:object-count="0" meta:page-count="10" meta:paragraph-count="73" meta:word-count="1507" meta:character-count="10042" meta:non-whitespace-character-count="8600"/>
  </office:meta>
</office:document-meta>
</file>