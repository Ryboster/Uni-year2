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9b188" style:font-size-asian="11.3500003814697pt" style:font-weight-asian="bold" style:font-size-complex="13pt" style:font-weight-complex="bold"/>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c096f2"/>
    </style:style>
    <style:style style:name="T62" style:family="text">
      <style:text-properties officeooo:rsid="00d28935"/>
    </style:style>
    <style:style style:name="T63" style:family="text">
      <style:text-properties officeooo:rsid="00d36685"/>
    </style:style>
    <style:style style:name="T64" style:family="text">
      <style:text-properties officeooo:rsid="00d3c164"/>
    </style:style>
    <style:style style:name="T65" style:family="text">
      <style:text-properties officeooo:rsid="00d62d33"/>
    </style:style>
    <style:style style:name="T66" style:family="text">
      <style:text-properties officeooo:rsid="00daf0b1"/>
    </style:style>
    <style:style style:name="T67" style:family="text">
      <style:text-properties officeooo:rsid="00e04467"/>
    </style:style>
    <style:style style:name="T68" style:family="text">
      <style:text-properties officeooo:rsid="00ee5d02"/>
    </style:style>
    <style:style style:name="T69" style:family="text">
      <style:text-properties officeooo:rsid="00e53b62"/>
    </style:style>
    <style:style style:name="T70" style:family="text">
      <style:text-properties officeooo:rsid="00e5de6c"/>
    </style:style>
    <style:style style:name="T71" style:family="text">
      <style:text-properties officeooo:rsid="00e7c890"/>
    </style:style>
    <style:style style:name="T72" style:family="text">
      <style:text-properties officeooo:rsid="00e7ff9d"/>
    </style:style>
    <style:style style:name="T73" style:family="text">
      <style:text-properties officeooo:rsid="00e8d30f"/>
    </style:style>
    <style:style style:name="T74" style:family="text">
      <style:text-properties officeooo:rsid="00ebe782"/>
    </style:style>
    <style:style style:name="T75" style:family="text">
      <style:text-properties officeooo:rsid="00ec0ec1"/>
    </style:style>
    <style:style style:name="T76" style:family="text">
      <style:text-properties officeooo:rsid="00f07ecf"/>
    </style:style>
    <style:style style:name="T77" style:family="text">
      <style:text-properties officeooo:rsid="00f14083"/>
    </style:style>
    <style:style style:name="T78" style:family="text">
      <style:text-properties officeooo:rsid="00f212d9"/>
    </style:style>
    <style:style style:name="T79" style:family="text">
      <style:text-properties officeooo:rsid="00f458d7"/>
    </style:style>
    <style:style style:name="T80" style:family="text">
      <style:text-properties officeooo:rsid="00f64f8f"/>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ext:p>
      <text:p text:style-name="P21">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text:soft-page-break/></text:p>
      <text:p text:style-name="P36">(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and data could be lost</text:span><text:span text:style-name="T60">.</text:span></text:p>
      <text:p text:style-name="P35"/>
      <text:p text:style-name="P46">To patch this, try-except blocks should be implemented in each database call block, <text:span text:style-name="T62">and appropriate HTTP error responses should be returned. </text:span><text:span text:style-name="T63">Additionally, </text:span><text:span text:style-name="T64">form input validation should be incorporated to prevent the user from being able to submit obviously wrong data.</text:span></text:p>
      <text:p text:style-name="P47"/>
      <text:p text:style-name="P47"/>
      <text:p text:style-name="P48"><text:span text:style-name="T65">G</text:span><text:span text:style-name="T5">.</text:span> <text:span text:style-name="T66">Deliverable </text:span><text:span text:style-name="T67">Management </text:span><text:span text:style-name="T66">Impac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68">instance</text:span> is the aforementioned utility function “validate_priority”. <text:span text:style-name="T69">It was planned for, implemented, but never integrated. This is a clear sign of poor deliverable management. </text:span><text:span text:style-name="T70">The task should </text:span><text:span text:style-name="T71">have necessitated integration of this function instead of </text:span><text:span text:style-name="T72">splitting the task into two separate tickets. </text:span><text:span text:style-name="T73">Additionally, a definition of done should have </text:span><text:span text:style-name="T74">demanded </text:span><text:span text:style-name="T75">that the function is being called and works as planned.</text:span></text:p>
      <text:p text:style-name="P51"/>
      <text:p text:style-name="P52">The second instance is the “<text:span text:style-name="T8">login” </text:span><text:span text:style-name="T76">function. </text:span><text:span text:style-name="T77">In it, the query is formatted using string formatting. Th</text:span><text:span text:style-name="T78">is is inconsistent with other functions, and a clear sign of a poor deliverable management. The acceptance criteria for the ticket should’ve demanded that the </text:span><text:span text:style-name="T79">function uses parameterised queries </text:span><text:span text:style-name="T80">instead.</text:span></text:p>
      <text:p text:style-name="P52"/>
      <text:p text:style-name="P52"><text:soft-page-break/></text:p>
      <text:p text:style-name="P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37:33.776572914</dc:date>
    <meta:editing-duration>PT4H9M52S</meta:editing-duration>
    <meta:editing-cycles>205</meta:editing-cycles>
    <meta:document-statistic meta:table-count="0" meta:image-count="6" meta:object-count="0" meta:page-count="4" meta:paragraph-count="38" meta:word-count="720" meta:character-count="4968" meta:non-whitespace-character-count="4280"/>
  </office:meta>
</office:document-meta>
</file>