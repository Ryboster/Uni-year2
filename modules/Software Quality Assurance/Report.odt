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20970b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fo:font-weight="normal" officeooo:rsid="0020970b" fo:background-color="transparent" loext:char-shading-value="0"/>
    </style:style>
    <style:style style:name="T9" style:family="text">
      <style:text-properties fo:color="#ffffff" loext:opacity="100%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3751e3"/>
    </style:style>
    <style:style style:name="T13" style:family="text">
      <style:text-properties officeooo:rsid="00391f21"/>
    </style:style>
    <style:style style:name="T14" style:family="text">
      <style:text-properties officeooo:rsid="003f50b5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8"/>
      <text:p text:style-name="P9"><text:span text:style-name="T3">b.</text:span> Inconsistencies</text:p>
      <text:p text:style-name="P8"/>
      <text:p text:style-name="P10">The codebase contains inconsistent SQL queries. <text:span text:style-name="T4">The “login” function uses string formatting in its query:</text:span></text:p>
      <text:p text:style-name="P11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2">, which is insecure, while the “get_task” function uses <text:span text:style-name="T5">context-</text:span>appropriate parameterised queries:</text:p>
      <text:p text:style-name="P13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1"/>
      <text:p text:style-name="P11"/>
      <text:p text:style-name="P14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5">.</text:p>
      <text:p text:style-name="P16"/>
      <text:p text:style-name="P17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8"/>
      <text:p text:style-name="P19"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20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6"><text:soft-page-break/></text:p>
      <text:p text:style-name="P21"/>
      <text:p text:style-name="P22">, <text:span text:style-name="T10">while “update_task” does not:</text:span></text:p>
      <text:p text:style-name="P21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1"/>
      <text:p text:style-name="P21"/>
      <text:p text:style-name="P23"/>
      <text:p text:style-name="P23"/>
      <text:p text:style-name="P24">One other example of this is the “add_comment” function, where input is not being validated either.</text:p>
      <text:p text:style-name="P24"/>
      <text:p text:style-name="P25"/>
      <text:p text:style-name="P25"><text:span text:style-name="T11">E</text:span>rror-handling inconsistencies <text:span text:style-name="T11">were found </text:span><text:span text:style-name="T12">as well. </text:span><text:span text:style-name="T13">Some functions like “get_task” incorporate proper error handling:</text:span></text:p>
      <text:p text:style-name="P25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6"/>
      <text:p text:style-name="P26"/>
      <text:p text:style-name="P27">, <text:span text:style-name="T14">whi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02:51.170135920</dc:date>
    <meta:editing-duration>PT2H36M33S</meta:editing-duration>
    <meta:editing-cycles>46</meta:editing-cycles>
    <meta:document-statistic meta:table-count="0" meta:image-count="5" meta:object-count="0" meta:page-count="2" meta:paragraph-count="17" meta:word-count="157" meta:character-count="1192" meta:non-whitespace-character-count="1050"/>
  </office:meta>
</office:document-meta>
</file>