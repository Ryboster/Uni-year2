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c3121"/>
    </style:style>
    <style:style style:name="T95" style:family="text">
      <style:text-properties officeooo:rsid="01220a7c"/>
    </style:style>
    <style:style style:name="T96" style:family="text">
      <style:text-properties officeooo:rsid="0122538b"/>
    </style:style>
    <style:style style:name="T97" style:family="text">
      <style:text-properties officeooo:rsid="01255cd4"/>
    </style:style>
    <style:style style:name="T98" style:family="text">
      <style:text-properties officeooo:rsid="0124e2a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8">Similarly, <text:span text:style-name="T94">since the function “login” has been implemented poorly, it now requires a refactor, which vastly increases the workload – both for the original developer, as well as the reviewer.</text:span></text:p>
      <text:p text:style-name="P57"/>
      <text:p text:style-name="P59">For end users, <text:span text:style-name="T95">effective deliverable management </text:span><text:span text:style-name="T96">makes the software more reliable, consistent, and trustworthy. For example, </text:span><text:span text:style-name="T97">the function “get_task” </text:span></text:p>
      <text:p text:style-name="P59"/>
      <text:p text:style-name="P59">“<text:span text:style-name="T98">get_task”, “delete_tas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51:57.497184963</dc:date>
    <meta:editing-duration>PT4H24M1S</meta:editing-duration>
    <meta:editing-cycles>239</meta:editing-cycles>
    <meta:document-statistic meta:table-count="0" meta:image-count="6" meta:object-count="0" meta:page-count="4" meta:paragraph-count="44" meta:word-count="831" meta:character-count="5714" meta:non-whitespace-character-count="4916"/>
  </office:meta>
</office:document-meta>
</file>