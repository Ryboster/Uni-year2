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4f42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0f62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4f428"/>
    </style:style>
    <style:style style:name="T3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; </text:p>
      <text:p text:style-name="P5"/>
      <text:p text:style-name="P7">Inconsistencies between similar endpoints were found. <text:span text:style-name="T2">The cod</text:span></text:p>
      <text:p text:style-name="P8"/>
      <text:p text:style-name="P8"/>
      <text:p text:style-name="P9"/>
      <text:p text:style-name="P9"/>
      <text:p text:style-name="P9">1.1(b) <text:span text:style-name="T3">Comments suggesting incomplete workflow</text:span></text:p>
      <text:p text:style-name="P9"/>
      <text:p text:style-name="P9">1.1(c)</text:p>
      <text:p text:style-name="P9">1.1(d)</text:p>
      <text:p text:style-name="P9">1.1(e)</text:p>
      <text:p text:style-name="P9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31:13.300360583</dc:date>
    <meta:editing-duration>PT2H5M11S</meta:editing-duration>
    <meta:editing-cycles>16</meta:editing-cycles>
    <meta:document-statistic meta:table-count="0" meta:image-count="0" meta:object-count="0" meta:page-count="1" meta:paragraph-count="12" meta:word-count="80" meta:character-count="660" meta:non-whitespace-character-count="590"/>
  </office:meta>
</office:document-meta>
</file>