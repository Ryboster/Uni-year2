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c6f0d0" officeooo:paragraph-rsid="00c6f0d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paragraph-rsid="00c8eaa6"/>
    </style:style>
    <style:style style:name="P49" style:family="paragraph" style:parent-style-name="Standard">
      <style:paragraph-properties fo:text-align="start" style:justify-single-word="false"/>
      <style:text-properties fo:font-size="12pt" fo:font-weight="normal" officeooo:rsid="00c8eaa6" officeooo:paragraph-rsid="00c8eaa6"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T64" style:family="text">
      <style:text-properties officeooo:rsid="00c6f0d0"/>
    </style:style>
    <style:style style:name="T65" style:family="text">
      <style:text-properties officeooo:rsid="00c6f0d0" style:font-size-asian="12pt" style:font-weight-asian="normal" style:font-size-complex="12pt" style:font-weight-complex="normal"/>
    </style:style>
    <style:style style:name="T66" style:family="text">
      <style:text-properties officeooo:rsid="00c8eaa6" style:font-size-asian="12pt" style:font-weight-asian="normal" style:font-size-complex="12pt" style:font-weight-complex="normal"/>
    </style:style>
    <style:style style:name="T67" style:family="text">
      <style:text-properties officeooo:rsid="00cad8c6" style:font-size-asian="12pt" style:font-weight-asian="normal" style:font-size-complex="12pt"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 </text:span><text:span text:style-name="T64">e.g.</text:span></text:p>
      <text:p text:style-name="P46"/>
      <text:p text:style-name="P47">the query </text:p>
      <text:p text:style-name="P47"/>
      <text:p text:style-name="P47"/>
      <text:p text:style-name="P48"><text:span text:style-name="T65">“ </text:span><text:span text:style-name="T66">INSERT INTO tasks(title, description, priority, assigned_to, created_by) </text:span><text:span text:style-name="T65">“ </text:span><text:span text:style-name="T67">from </text:span></text:p>
      <text:p text:style-name="P47"/>
      <text:p text:style-name="P49">would become:</text:p>
      <text:p text:style-name="P49">“</text:p>
      <text:p text:style-name="P49"/>
      <text:p text:style-name="P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4:59.669588890</dc:date>
    <meta:editing-duration>PT3H47M40S</meta:editing-duration>
    <meta:editing-cycles>160</meta:editing-cycles>
    <meta:document-statistic meta:table-count="0" meta:image-count="6" meta:object-count="0" meta:page-count="3" meta:paragraph-count="39" meta:word-count="600" meta:character-count="4143" meta:non-whitespace-character-count="3574"/>
  </office:meta>
</office:document-meta>
</file>