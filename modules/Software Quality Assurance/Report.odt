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9b13a"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T184" style:family="text">
      <style:text-properties officeooo:rsid="023a30b3"/>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span text:style-name="T184">Currently, the biggest problem with the function is that it does not filter out incorrect payloads. </text:span></text:p>
      <text:p text:style-name="P113"/>
      <text:p text:style-name="P112"/>
      <text:p text:style-name="P112"><text:soft-page-break/></text:p>
      <text:p text:style-name="P112"/>
      <text:p text:style-name="P112"/>
      <text:p text:style-name="P112"/>
      <text:p text:style-name="P112"/>
      <text:p text:style-name="P112"><text:span text:style-name="T182">coverage</text:span></text:p>
      <text:p text:style-name="P112"/>
      <text:p text:style-name="P112"><text:span text:style-name="T182">coverag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13:21.062805345</dc:date>
    <meta:editing-duration>PT8H43M43S</meta:editing-duration>
    <meta:editing-cycles>442</meta:editing-cycles>
    <meta:document-statistic meta:table-count="0" meta:image-count="21" meta:object-count="0" meta:page-count="11" meta:paragraph-count="84" meta:word-count="1783" meta:character-count="11858" meta:non-whitespace-character-count="10145"/>
  </office:meta>
</office:document-meta>
</file>