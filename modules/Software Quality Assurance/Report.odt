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522c2"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113b12"/>
    </style:style>
    <style:style style:name="T88" style:family="text">
      <style:text-properties officeooo:rsid="010a71c6"/>
    </style:style>
    <style:style style:name="T89" style:family="text">
      <style:text-properties officeooo:rsid="010b50ce"/>
    </style:style>
    <style:style style:name="T90" style:family="text">
      <style:text-properties officeooo:rsid="010c89db"/>
    </style:style>
    <style:style style:name="T91" style:family="text">
      <style:text-properties officeooo:rsid="0113f17d"/>
    </style:style>
    <style:style style:name="T92" style:family="text">
      <style:text-properties officeooo:rsid="010de5ac"/>
    </style:style>
    <style:style style:name="T93" style:family="text">
      <style:text-properties officeooo:rsid="011522c2"/>
    </style:style>
    <style:style style:name="T94" style:family="text">
      <style:text-properties officeooo:rsid="0116c30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7">For developers, it helps reduce workload and deliver features quicker and more robust<text:span text:style-name="T87">ly</text:span>. It also <text:span text:style-name="T88">minimises the need for reworks </text:span><text:span text:style-name="T89">or </text:span><text:span text:style-name="T88">refactor</text:span><text:span text:style-name="T89">s. For example, if the </text:span><text:span text:style-name="T90">task for </text:span><text:span text:style-name="T91">the</text:span><text:span text:style-name="T90"> </text:span><text:span text:style-name="T89">function “validate_priority” had been </text:span><text:span text:style-name="T92">planned out properly, </text:span><text:span text:style-name="T93">the function could’ve been implemented and integrated in a single ticket, by a single developer. </text:span><text:span text:style-name="T94">Instead, since integration is a separate ticke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47:14.920938610</dc:date>
    <meta:editing-duration>PT4H19M22S</meta:editing-duration>
    <meta:editing-cycles>229</meta:editing-cycles>
    <meta:document-statistic meta:table-count="0" meta:image-count="6" meta:object-count="0" meta:page-count="4" meta:paragraph-count="41" meta:word-count="788" meta:character-count="5401" meta:non-whitespace-character-count="4644"/>
  </office:meta>
</office:document-meta>
</file>