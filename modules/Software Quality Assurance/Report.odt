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ffff" loext:opacity="100%" fo:font-size="13pt" fo:font-weight="normal" officeooo:paragraph-rsid="000379d7" fo:background-color="transparent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c21f5" officeooo:paragraph-rsid="000379d7" fo:background-color="transparent"/>
    </style:style>
    <style:style style:name="P9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70e4c" fo:background-color="transparent"/>
    </style:style>
    <style:style style:name="T1" style:family="text">
      <style:text-properties officeooo:rsid="000379d7" style:font-size-asian="11.3500003814697pt" style:font-weight-asian="normal" style:font-size-complex="13pt" style:font-weight-complex="normal"/>
    </style:style>
    <style:style style:name="T2" style:family="text">
      <style:text-properties style:font-name="Droid Sans Mono" fo:font-size="10.5pt"/>
    </style:style>
    <style:style style:name="T3" style:family="text">
      <style:text-properties officeooo:rsid="000a7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Initial examination reveals three dead functions; “validate_priority”, “format_task_for_display”, and “calculate_workload”. </text:p>
      <text:p text:style-name="P4"/>
      <text:p text:style-name="P6">1.1(a) Dead Code</text:p>
      <text:p text:style-name="P7"><text:span text:style-name="T1">Initial examination reveals the following dead lines of code: 303, 310, 319. Those lines correspond to the following methods: </text:span><text:span text:style-name="T2">validate_priority, format_task_for_display, calculate_workload.</text:span></text:p>
      <text:p text:style-name="P8"/>
      <text:p text:style-name="P8"/>
      <text:p text:style-name="P9"/>
      <text:p text:style-name="P9">Additionally, render_template_string is imported but never used.</text:p>
      <text:p text:style-name="P9"/>
      <text:p text:style-name="P6"/>
      <text:p text:style-name="P6"/>
      <text:p text:style-name="P6">1.1(b) <text:span text:style-name="T3">Comments suggesting incomplete workflow</text:span></text:p>
      <text:p text:style-name="P6"/>
      <text:p text:style-name="P6">1.1(c)</text:p>
      <text:p text:style-name="P6">1.1(d)</text:p>
      <text:p text:style-name="P6">1.1(e)</text:p>
      <text:p text:style-name="P6"/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22:05.993926384</dc:date>
    <meta:editing-duration>PT1H56M6S</meta:editing-duration>
    <meta:editing-cycles>10</meta:editing-cycles>
    <meta:document-statistic meta:table-count="0" meta:image-count="0" meta:object-count="0" meta:page-count="1" meta:paragraph-count="12" meta:word-count="65" meta:character-count="573" meta:non-whitespace-character-count="518"/>
  </office:meta>
</office:document-meta>
</file>