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3"><text:span text:style-name="T106">A</text:span><text:span text:style-name="T6">.</text:span> <text:span text:style-name="T106">Unit Testing</text:span></text:p>
      <text:p text:style-name="P64">triple A - Arrange, Act, Asse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8:14:00.532025249</dc:date>
    <meta:editing-duration>PT4H45M56S</meta:editing-duration>
    <meta:editing-cycles>256</meta:editing-cycles>
    <meta:document-statistic meta:table-count="0" meta:image-count="6" meta:object-count="0" meta:page-count="4" meta:paragraph-count="45" meta:word-count="867" meta:character-count="5912" meta:non-whitespace-character-count="5079"/>
  </office:meta>
</office:document-meta>
</file>