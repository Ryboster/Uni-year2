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3a30b3" officeooo:paragraph-rsid="023cbb6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3cbb6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p>
      <text:p text:style-name="P114"/>
      <text:p text:style-name="P114"><text:soft-page-break/><text:span text:style-name="T186">By devising a test before developing the feature, </text:span><text:s/></text:p>
      <text:p text:style-name="P115"/>
      <text:p text:style-name="P112"/>
      <text:p text:style-name="P112"/>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4:58.725665047</dc:date>
    <meta:editing-duration>PT8H45M19S</meta:editing-duration>
    <meta:editing-cycles>445</meta:editing-cycles>
    <meta:document-statistic meta:table-count="0" meta:image-count="21" meta:object-count="0" meta:page-count="11" meta:paragraph-count="85" meta:word-count="1797" meta:character-count="11962" meta:non-whitespace-character-count="10234"/>
  </office:meta>
</office:document-meta>
</file>