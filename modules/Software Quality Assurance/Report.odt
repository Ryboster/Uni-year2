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daf0b1"/>
    </style:style>
    <style:style style:name="T67" style:family="text">
      <style:text-properties officeooo:rsid="00e04467"/>
    </style:style>
    <style:style style:name="T68" style:family="text">
      <style:text-properties officeooo:rsid="00e53b62"/>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Deliverable </text:span><text:span text:style-name="T67">Management </text:span><text:span text:style-name="T66">Impact</text:span></text:p>
      <text:p text:style-name="P49"/>
      <text:p text:style-name="P49"/>
      <text:p text:style-name="P50">I identified two specific instances in the codebase where better deliverable management would have directly improved quality.</text:p>
      <text:p text:style-name="P50"/>
      <text:p text:style-name="P51">The first example is the aforementioned utility function “validate_priority”. <text:span text:style-name="T68">It was planned for, implemented, but never integrated. This is a clear sign of poor deliverable management.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27:27.796282548</dc:date>
    <meta:editing-duration>PT3H59M56S</meta:editing-duration>
    <meta:editing-cycles>185</meta:editing-cycles>
    <meta:document-statistic meta:table-count="0" meta:image-count="6" meta:object-count="0" meta:page-count="3" meta:paragraph-count="37" meta:word-count="638" meta:character-count="4431" meta:non-whitespace-character-count="3823"/>
  </office:meta>
</office:document-meta>
</file>