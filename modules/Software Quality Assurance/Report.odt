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38259" officeooo:paragraph-rsid="00238259" fo:background-color="transparent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paragraph-rsid="0020970b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a9cd0" officeooo:paragraph-rsid="002a9cd0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2505ed"/>
    </style:style>
    <style:style style:name="T5" style:family="text">
      <style:text-properties officeooo:rsid="002618e1"/>
    </style:style>
    <style:style style:name="T6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7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8" style:family="text">
      <style:text-properties officeooo:rsid="0021bc69"/>
    </style:style>
    <style:style style:name="T9" style:family="text">
      <style:text-properties officeooo:rsid="002bc841"/>
    </style:style>
    <style:style style:name="T10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5">1.1. Preliminary Codebase Examination</text:p>
      <text:p text:style-name="P5"/>
      <text:p text:style-name="P6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6"/>
      <text:p text:style-name="P6">“<text:span text:style-name="T1">flask.render_template_string” is imported but never used.</text:span></text:p>
      <text:p text:style-name="P6"/>
      <text:p text:style-name="P7">The codebase contains inconsistent SQL queries. <text:span text:style-name="T2">The “login” function uses string formatting in its query:</text:span></text:p>
      <text:p text:style-name="P7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8">, which is insecure, while the “get_task” function uses <text:span text:style-name="T3">context-</text:span>appropriate parameterised queries:</text:p>
      <text:p text:style-name="P8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7"/>
      <text:p text:style-name="P7"/>
      <text:p text:style-name="P9"><text:s/></text:p>
      <text:p text:style-name="P7"/>
      <text:p text:style-name="P7"/>
      <text:p text:style-name="P7"/>
      <text:p text:style-name="P7"/>
      <text:p text:style-name="P7"/>
      <text:p text:style-name="P7"/>
      <text:p text:style-name="P10">.</text:p>
      <text:p text:style-name="P11"/>
      <text:p text:style-name="P12"><text:span text:style-name="T4">One other place where</text:span> string formatting <text:span text:style-name="T4">is </text:span>being used in place of parameterised queries <text:span text:style-name="T5">is the</text:span> “<text:span text:style-name="T4">search_tasks</text:span>” <text:span text:style-name="T5">function.</text:span></text:p>
      <text:p text:style-name="P13"/>
      <text:p text:style-name="P14"><text:span text:style-name="T6">Input validation inconsistencies were also found. </text:span><text:span text:style-name="T7">The “create_task”</text:span> <text:span text:style-name="T8">function validates input properly:</text:span></text:p>
      <text:p text:style-name="P1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1"/>
      <text:p text:style-name="P15"/>
      <text:p text:style-name="P15">, <text:span text:style-name="T8">while “update_task” does not:</text:span></text:p>
      <text:p text:style-name="P1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text:soft-page-break/></text:p>
      <text:p text:style-name="P15"/>
      <text:p text:style-name="P15"/>
      <text:p text:style-name="P16"/>
      <text:p text:style-name="P16"/>
      <text:p text:style-name="P17">One other example of this is the “add_comment” function, where input is not being validated either.</text:p>
      <text:p text:style-name="P17"/>
      <text:p text:style-name="P16"/>
      <text:p text:style-name="P16"><text:span text:style-name="T9">E</text:span>rror-handling inconsistencies <text:span text:style-name="T9">were found. </text:span></text:p>
      <text:p text:style-name="P15"/>
      <text:p text:style-name="P15"/>
      <text:p text:style-name="P15">1.1(b) <text:span text:style-name="T10">Comments suggesting incomplete workflow</text:span></text:p>
      <text:p text:style-name="P15"/>
      <text:p text:style-name="P15">1.1(c)</text:p>
      <text:p text:style-name="P15">1.1(d)</text:p>
      <text:p text:style-name="P15">1.1(e)</text:p>
      <text:p text:style-name="P15"/>
      <text:p text:style-name="P5"/>
      <text:p text:style-name="P5"/>
      <text:p text:style-name="P5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51:37.734177418</dc:date>
    <meta:editing-duration>PT2H25M25S</meta:editing-duration>
    <meta:editing-cycles>35</meta:editing-cycles>
    <meta:document-statistic meta:table-count="0" meta:image-count="4" meta:object-count="0" meta:page-count="2" meta:paragraph-count="19" meta:word-count="149" meta:character-count="1150" meta:non-whitespace-character-count="1016"/>
  </office:meta>
</office:document-meta>
</file>