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ae9cc6" officeooo:paragraph-rsid="00ae9cc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3"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b177cd"/>
    </style:style>
    <style:style style:name="T46" style:family="text">
      <style:text-properties officeooo:rsid="00b235eb"/>
    </style:style>
    <style:style style:name="T47" style:family="text">
      <style:text-properties officeooo:rsid="006163eb"/>
    </style:style>
    <style:style style:name="T48" style:family="text">
      <style:text-properties officeooo:rsid="00712611"/>
    </style:style>
    <style:style style:name="T49" style:family="text">
      <style:text-properties officeooo:rsid="0071dcf4"/>
    </style:style>
    <style:style style:name="T50" style:family="text">
      <style:text-properties officeooo:rsid="0072ed4e"/>
    </style:style>
    <style:style style:name="T51" style:family="text">
      <style:text-properties officeooo:rsid="0074eb40"/>
    </style:style>
    <style:style style:name="T52" style:family="text">
      <style:text-properties officeooo:rsid="0076b094"/>
    </style:style>
    <style:style style:name="T53" style:family="text">
      <style:text-properties officeooo:rsid="007a110e"/>
    </style:style>
    <style:style style:name="T54" style:family="text">
      <style:text-properties officeooo:rsid="00777ba6"/>
    </style:style>
    <style:style style:name="T55" style:family="text">
      <style:text-properties officeooo:rsid="005ac241"/>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rror handling should be <text:span text:style-name="T45">applied</text:span> uniformly to each relevant function. <text:span text:style-name="T46">It should be verbose wherein if an error occurs, an appropriate HTTP error or exception is returned.</text:span></text:p>
      <text:p text:style-name="P35"/>
      <text:p text:style-name="P35"/>
      <text:p text:style-name="P35"/>
      <text:p text:style-name="P37">(Existence of record is never verified before deletion attempt – <text:span text:style-name="T47">This fails silently</text:span>).</text:p>
      <text:p text:style-name="P37"/>
      <text:p text:style-name="P37"><text:span text:style-name="T48">This quality issue could be prevented by </text:span><text:span text:style-name="T49">including error handling in each CRUD (Create, Read, Update, Delete) operation. Unit tests should be written to </text:span><text:span text:style-name="T50">test for known failure points. </text:span><text:span text:style-name="T51">Execution of said unit tests could be automated in the CI/CD pipeline </text:span><text:span text:style-name="T52">to catch </text:span><text:span text:style-name="T53">such inconsistencies</text:span><text:span text:style-name="T52"> before </text:span><text:span text:style-name="T54">deployment.</text:span><text:line-break/></text:p>
      <text:p text:style-name="P38"><text:span text:style-name="T55">E</text:span><text:span text:style-name="T5">.</text:span> <text:span text:style-name="T55">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1">This quality issue could be prevented by integrating authentication system-wide. <text:span text:style-name="T56">Integration could be tested automatically with an enumeration script </text:span><text:span text:style-name="T57">that navigates to each endpoint without appropriate permissions. </text:span></text:p>
      <text:p text:style-name="P41"/>
      <text:p text:style-name="P35"/>
      <text:p text:style-name="P35"/>
      <text:p text:style-name="P42"><text:span text:style-name="T58">F</text:span><text:span text:style-name="T5">.</text:span> <text:span text:style-name="T59">No Database Error Handling</text:span></text:p>
      <text:p text:style-name="P35"/>
      <text:p text:style-name="P43">A<text:span text:style-name="T60">cross the entire file, not one database call includes error handling. If an error was to occur in a “db.execute” call, </text:span><text:span text:style-name="T61">the application would fail. </text:span><text:span text:style-name="T62">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8:01.225798326</dc:date>
    <meta:editing-duration>PT3H30M53S</meta:editing-duration>
    <meta:editing-cycles>138</meta:editing-cycles>
    <meta:document-statistic meta:table-count="0" meta:image-count="6" meta:object-count="0" meta:page-count="3" meta:paragraph-count="32" meta:word-count="512" meta:character-count="3582" meta:non-whitespace-character-count="3095"/>
  </office:meta>
</office:document-meta>
</file>