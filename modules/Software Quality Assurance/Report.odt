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96462F6CF5.png" manifest:media-type="image/png"/>
  <manifest:file-entry manifest:full-path="Pictures/100000010000020800000030DA0392BE.png" manifest:media-type="image/png"/>
  <manifest:file-entry manifest:full-path="Pictures/10000001000001E20000005077C883AE.png" manifest:media-type="image/png"/>
  <manifest:file-entry manifest:full-path="Pictures/100000010000022D000000C8F7426F06.png" manifest:media-type="image/png"/>
  <manifest:file-entry manifest:full-path="Pictures/10000001000001E5000000C5A172BF24.png" manifest:media-type="image/png"/>
  <manifest:file-entry manifest:full-path="Pictures/10000001000002AE00000071B6E41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a5b7" officeooo:paragraph-rsid="0002a5b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a5b7" officeooo:paragraph-rsid="0002a5b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2a5b7" officeooo:paragraph-rsid="0002a5b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df3a" officeooo:paragraph-rsid="0002df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2df3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07859" officeooo:paragraph-rsid="0030785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21f5" officeooo:paragraph-rsid="000c21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21f5" officeooo:paragraph-rsid="000c21f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1f879" officeooo:paragraph-rsid="0031f87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f428" officeooo:paragraph-rsid="001ab48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4f428" officeooo:paragraph-rsid="001ab48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b48e" officeooo:paragraph-rsid="001ab4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ab48e" officeooo:paragraph-rsid="001ab48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6e436" officeooo:paragraph-rsid="001ab48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0f62b" officeooo:paragraph-rsid="001ab48e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70e4c" officeooo:paragraph-rsid="0002df3a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38259" officeooo:paragraph-rsid="00238259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2pt" fo:font-weight="normal" officeooo:rsid="0020970b" officeooo:paragraph-rsid="0020970b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paragraph-rsid="0020970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paragraph-rsid="0020970b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0379d7" officeooo:paragraph-rsid="000379d7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379d7" officeooo:paragraph-rsid="000379d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238259" officeooo:paragraph-rsid="00238259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a9cd0" officeooo:paragraph-rsid="002a9cd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23825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02df3a" officeooo:paragraph-rsid="000379d7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38259" officeooo:paragraph-rsid="003f50b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T1" style:family="text">
      <style:text-properties officeooo:rsid="0032f33d"/>
    </style:style>
    <style:style style:name="T2" style:family="text">
      <style:text-properties officeooo:rsid="000d801d"/>
    </style:style>
    <style:style style:name="T3" style:family="text">
      <style:text-properties officeooo:rsid="0034883b"/>
    </style:style>
    <style:style style:name="T4" style:family="text">
      <style:text-properties officeooo:rsid="0016e436"/>
    </style:style>
    <style:style style:name="T5" style:family="text">
      <style:text-properties officeooo:rsid="001cb2f1"/>
    </style:style>
    <style:style style:name="T6" style:family="text">
      <style:text-properties officeooo:rsid="002505ed"/>
    </style:style>
    <style:style style:name="T7" style:family="text">
      <style:text-properties officeooo:rsid="002618e1"/>
    </style:style>
    <style:style style:name="T8" style:family="text">
      <style:text-properties fo:color="#ffffff" loext:opacity="100%" fo:font-weight="normal" officeooo:rsid="0020970b" fo:background-color="transparent" loext:char-shading-value="0"/>
    </style:style>
    <style:style style:name="T9" style:family="text">
      <style:text-properties fo:color="#ffffff" loext:opacity="100%" fo:font-weight="normal" officeooo:rsid="0021bc69" fo:background-color="transparent" loext:char-shading-value="0"/>
    </style:style>
    <style:style style:name="T10" style:family="text">
      <style:text-properties officeooo:rsid="0021bc69"/>
    </style:style>
    <style:style style:name="T11" style:family="text">
      <style:text-properties officeooo:rsid="002bc841"/>
    </style:style>
    <style:style style:name="T12" style:family="text">
      <style:text-properties officeooo:rsid="003751e3"/>
    </style:style>
    <style:style style:name="T13" style:family="text">
      <style:text-properties officeooo:rsid="00391f21"/>
    </style:style>
    <style:style style:name="T14" style:family="text">
      <style:text-properties officeooo:rsid="003f50b5"/>
    </style:style>
    <style:style style:name="T15" style:family="text">
      <style:text-properties officeooo:rsid="0040684a"/>
    </style:style>
    <style:style style:name="T16" style:family="text">
      <style:text-properties officeooo:rsid="0044f875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and Testing Report</text:p>
      <text:p text:style-name="P2"/>
      <text:p text:style-name="P3"/>
      <text:p text:style-name="P4">1. Deliverable Management and Quality Impact</text:p>
      <text:p text:style-name="P4"/>
      <text:p text:style-name="P4">1.1. Preliminary Codebase Examination</text:p>
      <text:p text:style-name="P5"/>
      <text:p text:style-name="P6"><text:span text:style-name="T1">a.</text:span> Dead Code</text:p>
      <text:p text:style-name="P5"/>
      <text:p text:style-name="P7">Initial examination reveals three dead functions; “validate_priority”, “format_task_for_display”, and “calculate_workload”. <text:span text:style-name="T2">A comment in “validate_priority” informs the user about this. This suggests that while validation logic was planned for and implemented, it was never integrated, suggesting rushed delivery.</text:span></text:p>
      <text:p text:style-name="P7"/>
      <text:p text:style-name="P7">“<text:span text:style-name="T2">flask.render_template_string” is imported but never used.</text:span></text:p>
      <text:p text:style-name="P7"/>
      <text:p text:style-name="P8"/>
      <text:p text:style-name="P9"><text:span text:style-name="T3">b.</text:span> Inconsistencies</text:p>
      <text:p text:style-name="P8"/>
      <text:p text:style-name="P10">The codebase contains inconsistent SQL queries. <text:span text:style-name="T4">The “login” function uses string formatting in its query:</text:span></text:p>
      <text:p text:style-name="P11"><draw:frame draw:style-name="fr1" draw:name="Image2" text:anchor-type="char" svg:y="0.476cm" svg:width="17cm" svg:height="2.799cm" draw:z-index="1"><draw:image xlink:href="Pictures/10000001000002AE00000071B6E4150B.png" xlink:type="simple" xlink:show="embed" xlink:actuate="onLoad" draw:mime-type="image/png"/></draw:frame></text:p>
      <text:p text:style-name="P12">, which is insecure, while the “get_task” function uses <text:span text:style-name="T5">context-</text:span>appropriate parameterised queries:</text:p>
      <text:p text:style-name="P13"><draw:frame draw:style-name="fr2" draw:name="Image1" text:anchor-type="char" svg:y="0.319cm" svg:width="14.737cm" svg:height="5.292cm" draw:z-index="0"><draw:image xlink:href="Pictures/100000010000022D000000C8F7426F06.png" xlink:type="simple" xlink:show="embed" xlink:actuate="onLoad" draw:mime-type="image/png"/></draw:frame></text:p>
      <text:p text:style-name="P11"/>
      <text:p text:style-name="P11"/>
      <text:p text:style-name="P14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5">.</text:p>
      <text:p text:style-name="P16"/>
      <text:p text:style-name="P17"><text:span text:style-name="T6">One other place where</text:span> string formatting <text:span text:style-name="T6">is </text:span>being used in place of parameterised queries <text:span text:style-name="T7">is the</text:span> “<text:span text:style-name="T6">search_tasks</text:span>” <text:span text:style-name="T7">function.</text:span></text:p>
      <text:p text:style-name="P18"/>
      <text:p text:style-name="P19"><text:span text:style-name="T8">Input validation inconsistencies were also found. </text:span><text:span text:style-name="T9">The “create_task”</text:span> <text:span text:style-name="T10">function validates input properly:</text:span></text:p>
      <text:p text:style-name="P20"><draw:frame draw:style-name="fr3" draw:name="Image3" text:anchor-type="char" svg:width="13.758cm" svg:height="1.27cm" draw:z-index="2"><draw:image xlink:href="Pictures/100000010000020800000030DA0392BE.png" xlink:type="simple" xlink:show="embed" xlink:actuate="onLoad" draw:mime-type="image/png"/></draw:frame></text:p>
      <text:p text:style-name="P16"><text:soft-page-break/></text:p>
      <text:p text:style-name="P21"/>
      <text:p text:style-name="P22">, <text:span text:style-name="T10">while “update_task” does not:</text:span></text:p>
      <text:p text:style-name="P21"><draw:frame draw:style-name="fr3" draw:name="Image4" text:anchor-type="char" svg:width="12.753cm" svg:height="2.117cm" draw:z-index="3"><draw:image xlink:href="Pictures/10000001000001E20000005077C883AE.png" xlink:type="simple" xlink:show="embed" xlink:actuate="onLoad" draw:mime-type="image/png"/></draw:frame></text:p>
      <text:p text:style-name="P21"/>
      <text:p text:style-name="P21"/>
      <text:p text:style-name="P23"/>
      <text:p text:style-name="P23"/>
      <text:p text:style-name="P24">One other example of this is the “add_comment” function, where input is not being validated either.</text:p>
      <text:p text:style-name="P24"/>
      <text:p text:style-name="P25"/>
      <text:p text:style-name="P25"><text:span text:style-name="T11">E</text:span>rror-handling inconsistencies <text:span text:style-name="T11">were found </text:span><text:span text:style-name="T12">as well. </text:span><text:span text:style-name="T13">Some functions like “get_task” incorporate proper error handling:</text:span></text:p>
      <text:p text:style-name="P25"><draw:frame draw:style-name="fr3" draw:name="Image5" text:anchor-type="char" svg:width="12.832cm" svg:height="5.212cm" draw:z-index="4"><draw:image xlink:href="Pictures/10000001000001E5000000C5A172BF24.png" xlink:type="simple" xlink:show="embed" xlink:actuate="onLoad" draw:mime-type="image/png"/></draw:frame></text:p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6"/>
      <text:p text:style-name="P26"/>
      <text:p text:style-name="P27">, <text:span text:style-name="T14">while </text:span><text:span text:style-name="T15">other functions like “delete_task” do not:</text:span></text:p>
      <text:p text:style-name="P27"><draw:frame draw:style-name="fr3" draw:name="Image6" text:anchor-type="char" svg:width="13.811cm" svg:height="3.969cm" draw:z-index="5"><draw:image xlink:href="Pictures/100000010000020A00000096462F6CF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(Existence of record is never verified before deletion attempt). <text:span text:style-name="T16">Other examples include: 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3:25:54.934564791</meta:creation-date>
    <meta:generator>LibreOffice/25.8.3.2$Linux_X86_64 LibreOffice_project/8ca8d55c161d602844f5428fa4b58097424e324e</meta:generator>
    <dc:date>2026-05-24T16:05:13.623410971</dc:date>
    <meta:editing-duration>PT2H38M53S</meta:editing-duration>
    <meta:editing-cycles>49</meta:editing-cycles>
    <meta:document-statistic meta:table-count="0" meta:image-count="6" meta:object-count="0" meta:page-count="2" meta:paragraph-count="18" meta:word-count="175" meta:character-count="1324" meta:non-whitespace-character-count="1164"/>
  </office:meta>
</office:document-meta>
</file>