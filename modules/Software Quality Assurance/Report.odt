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daf0b1"/>
    </style:style>
    <style:style style:name="T67" style:family="text">
      <style:text-properties officeooo:rsid="00e04467"/>
    </style:style>
    <style:style style:name="T68" style:family="text">
      <style:text-properties officeooo:rsid="00ee5d02"/>
    </style:style>
    <style:style style:name="T69" style:family="text">
      <style:text-properties officeooo:rsid="00e53b62"/>
    </style:style>
    <style:style style:name="T70" style:family="text">
      <style:text-properties officeooo:rsid="00e5de6c"/>
    </style:style>
    <style:style style:name="T71" style:family="text">
      <style:text-properties officeooo:rsid="00e7c890"/>
    </style:style>
    <style:style style:name="T72" style:family="text">
      <style:text-properties officeooo:rsid="00e7ff9d"/>
    </style:style>
    <style:style style:name="T73" style:family="text">
      <style:text-properties officeooo:rsid="00e8d30f"/>
    </style:style>
    <style:style style:name="T74" style:family="text">
      <style:text-properties officeooo:rsid="00ebe782"/>
    </style:style>
    <style:style style:name="T75" style:family="text">
      <style:text-properties officeooo:rsid="00ec0ec1"/>
    </style:style>
    <style:style style:name="T76" style:family="text">
      <style:text-properties officeooo:rsid="00f07ecf"/>
    </style:style>
    <style:style style:name="T77" style:family="text">
      <style:text-properties officeooo:rsid="00f1408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Deliverable </text:span><text:span text:style-name="T67">Management </text:span><text:span text:style-name="T66">Impac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8">instance</text:span> is the aforementioned utility function “validate_priority”. <text:span text:style-name="T69">It was planned for, implemented, but never integrated. This is a clear sign of poor deliverable management. </text:span><text:span text:style-name="T70">The task should </text:span><text:span text:style-name="T71">have necessitated integration of this function instead of </text:span><text:span text:style-name="T72">splitting the task into two separate tickets. </text:span><text:span text:style-name="T73">Additionally, a definition of done should have </text:span><text:span text:style-name="T74">demanded </text:span><text:span text:style-name="T75">that the function is being called and works as planned.</text:span></text:p>
      <text:p text:style-name="P51"/>
      <text:p text:style-name="P52">The second instance is the “<text:span text:style-name="T8">login” </text:span><text:span text:style-name="T76">function. </text:span><text:span text:style-name="T77">In it, the query is formatted using string formatting. Th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35:41.701213572</dc:date>
    <meta:editing-duration>PT4H8M4S</meta:editing-duration>
    <meta:editing-cycles>198</meta:editing-cycles>
    <meta:document-statistic meta:table-count="0" meta:image-count="6" meta:object-count="0" meta:page-count="3" meta:paragraph-count="38" meta:word-count="691" meta:character-count="4767" meta:non-whitespace-character-count="4107"/>
  </office:meta>
</office:document-meta>
</file>