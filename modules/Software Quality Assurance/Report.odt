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2DF0000034A79C0E4E3.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3"><text:span text:style-name="T106">A</text:span><text:span text:style-name="T6">.</text:span> <text:span text:style-name="T106">Unit Testing</text:span></text:p>
      <text:p text:style-name="P64"><text:span text:style-name="T101">is issue, </text:span><text:span text:style-name="T102">they may lose trust in the </text:span><text:span text:style-name="T103">product. </text:span></text:p>
      <text:p text:style-name="P64"/>
      <text:p text:style-name="P65"/>
      <text:p text:style-name="P65"/>
      <text:p text:style-name="P65"/>
      <text:p text:style-name="P65"><draw:frame draw:style-name="fr5" draw:name="Image7" text:anchor-type="char" svg:width="17cm" svg:height="19.475cm" draw:z-index="6"><draw:image xlink:href="Pictures/10000001000002DF0000034A79C0E4E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42:31.563605685</dc:date>
    <meta:editing-duration>PT6H14M27S</meta:editing-duration>
    <meta:editing-cycles>257</meta:editing-cycles>
    <meta:document-statistic meta:table-count="0" meta:image-count="7" meta:object-count="0" meta:page-count="5" meta:paragraph-count="45" meta:word-count="870" meta:character-count="5927" meta:non-whitespace-character-count="5090"/>
  </office:meta>
</office:document-meta>
</file>