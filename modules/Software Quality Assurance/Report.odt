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18000000B814111214.png" manifest:media-type="image/png"/>
  <manifest:file-entry manifest:full-path="Pictures/100000010000030E0000013BABDA1CAA.png" manifest:media-type="image/png"/>
  <manifest:file-entry manifest:full-path="Pictures/1000000100000466000000FE965E3CDE.png" manifest:media-type="image/png"/>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2200000088320A0B57.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1c64320" officeooo:paragraph-rsid="01c64320"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3pt" fo:font-weight="bold" officeooo:rsid="0031f879" officeooo:paragraph-rsid="01d214b4"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fo:font-size="12pt" fo:font-style="normal" style:text-underline-style="none" fo:font-weight="normal" officeooo:rsid="01c64320" officeooo:paragraph-rsid="01d79a95"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none" fo:font-weight="normal" officeooo:rsid="01d79a95" officeooo:paragraph-rsid="01d79a95"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style:text-underline-style="none" fo:font-weight="bold" officeooo:rsid="01dd3514" officeooo:paragraph-rsid="01dd3514" style:font-size-asian="12pt" style:font-style-asian="normal" style:font-weight-asian="bold" style:font-size-complex="12pt" style:font-style-complex="normal" style:font-weight-complex="bold"/>
    </style:style>
    <style:style style:name="P93"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e63bcd" style:font-size-asian="12pt" style:font-style-asian="normal" style:font-weight-asian="normal" style:font-size-complex="12pt" style:font-style-complex="normal" style:font-weight-complex="normal"/>
    </style:style>
    <style:style style:name="P94"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dfbce9" style:font-size-asian="12pt" style:font-style-asian="normal" style:font-weight-asian="normal" style:font-size-complex="12pt" style:font-style-complex="normal" style:font-weight-complex="normal"/>
    </style:style>
    <style:style style:name="P95" style:family="paragraph" style:parent-style-name="Standard" style:list-style-name="L1">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6" style:family="paragraph" style:parent-style-name="Standard" style:list-style-name="L1">
      <style:paragraph-properties fo:text-align="start" style:justify-single-word="false"/>
      <style:text-properties fo:font-size="12pt" fo:font-style="normal" style:text-underline-style="none" fo:font-weight="normal" officeooo:rsid="01e8955a" officeooo:paragraph-rsid="01e8955a"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start" style:justify-single-word="false"/>
      <style:text-properties fo:font-size="12pt" fo:font-style="normal" style:text-underline-style="none" fo:font-weight="normal" officeooo:rsid="01dddb38" officeooo:paragraph-rsid="01dddb38" style:font-size-asian="12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start" style:justify-single-word="false"/>
      <style:text-properties fo:font-size="12pt" fo:font-style="normal" style:text-underline-style="none" fo:font-weight="normal" officeooo:rsid="01eb2eea" officeooo:paragraph-rsid="01eb2eea"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style:text-underline-style="none" fo:font-weight="normal" officeooo:rsid="01dd3514" officeooo:paragraph-rsid="01dd46ad"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officeooo:paragraph-rsid="01fa0d7d"/>
    </style:style>
    <style:style style:name="P103" style:family="paragraph" style:parent-style-name="Standard">
      <style:paragraph-properties fo:text-align="start" style:justify-single-word="false"/>
      <style:text-properties fo:font-size="13pt" fo:font-weight="bold" officeooo:rsid="0031f879" officeooo:paragraph-rsid="01fc6890" style:font-size-asian="11.3500003814697pt" style:font-weight-asian="bold" style:font-size-complex="13pt" style:font-weight-complex="bold"/>
    </style:style>
    <style:style style:name="P104" style:family="paragraph" style:parent-style-name="Standard">
      <style:paragraph-properties fo:text-align="start" style:justify-single-word="false"/>
      <style:text-properties fo:font-size="12pt" fo:font-style="normal" style:text-underline-style="none" fo:font-weight="normal" officeooo:rsid="01c64320" officeooo:paragraph-rsid="01fc6890"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style:text-underline-style="none" fo:font-weight="normal" officeooo:rsid="0201419b" officeooo:paragraph-rsid="02025a2d"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style:text-underline-style="none" fo:font-weight="normal" officeooo:rsid="02042623" officeooo:paragraph-rsid="02042623"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style:text-underline-style="none" fo:font-weight="normal" officeooo:rsid="0201419b" officeooo:paragraph-rsid="0203374f"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style:text-underline-style="none" fo:font-weight="normal" officeooo:rsid="02025a2d" officeooo:paragraph-rsid="0203374f"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size="12pt" fo:font-style="normal" style:text-underline-style="none" fo:font-weight="normal" officeooo:rsid="020b9eff" officeooo:paragraph-rsid="020b9eff"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font-size="12pt" fo:font-style="normal" style:text-underline-style="none" fo:font-weight="normal" officeooo:rsid="022187e3" officeooo:paragraph-rsid="022187e3"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font-size="13pt" fo:font-weight="bold" officeooo:rsid="0031f879" officeooo:paragraph-rsid="022aba60" style:font-size-asian="11.3500003814697pt" style:font-weight-asian="bold" style:font-size-complex="13pt" style:font-weight-complex="bold"/>
    </style:style>
    <style:style style:name="P112" style:family="paragraph" style:parent-style-name="Standard">
      <style:paragraph-properties fo:text-align="start" style:justify-single-word="false"/>
      <style:text-properties fo:font-size="12pt" fo:font-style="normal" style:text-underline-style="none" fo:font-weight="normal" officeooo:rsid="022187e3" officeooo:paragraph-rsid="02393fb1"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fo:font-size="12pt" fo:font-style="normal" style:text-underline-style="none" fo:font-weight="normal" officeooo:rsid="0239b13a" officeooo:paragraph-rsid="023cbb63" style:font-size-asian="12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fo:font-size="12pt" fo:font-style="normal" style:text-underline-style="none" fo:font-weight="normal" officeooo:rsid="0246d9f3" officeooo:paragraph-rsid="0246d9f3"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officeooo:paragraph-rsid="02586010"/>
    </style:style>
    <style:style style:name="P116" style:family="paragraph" style:parent-style-name="Standard">
      <style:paragraph-properties fo:text-align="start" style:justify-single-word="false"/>
      <style:text-properties fo:font-size="12pt" fo:font-style="normal" style:text-underline-style="none" fo:font-weight="normal" officeooo:rsid="025927bb" officeooo:paragraph-rsid="02586010" style:font-size-asian="12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fo:font-size="12pt" fo:font-style="normal" style:text-underline-style="none" fo:font-weight="normal" officeooo:rsid="022187e3" officeooo:paragraph-rsid="02586010" style:font-size-asian="12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fo:font-size="15pt" fo:font-weight="bold" officeooo:rsid="02613432" officeooo:paragraph-rsid="02613432" style:font-size-asian="15pt" style:font-weight-asian="bold" style:font-size-complex="15pt" style:font-weight-complex="bold"/>
    </style:style>
    <style:style style:name="P119" style:family="paragraph" style:parent-style-name="Standard">
      <style:paragraph-properties fo:text-align="start" style:justify-single-word="false"/>
      <style:text-properties fo:font-size="12pt" fo:font-style="normal" style:text-underline-style="none" fo:font-weight="normal" officeooo:rsid="025a1d5c" officeooo:paragraph-rsid="02640e53" style:font-size-asian="12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fo:font-size="12pt" fo:font-style="normal" style:text-underline-style="none" fo:font-weight="normal" officeooo:rsid="0265c2e6" officeooo:paragraph-rsid="0265c2e6"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d3dd9d"/>
    </style:style>
    <style:style style:name="T145" style:family="text">
      <style:text-properties officeooo:rsid="01c32546"/>
    </style:style>
    <style:style style:name="T146" style:family="text">
      <style:text-properties officeooo:rsid="01c55cb8"/>
    </style:style>
    <style:style style:name="T147" style:family="text">
      <style:text-properties officeooo:rsid="01c83915"/>
    </style:style>
    <style:style style:name="T148" style:family="text">
      <style:text-properties officeooo:rsid="01ca468c"/>
    </style:style>
    <style:style style:name="T149" style:family="text">
      <style:text-properties officeooo:rsid="01c8e819"/>
    </style:style>
    <style:style style:name="T150" style:family="text">
      <style:text-properties officeooo:rsid="01c96731"/>
    </style:style>
    <style:style style:name="T151" style:family="text">
      <style:text-properties fo:font-style="italic" officeooo:rsid="01c96731" style:font-style-asian="italic" style:font-style-complex="italic"/>
    </style:style>
    <style:style style:name="T152" style:family="text">
      <style:text-properties officeooo:rsid="01ca246d"/>
    </style:style>
    <style:style style:name="T153" style:family="text">
      <style:text-properties officeooo:rsid="01cdda7f"/>
    </style:style>
    <style:style style:name="T154" style:family="text">
      <style:text-properties officeooo:rsid="01cf5f83"/>
    </style:style>
    <style:style style:name="T155" style:family="text">
      <style:text-properties officeooo:rsid="01d0a08b"/>
    </style:style>
    <style:style style:name="T156" style:family="text">
      <style:text-properties officeooo:rsid="01d214b4"/>
    </style:style>
    <style:style style:name="T157" style:family="text">
      <style:text-properties officeooo:rsid="01d5a709"/>
    </style:style>
    <style:style style:name="T158" style:family="text">
      <style:text-properties officeooo:rsid="01dab665"/>
    </style:style>
    <style:style style:name="T159" style:family="text">
      <style:text-properties officeooo:rsid="01e63bcd"/>
    </style:style>
    <style:style style:name="T160" style:family="text">
      <style:text-properties officeooo:rsid="01e6b5e7"/>
    </style:style>
    <style:style style:name="T161" style:family="text">
      <style:text-properties officeooo:rsid="01e7c21f"/>
    </style:style>
    <style:style style:name="T162" style:family="text">
      <style:text-properties fo:font-size="12pt" fo:font-style="normal" style:text-underline-style="none" fo:font-weight="normal" officeooo:rsid="01f4b4e6" style:font-size-asian="12pt" style:font-style-asian="normal" style:font-weight-asian="normal" style:font-size-complex="12pt" style:font-style-complex="normal" style:font-weight-complex="normal"/>
    </style:style>
    <style:style style:name="T163" style:family="text">
      <style:text-properties fo:font-size="12pt" fo:font-style="normal" style:text-underline-style="none" fo:font-weight="normal" officeooo:rsid="01f6aae2" style:font-size-asian="12pt" style:font-style-asian="normal" style:font-weight-asian="normal" style:font-size-complex="12pt" style:font-style-complex="normal" style:font-weight-complex="normal"/>
    </style:style>
    <style:style style:name="T164" style:family="text">
      <style:text-properties fo:font-size="12pt" fo:font-style="normal" style:text-underline-style="none" fo:font-weight="normal" officeooo:rsid="01fa0d7d" style:font-size-asian="12pt" style:font-style-asian="normal" style:font-weight-asian="normal" style:font-size-complex="12pt" style:font-style-complex="normal" style:font-weight-complex="normal"/>
    </style:style>
    <style:style style:name="T165" style:family="text">
      <style:text-properties officeooo:rsid="01fcaa2d"/>
    </style:style>
    <style:style style:name="T166" style:family="text">
      <style:text-properties officeooo:rsid="02025a2d"/>
    </style:style>
    <style:style style:name="T167" style:family="text">
      <style:text-properties officeooo:rsid="0205c711"/>
    </style:style>
    <style:style style:name="T168" style:family="text">
      <style:text-properties officeooo:rsid="02076f45"/>
    </style:style>
    <style:style style:name="T169" style:family="text">
      <style:text-properties officeooo:rsid="02093966"/>
    </style:style>
    <style:style style:name="T170" style:family="text">
      <style:text-properties officeooo:rsid="020c49b7"/>
    </style:style>
    <style:style style:name="T171" style:family="text">
      <style:text-properties officeooo:rsid="020e2427"/>
    </style:style>
    <style:style style:name="T172" style:family="text">
      <style:text-properties officeooo:rsid="020f71b7"/>
    </style:style>
    <style:style style:name="T173" style:family="text">
      <style:text-properties officeooo:rsid="02157ba0"/>
    </style:style>
    <style:style style:name="T174" style:family="text">
      <style:text-properties officeooo:rsid="021766f2"/>
    </style:style>
    <style:style style:name="T175" style:family="text">
      <style:text-properties officeooo:rsid="0211bb1b"/>
    </style:style>
    <style:style style:name="T176" style:family="text">
      <style:text-properties officeooo:rsid="021c145f"/>
    </style:style>
    <style:style style:name="T177" style:family="text">
      <style:text-properties officeooo:rsid="021da8a1"/>
    </style:style>
    <style:style style:name="T178" style:family="text">
      <style:text-properties officeooo:rsid="021f48f6"/>
    </style:style>
    <style:style style:name="T179" style:family="text">
      <style:text-properties officeooo:rsid="02247d22"/>
    </style:style>
    <style:style style:name="T180" style:family="text">
      <style:text-properties officeooo:rsid="0224c29b"/>
    </style:style>
    <style:style style:name="T181" style:family="text">
      <style:text-properties officeooo:rsid="02268398"/>
    </style:style>
    <style:style style:name="T182" style:family="text">
      <style:text-properties officeooo:rsid="02279a26"/>
    </style:style>
    <style:style style:name="T183" style:family="text">
      <style:text-properties officeooo:rsid="022c8c53"/>
    </style:style>
    <style:style style:name="T184" style:family="text">
      <style:text-properties officeooo:rsid="023a30b3"/>
    </style:style>
    <style:style style:name="T185" style:family="text">
      <style:text-properties officeooo:rsid="023a9a89"/>
    </style:style>
    <style:style style:name="T186" style:family="text">
      <style:text-properties officeooo:rsid="02455c04"/>
    </style:style>
    <style:style style:name="T187" style:family="text">
      <style:text-properties officeooo:rsid="0246d9f3"/>
    </style:style>
    <style:style style:name="T188" style:family="text">
      <style:text-properties officeooo:rsid="024f34c2"/>
    </style:style>
    <style:style style:name="T189" style:family="text">
      <style:text-properties fo:font-size="12pt" fo:font-style="normal" style:text-underline-style="none" fo:font-weight="normal" officeooo:rsid="0246d9f3" style:font-size-asian="12pt" style:font-style-asian="normal" style:font-weight-asian="normal" style:font-size-complex="12pt" style:font-style-complex="normal" style:font-weight-complex="normal"/>
    </style:style>
    <style:style style:name="T190" style:family="text">
      <style:text-properties fo:font-size="12pt" fo:font-style="normal" style:text-underline-style="none" fo:font-weight="normal" officeooo:rsid="024feae8" style:font-size-asian="12pt" style:font-style-asian="normal" style:font-weight-asian="normal" style:font-size-complex="12pt" style:font-style-complex="normal" style:font-weight-complex="normal"/>
    </style:style>
    <style:style style:name="T191" style:family="text">
      <style:text-properties fo:font-size="12pt" fo:font-style="normal" style:text-underline-style="none" fo:font-weight="normal" officeooo:rsid="02488339" style:font-size-asian="12pt" style:font-style-asian="normal" style:font-weight-asian="normal" style:font-size-complex="12pt" style:font-style-complex="normal" style:font-weight-complex="normal"/>
    </style:style>
    <style:style style:name="T192" style:family="text">
      <style:text-properties fo:font-size="12pt" fo:font-style="normal" style:text-underline-style="none" fo:font-weight="normal" officeooo:rsid="025415c1" style:font-size-asian="12pt" style:font-style-asian="normal" style:font-weight-asian="normal" style:font-size-complex="12pt" style:font-style-complex="normal" style:font-weight-complex="normal"/>
    </style:style>
    <style:style style:name="T193" style:family="text">
      <style:text-properties fo:font-size="12pt" fo:font-style="normal" style:text-underline-style="none" fo:font-weight="normal" officeooo:rsid="02586010" style:font-size-asian="12pt" style:font-style-asian="normal" style:font-weight-asian="normal" style:font-size-complex="12pt" style:font-style-complex="normal" style:font-weight-complex="normal"/>
    </style:style>
    <style:style style:name="T194" style:family="text">
      <style:text-properties fo:font-size="12pt" fo:font-style="normal" style:text-underline-style="none" fo:font-weight="normal" officeooo:rsid="025927bb" style:font-size-asian="12pt" style:font-style-asian="normal" style:font-weight-asian="normal" style:font-size-complex="12pt" style:font-style-complex="normal" style:font-weight-complex="normal"/>
    </style:style>
    <style:style style:name="T195" style:family="text">
      <style:text-properties fo:font-size="12pt" fo:font-style="normal" style:text-underline-style="none" fo:font-weight="normal" officeooo:rsid="025bcece" style:font-size-asian="12pt" style:font-style-asian="normal" style:font-weight-asian="normal" style:font-size-complex="12pt" style:font-style-complex="normal" style:font-weight-complex="normal"/>
    </style:style>
    <style:style style:name="T196" style:family="text">
      <style:text-properties fo:font-size="12pt" fo:font-style="normal" style:text-underline-style="none" fo:font-weight="normal" officeooo:rsid="025a1d5c" style:font-size-asian="12pt" style:font-style-asian="normal" style:font-weight-asian="normal" style:font-size-complex="12pt" style:font-style-complex="normal" style:font-weight-complex="normal"/>
    </style:style>
    <style:style style:name="T197" style:family="text">
      <style:text-properties officeooo:rsid="026ab665"/>
    </style:style>
    <style:style style:name="T198" style:family="text">
      <style:text-properties officeooo:rsid="02676511"/>
    </style:style>
    <style:style style:name="T199" style:family="text">
      <style:text-properties officeooo:rsid="02676ead"/>
    </style:style>
    <style:style style:name="T200" style:family="text">
      <style:text-properties officeooo:rsid="026d890b"/>
    </style:style>
    <style:style style:name="T201" style:family="text">
      <style:text-properties officeooo:rsid="026f02d4"/>
    </style:style>
    <style:style style:name="T202" style:family="text">
      <style:text-properties officeooo:rsid="026f56b3"/>
    </style:style>
    <style:style style:name="T203" style:family="text">
      <style:text-properties officeooo:rsid="02706672"/>
    </style:style>
    <style:style style:name="T204" style:family="text">
      <style:text-properties officeooo:rsid="02722b29"/>
    </style:style>
    <style:style style:name="T205" style:family="text">
      <style:text-properties officeooo:rsid="02733507"/>
    </style:style>
    <style:style style:name="T206" style:family="text">
      <style:text-properties officeooo:rsid="027421ed"/>
    </style:style>
    <style:style style:name="T207" style:family="text">
      <style:text-properties officeooo:rsid="0274a345"/>
    </style:style>
    <style:style style:name="T208" style:family="text">
      <style:text-properties officeooo:rsid="02761728"/>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44">Integration</text:span><text:span text:style-name="T106">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5">s written earlier don’t actually verify the results of their operations. Unit tests in principle only test that a given unit responsible for a given piece of functionality functions as expected, e.g. that the function “create_task” responds with the </text:span><text:span text:style-name="T146">status code 201 when given correct payload.</text:span></text:p>
      <text:p text:style-name="P88"/>
      <text:p text:style-name="P88">To address this blind spot, integration tests are used instead. <text:span text:style-name="T147">By using an integration test, we can test </text:span><text:span text:style-name="T148">integrations between </text:span><text:span text:style-name="T147">multiple units in to </text:span><text:span text:style-name="T149">verify </text:span><text:span text:style-name="T150">a given </text:span><text:span text:style-name="T151">behaviour </text:span><text:span text:style-name="T150">is true, </text:span><text:span text:style-name="T152">e.g. that “</text:span><text:span text:style-name="T148">create_task” actually </text:span><text:span text:style-name="T153">inserts the new record into the database, </text:span><text:span text:style-name="T154">and that “get_tasks” actually detects that </text:span><text:span text:style-name="T155">change</text:span><text:span text:style-name="T154">.</text:span></text:p>
      <text:p text:style-name="P88"/>
      <text:p text:style-name="P88"><draw:frame draw:style-name="fr1" draw:name="Image18" text:anchor-type="char" svg:y="0.415cm" svg:width="17cm" svg:height="3.835cm" draw:z-index="17"><draw:image xlink:href="Pictures/1000000100000466000000FE965E3CDE.png" xlink:type="simple" xlink:show="embed" xlink:actuate="onLoad" draw:mime-type="image/png"/></draw:frame><text:soft-page-break/></text:p>
      <text:p text:style-name="P82"/>
      <text:p text:style-name="P82"><draw:frame draw:style-name="fr3" draw:name="Image19" text:anchor-type="char" svg:width="17cm" svg:height="6.847cm" draw:z-index="18"><draw:image xlink:href="Pictures/100000010000030E0000013BABDA1CAA.png" xlink:type="simple" xlink:show="embed" xlink:actuate="onLoad" draw:mime-type="image/png"/></draw:frame></text:p>
      <text:p text:style-name="P82"/>
      <text:p text:style-name="P82"/>
      <text:p text:style-name="P82"/>
      <text:p text:style-name="P89"><text:span text:style-name="T156">C</text:span><text:span text:style-name="T6">.</text:span> <text:span text:style-name="T157">Non-Execution</text:span><text:span text:style-name="T106"> </text:span><text:span text:style-name="T157">Verification</text:span></text:p>
      <text:p text:style-name="P90"/>
      <text:p text:style-name="P91">The provided script was linted using 2 separate linting libraries; Pylint and flake8. <text:span text:style-name="T158">Each returned slightly different results with a single overlap between them. </text:span></text:p>
      <text:p text:style-name="P91"/>
      <text:p text:style-name="P92">Style Violations</text:p>
      <text:list text:style-name="L1">
        <text:list-item>
          <text:p text:style-name="P93">E501 – This is a flake8 style violation. </text:p>
          <text:list>
            <text:list-item>
              <text:p text:style-name="P93"><text:span text:style-name="T159">This</text:span> means that the specified line of code exceeded the recommended length limit of 79 characters.</text:p>
            </text:list-item>
          </text:list>
        </text:list-item>
        <text:list-item>
          <text:p text:style-name="P94">C0116: Missing function or method docstring (missing-function-docstring)</text:p>
          <text:list>
            <text:list-item>
              <text:p text:style-name="P95">This means <text:span text:style-name="T160">that </text:span><text:span text:style-name="T161">the specified function has no docstring; the comment written as a string directly below the function’s definition.</text:span></text:p>
            </text:list-item>
          </text:list>
        </text:list-item>
        <text:list-item>
          <text:p text:style-name="P95">C0209: Formatting a regular string which could be an f-string (consider-using-f-string)</text:p>
          <text:list>
            <text:list-item>
              <text:p text:style-name="P96">This means that the specified line of code uses the old string formatting syntax; “ ‘Hello {}’.format(name) instead of f’Hello {name}’ ”.</text:p>
            </text:list-item>
          </text:list>
        </text:list-item>
      </text:list>
      <text:p text:style-name="P97"/>
      <text:p text:style-name="P98"/>
      <text:p text:style-name="P92">Potential Bugs</text:p>
      <text:list text:style-name="L2">
        <text:list-item>
          <text:p text:style-name="P99">F401 'flask.render_template_string' imported but unused</text:p>
        </text:list-item>
        <text:list-item>
          <text:p text:style-name="P99">W0613: Unused argument 'exception' (unused-argument)</text:p>
          <text:list>
            <text:list-item>
              <text:p text:style-name="P100">This means that a function takes an argument (named “exception”) but never uses it.</text:p>
            </text:list-item>
          </text:list>
        </text:list-item>
      </text:list>
      <text:p text:style-name="P101"/>
      <text:p text:style-name="P98"/>
      <text:p text:style-name="P91"><text:soft-page-break/></text:p>
      <text:p text:style-name="P102"><text:span text:style-name="T162">All of these would’ve gone uncaught if relying on unit testing or integration testing alone. </text:span><text:span text:style-name="T163">This showcases the utility of non-execution verificatio</text:span><text:span text:style-name="T164">n. It is used for identifying issues in the code’s structure, style, and potential logic problems without requiring the program to be executed, allowing developers to catch maintainability issues, dead code, and hidden bugs early in the development process before runtime testing is performed.</text:span></text:p>
      <text:p text:style-name="P102"/>
      <text:p text:style-name="P102"/>
      <text:p text:style-name="P102"><draw:frame draw:style-name="fr6" draw:name="Image20" text:anchor-type="char" svg:width="17cm" svg:height="2.397cm" draw:z-index="19"><draw:image xlink:href="Pictures/1000000100000518000000B814111214.png" xlink:type="simple" xlink:show="embed" xlink:actuate="onLoad" draw:mime-type="image/png"/></draw:frame></text:p>
      <text:p text:style-name="P90"/>
      <text:p text:style-name="P103"><text:span text:style-name="T165">D</text:span><text:span text:style-name="T6">.</text:span> <text:span text:style-name="T165">Test Coverage</text:span></text:p>
      <text:p text:style-name="P104"/>
      <text:p text:style-name="P105">The tests cover 72% of the code. <text:span text:style-name="T166">Missing lines include 145, 190, 226, 244-247, 255-260, 266-276, 284-286, 294-298, 305-307, 312, 321-325, 331-334. </text:span></text:p>
      <text:p text:style-name="P105"/>
      <text:p text:style-name="P106">To see why some of the lines are missing, consider the following example:</text:p>
      <text:p text:style-name="P105"/>
      <text:p text:style-name="P105"><draw:frame draw:style-name="fr3" draw:name="Image21" text:anchor-type="char" svg:width="14.446cm" svg:height="3.598cm" draw:z-index="20"><draw:image xlink:href="Pictures/100000010000022200000088320A0B57.png" xlink:type="simple" xlink:show="embed" xlink:actuate="onLoad" draw:mime-type="image/png"/></draw:frame></text:p>
      <text:p text:style-name="P105"/>
      <text:p text:style-name="P107"><text:s/></text:p>
      <text:p text:style-name="P108"/>
      <text:p text:style-name="P108"/>
      <text:p text:style-name="P108"/>
      <text:p text:style-name="P108"/>
      <text:p text:style-name="P108"/>
      <text:p text:style-name="P106">While the login function itself is covered, this particular exit from it is not. This means that during testing (both unit and integration), <text:span text:style-name="T167">this function never returned the </text:span><text:span text:style-name="T168">status </text:span><text:span text:style-name="T167">code 400 – </text:span><text:span text:style-name="T169">i.e. It never exited with that particular error.</text:span></text:p>
      <text:p text:style-name="P106"/>
      <text:p text:style-name="P109">The risks of uncovered code are unknown and hard to quantify. <text:span text:style-name="T170">Uncovered sections may contain hidden logic errors, edge-case failures, or other unintended behaviours that were never </text:span><text:span text:style-name="T171">tested for or addressed. </text:span><text:span text:style-name="T172">Such errors could only </text:span><text:span text:style-name="T173">be revealed</text:span><text:span text:style-name="T172"> in production, </text:span><text:span text:style-name="T174">potentially leading to </text:span><text:span text:style-name="T175">crashes. </text:span><text:span text:style-name="T176">If a new developer was to modify an uncovered function, </text:span><text:span text:style-name="T177">they would lack the insight of </text:span><text:span text:style-name="T178">how that code behaves under different inputs, making refactoring significantly more dangerous. </text:span></text:p>
      <text:p text:style-name="P109"/>
      <text:p text:style-name="P110">Achieving 100% coverage is not always realistic o<text:span text:style-name="T179">r</text:span> desirable <text:span text:style-name="T180">for this codebase. </text:span><text:span text:style-name="T181">Some endpoints or rarely triggered conditions may be difficult to reproduce without adding complexity and overhead. </text:span><text:span text:style-name="T182">Instead of trying to achieve 100% coverage, it is much more advisable to maximise meaningful coverage. </text:span></text:p>
      <text:p text:style-name="P110"/>
      <text:p text:style-name="P90"/>
      <text:p text:style-name="P111"><text:span text:style-name="T183">E</text:span><text:span text:style-name="T6">.</text:span> <text:span text:style-name="T183">TDD / BDD</text:span></text:p>
      <text:p text:style-name="P112"/>
      <text:p text:style-name="P113">Creating new tasks could have been developed differently using TDD (Test-Driven Development). <text:span text:style-name="T184">Currently, the biggest problem with the function is that it does not filter out incorrect</text:span><text:span text:style-name="T185">ly structured payloads or payloads containing incorrect values</text:span><text:span text:style-name="T184">. </text:span><text:span text:style-name="T186">It simply returns 201 status code without applying the changes. </text:span><text:span text:style-name="T187">Instead of creating the feature first, </text:span><text:span text:style-name="T188">it could’ve been done the following way:</text:span></text:p>
      <text:p text:style-name="P114"><text:soft-page-break/></text:p>
      <text:p text:style-name="P115"><text:span text:style-name="T189">Once the piece of functionality is planned, a test for it could be devised. You could gather all the ways in which the feature could fail, and then write tests that incorporate those failures, </text:span><text:span text:style-name="T190">i.e. Aim to trigger them</text:span><text:span text:style-name="T189">. </text:span><text:span text:style-name="T191">Once the test is complete, </text:span><text:span text:style-name="T192">a ticket for the feature could’ve been created with acceptance criteria tha</text:span><text:span text:style-name="T193">t demand the function only returns a success response when the input payload is correctly structured and contains valid values, and otherwise returns an appropriate error response without </text:span><text:span text:style-name="T194">carrying out any changes.</text:span><text:span text:style-name="T195"> </text:span><text:span text:style-name="T196">From there, the implementation could be written specifically to satisfy those test cases.</text:span></text:p>
      <text:p text:style-name="P116"/>
      <text:p text:style-name="P117"/>
      <text:p text:style-name="P112"/>
      <text:p text:style-name="P118">3. Efficiency Evaluation</text:p>
      <text:p text:style-name="P119"/>
      <text:p text:style-name="P120">Currently, all <text:span text:style-name="T197">14 tests</text:span> complete within <text:span text:style-name="T198">0.51 </text:span><text:span text:style-name="T199">seconds. </text:span><text:span text:style-name="T200">This is perfectly acceptable for a CI/CD pipeline that runs on every commit and where speed and efficiency is of the essence. If the </text:span><text:span text:style-name="T201">test suite was to grow to a 1000 tests, </text:span><text:span text:style-name="T202">the estimated time it would have taken to complete the</text:span><text:span text:style-name="T203">m</text:span><text:span text:style-name="T202"> would have </text:span><text:span text:style-name="T203">rose to</text:span><text:span text:style-name="T202"> around 36 seconds – </text:span><text:span text:style-name="T204">Much less acceptable. </text:span><text:span text:style-name="T205">In such a case, efficiency would need to be improved. </text:span><text:span text:style-name="T206">This could be done by either pruning tests </text:span><text:span text:style-name="T207">(not recommended), or </text:span><text:span text:style-name="T208">by optimising the test execution strategy. </text:span></text:p>
      <text:p text:style-name="P119"/>
      <text:p text:style-name="P119"/>
      <text:p text:style-name="P119"/>
      <text:p text:style-name="P119"/>
      <text:p text:style-name="P1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2:27:30.246688015</dc:date>
    <meta:editing-duration>PT8H57M27S</meta:editing-duration>
    <meta:editing-cycles>493</meta:editing-cycles>
    <meta:document-statistic meta:table-count="0" meta:image-count="21" meta:object-count="0" meta:page-count="11" meta:paragraph-count="85" meta:word-count="2001" meta:character-count="13192" meta:non-whitespace-character-count="11261"/>
  </office:meta>
</office:document-meta>
</file>