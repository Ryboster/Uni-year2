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0a7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6"/>
      <text:p text:style-name="P7"/>
      <text:p text:style-name="P7"/>
      <text:p text:style-name="P7">1.1(b) <text:span text:style-name="T2">Comments suggesting incomplete workflow</text:span></text:p>
      <text:p text:style-name="P7"/>
      <text:p text:style-name="P7">1.1(c)</text:p>
      <text:p text:style-name="P7">1.1(d)</text:p>
      <text:p text:style-name="P7">1.1(e)</text:p>
      <text:p text:style-name="P7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23:59.317517678</dc:date>
    <meta:editing-duration>PT1H57M59S</meta:editing-duration>
    <meta:editing-cycles>11</meta:editing-cycles>
    <meta:document-statistic meta:table-count="0" meta:image-count="0" meta:object-count="0" meta:page-count="1" meta:paragraph-count="10" meta:word-count="66" meta:character-count="551" meta:non-whitespace-character-count="494"/>
  </office:meta>
</office:document-meta>
</file>