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6f03da"/>
    </style:style>
    <style:style style:name="T55" style:family="text">
      <style:text-properties officeooo:rsid="00708cff"/>
    </style:style>
    <style:style style:name="T56" style:family="text">
      <style:text-properties officeooo:rsid="0064d8e3"/>
    </style:style>
    <style:style style:name="T57" style:family="text">
      <style:text-properties officeooo:rsid="0066dd6d"/>
    </style:style>
    <style:style style:name="T58" style:family="text">
      <style:text-properties officeooo:rsid="0068ef9c"/>
    </style:style>
    <style:style style:name="T59" style:family="text">
      <style:text-properties officeooo:rsid="00695487"/>
    </style:style>
    <style:style style:name="T60"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5"/>
      <text:p text:style-name="P35"/>
      <text:p text:style-name="P35"/>
      <text:p text:style-name="P35"/>
      <text:p text:style-name="P36">(Existence of record is never verified before deletion attempt – <text:span text:style-name="T45">This fails silently</text:span>).</text:p>
      <text:p text:style-name="P36"/>
      <text:p text:style-name="P36"><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7"><text:span text:style-name="T53">E</text:span><text:span text:style-name="T5">.</text:span> <text:span text:style-name="T53">Authentication</text:span><text:span text:style-name="T7"> Inconsistencies</text:span></text:p>
      <text:p text:style-name="P38"/>
      <text:p text:style-name="P39">Authentication only exists at the /login endpoint. No other endpoint requires it. This effectively makes authentication a feature rather than a system-wide integration.</text:p>
      <text:p text:style-name="P40"/>
      <text:p text:style-name="P40">This quality issue could be prevented by integrating authentication system-wide. <text:span text:style-name="T54">Integration could be tested automatically with an enumeration script </text:span><text:span text:style-name="T55">that navigates to each endpoint without appropriate permissions. </text:span></text:p>
      <text:p text:style-name="P40"/>
      <text:p text:style-name="P35"/>
      <text:p text:style-name="P35"/>
      <text:p text:style-name="P41"><text:span text:style-name="T56">F</text:span><text:span text:style-name="T5">.</text:span> <text:span text:style-name="T57">No Database Error Handling</text:span></text:p>
      <text:p text:style-name="P35"/>
      <text:p text:style-name="P42">A<text:span text:style-name="T58">cross the entire file, not one database call includes error handling. If an error was to occur in a “db.execute” call, </text:span><text:span text:style-name="T59">the application would fail. </text:span><text:span text:style-name="T60">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6:56:16.719737696</dc:date>
    <meta:editing-duration>PT3H29M10S</meta:editing-duration>
    <meta:editing-cycles>134</meta:editing-cycles>
    <meta:document-statistic meta:table-count="0" meta:image-count="6" meta:object-count="0" meta:page-count="3" meta:paragraph-count="31" meta:word-count="485" meta:character-count="3412" meta:non-whitespace-character-count="2951"/>
  </office:meta>
</office:document-meta>
</file>