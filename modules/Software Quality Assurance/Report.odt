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2"/>
      <text:p text:style-name="P82"/>
      <text:p text:style-name="P82"/>
      <text:p text:style-name="P82"/>
      <text:p text:style-name="P82"/>
      <text:p text:style-name="P89"><text:soft-page-break/><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Following is the output of each:</text:p>
      <text:p text:style-name="P91"/>
      <text:p text:style-name="P91"/>
      <text:p text:style-name="P91">Pylint:</text:p>
      <text:p text:style-name="P91"/>
      <text:p text:style-name="P90"/>
      <text:p text:style-name="P90"><draw:frame draw:style-name="fr6" draw:name="Image18" text:anchor-type="char" svg:width="17cm" svg:height="3.835cm" draw:z-index="17"><draw:image xlink:href="Pictures/1000000100000466000000FE965E3CDE.png" xlink:type="simple" xlink:show="embed" xlink:actuate="onLoad" draw:mime-type="image/png"/></draw:frame></text:p>
      <text:p text:style-name="P90"/>
      <text:p text:style-name="P91">flake8:</text:p>
      <text:p text:style-name="P91"><draw:frame draw:style-name="fr6" draw:name="Image19" text:anchor-type="char" svg:width="17cm" svg:height="6.847cm" draw:z-index="18"><draw:image xlink:href="Pictures/100000010000030E0000013BABDA1CAA.png" xlink:type="simple" xlink:show="embed" xlink:actuate="onLoad" draw:mime-type="image/png"/></draw:frame></text:p>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20:58.888716338</dc:date>
    <meta:editing-duration>PT7H51M55S</meta:editing-duration>
    <meta:editing-cycles>372</meta:editing-cycles>
    <meta:document-statistic meta:table-count="0" meta:image-count="19" meta:object-count="0" meta:page-count="9" meta:paragraph-count="63" meta:word-count="1369" meta:character-count="9124" meta:non-whitespace-character-count="7805"/>
  </office:meta>
</office:document-meta>
</file>