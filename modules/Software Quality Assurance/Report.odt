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none" fo:font-weight="normal" officeooo:rsid="01dd46ad" officeooo:paragraph-rsid="01dd46ad"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p text:style-name="P92"/>
      <text:p text:style-name="P92">Potential Bugs</text:p>
      <text:p text:style-name="P93"/>
      <text:p text:style-name="P93"/>
      <text:p text:style-name="P92"/>
      <text:p text:style-name="P92">Complexity Warnings</text:p>
      <text:p text:style-name="P92"/>
      <text:p text:style-name="P91"/>
      <text:p text:style-name="P91"/>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26:58.993945239</dc:date>
    <meta:editing-duration>PT7H57M52S</meta:editing-duration>
    <meta:editing-cycles>377</meta:editing-cycles>
    <meta:document-statistic meta:table-count="0" meta:image-count="19" meta:object-count="0" meta:page-count="9" meta:paragraph-count="64" meta:word-count="1378" meta:character-count="9204" meta:non-whitespace-character-count="7876"/>
  </office:meta>
</office:document-meta>
</file>