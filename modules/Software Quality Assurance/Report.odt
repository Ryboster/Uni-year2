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0" style:family="paragraph" style:parent-style-name="Standard" style:list-style-name="L3">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Formatting a regular string which could be an f-string</text:p>
        </text:list-item>
        <text:list-item>
          <text:p text:style-name="P95"/>
        </text:list-item>
      </text:list>
      <text:p text:style-name="P96"/>
      <text:p text:style-name="P97"/>
      <text:p text:style-name="P92">Potential Bugs</text:p>
      <text:list text:style-name="L2">
        <text:list-item>
          <text:p text:style-name="P98">flask.render_template_string imported but unused.</text:p>
        </text:list-item>
      </text:list>
      <text:p text:style-name="P99"/>
      <text:p text:style-name="P92">Complexity Warnings</text:p>
      <text:list text:style-name="L3">
        <text:list-item>
          <text:p text:style-name="P100">Missing function or method docstring (missing-function-docstring)</text:p>
          <text:list>
            <text:list-item>
              <text:p text:style-name="P100"/>
            </text:list-item>
          </text:list>
        </text:list-item>
      </text:list>
      <text:p text:style-name="P91"/>
      <text:p text:style-name="P91"><text:soft-page-break/></text:p>
      <text:p text:style-name="P91"/>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33:55.049632083</dc:date>
    <meta:editing-duration>PT8H4M42S</meta:editing-duration>
    <meta:editing-cycles>389</meta:editing-cycles>
    <meta:document-statistic meta:table-count="0" meta:image-count="19" meta:object-count="0" meta:page-count="10" meta:paragraph-count="73" meta:word-count="1455" meta:character-count="9715" meta:non-whitespace-character-count="8324"/>
  </office:meta>
</office:document-meta>
</file>