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0a71c6"/>
    </style:style>
    <style:style style:name="T88" style:family="text">
      <style:text-properties officeooo:rsid="010b50ce"/>
    </style:style>
    <style:style style:name="T89" style:family="text">
      <style:text-properties officeooo:rsid="010c89db"/>
    </style:style>
    <style:style style:name="T90" style:family="text">
      <style:text-properties officeooo:rsid="010de5a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6">For developers, it helps reduce workload and deliver features quicker and more robust. It also <text:span text:style-name="T87">minimises the need for reworks </text:span><text:span text:style-name="T88">or </text:span><text:span text:style-name="T87">refactor</text:span><text:span text:style-name="T88">s. For example, if the </text:span><text:span text:style-name="T89">task for </text:span><text:span text:style-name="T88">function “validate_priority” had been </text:span><text:span text:style-name="T90">planned out properl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4:56.590688107</dc:date>
    <meta:editing-duration>PT4H17M7S</meta:editing-duration>
    <meta:editing-cycles>222</meta:editing-cycles>
    <meta:document-statistic meta:table-count="0" meta:image-count="6" meta:object-count="0" meta:page-count="4" meta:paragraph-count="41" meta:word-count="765" meta:character-count="5249" meta:non-whitespace-character-count="4515"/>
  </office:meta>
</office:document-meta>
</file>