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A00000096462F6CF5.png" manifest:media-type="image/png"/>
  <manifest:file-entry manifest:full-path="Pictures/100000010000020800000030DA0392BE.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3pt" fo:font-weight="bold" officeooo:rsid="0002df3a" officeooo:paragraph-rsid="0002df3a"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19bb98" officeooo:paragraph-rsid="0119bb98" style:font-size-asian="12pt" style:font-style-asian="normal" style:font-weight-asian="normal" style:font-size-complex="12pt" style:font-style-complex="normal" style:font-weight-complex="normal"/>
    </style:style>
    <style:style style:name="T1" style:family="text">
      <style:text-properties officeooo:rsid="004aeffb"/>
    </style:style>
    <style:style style:name="T2" style:family="text">
      <style:text-properties officeooo:rsid="0032f33d"/>
    </style:style>
    <style:style style:name="T3" style:family="text">
      <style:text-properties officeooo:rsid="000d801d"/>
    </style:style>
    <style:style style:name="T4" style:family="text">
      <style:text-properties officeooo:rsid="007c2e90"/>
    </style:style>
    <style:style style:name="T5" style:family="text">
      <style:text-properties officeooo:rsid="0034883b"/>
    </style:style>
    <style:style style:name="T6" style:family="text">
      <style:text-properties officeooo:rsid="0050a23e"/>
    </style:style>
    <style:style style:name="T7" style:family="text">
      <style:text-properties officeooo:rsid="004c1871"/>
    </style:style>
    <style:style style:name="T8" style:family="text">
      <style:text-properties officeooo:rsid="0016e436"/>
    </style:style>
    <style:style style:name="T9" style:family="text">
      <style:text-properties officeooo:rsid="001cb2f1"/>
    </style:style>
    <style:style style:name="T10" style:family="text">
      <style:text-properties officeooo:rsid="002505ed"/>
    </style:style>
    <style:style style:name="T11" style:family="text">
      <style:text-properties officeooo:rsid="002618e1"/>
    </style:style>
    <style:style style:name="T12" style:family="text">
      <style:text-properties officeooo:rsid="009f9c12"/>
    </style:style>
    <style:style style:name="T13" style:family="text">
      <style:text-properties officeooo:rsid="00a0c28f"/>
    </style:style>
    <style:style style:name="T14" style:family="text">
      <style:text-properties officeooo:rsid="00859692"/>
    </style:style>
    <style:style style:name="T15" style:family="text">
      <style:text-properties officeooo:rsid="007f98fc"/>
    </style:style>
    <style:style style:name="T16" style:family="text">
      <style:text-properties officeooo:rsid="00859e12"/>
    </style:style>
    <style:style style:name="T17" style:family="text">
      <style:text-properties officeooo:rsid="0085eaae"/>
    </style:style>
    <style:style style:name="T18" style:family="text">
      <style:text-properties officeooo:rsid="00810935"/>
    </style:style>
    <style:style style:name="T19" style:family="text">
      <style:text-properties officeooo:rsid="0082656c"/>
    </style:style>
    <style:style style:name="T20" style:family="text">
      <style:text-properties officeooo:rsid="00a29adf"/>
    </style:style>
    <style:style style:name="T21" style:family="text">
      <style:text-properties officeooo:rsid="0083a7ab"/>
    </style:style>
    <style:style style:name="T22" style:family="text">
      <style:text-properties officeooo:rsid="008904ed"/>
    </style:style>
    <style:style style:name="T23" style:family="text">
      <style:text-properties officeooo:rsid="008a8014"/>
    </style:style>
    <style:style style:name="T24" style:family="text">
      <style:text-properties officeooo:rsid="008afd66"/>
    </style:style>
    <style:style style:name="T25" style:family="text">
      <style:text-properties officeooo:rsid="008c7445"/>
    </style:style>
    <style:style style:name="T26" style:family="text">
      <style:text-properties officeooo:rsid="00a51396"/>
    </style:style>
    <style:style style:name="T27" style:family="text">
      <style:text-properties officeooo:rsid="00a656f3"/>
    </style:style>
    <style:style style:name="T28" style:family="text">
      <style:text-properties officeooo:rsid="00924a23"/>
    </style:style>
    <style:style style:name="T29" style:family="text">
      <style:text-properties officeooo:rsid="008fbd41"/>
    </style:style>
    <style:style style:name="T30" style:family="text">
      <style:text-properties officeooo:rsid="009060a1"/>
    </style:style>
    <style:style style:name="T31" style:family="text">
      <style:text-properties officeooo:rsid="0053f89c"/>
    </style:style>
    <style:style style:name="T32" style:family="text">
      <style:text-properties officeooo:rsid="0052fe26"/>
    </style:style>
    <style:style style:name="T33" style:family="text">
      <style:text-properties fo:color="#ffffff" loext:opacity="100%" fo:font-weight="normal" officeooo:rsid="0020970b" fo:background-color="transparent" loext:char-shading-value="0"/>
    </style:style>
    <style:style style:name="T34" style:family="text">
      <style:text-properties fo:color="#ffffff" loext:opacity="100%" fo:font-weight="normal" officeooo:rsid="0021bc69" fo:background-color="transparent" loext:char-shading-value="0"/>
    </style:style>
    <style:style style:name="T35" style:family="text">
      <style:text-properties officeooo:rsid="0021bc69"/>
    </style:style>
    <style:style style:name="T36" style:family="text">
      <style:text-properties officeooo:rsid="0099b404"/>
    </style:style>
    <style:style style:name="T37" style:family="text">
      <style:text-properties officeooo:rsid="009a5da0"/>
    </style:style>
    <style:style style:name="T38" style:family="text">
      <style:text-properties officeooo:rsid="00562ae4"/>
    </style:style>
    <style:style style:name="T39" style:family="text">
      <style:text-properties officeooo:rsid="0055c7b1"/>
    </style:style>
    <style:style style:name="T40" style:family="text">
      <style:text-properties officeooo:rsid="002bc841"/>
    </style:style>
    <style:style style:name="T41" style:family="text">
      <style:text-properties officeooo:rsid="003751e3"/>
    </style:style>
    <style:style style:name="T42" style:family="text">
      <style:text-properties officeooo:rsid="00391f21"/>
    </style:style>
    <style:style style:name="T43" style:family="text">
      <style:text-properties officeooo:rsid="003f50b5"/>
    </style:style>
    <style:style style:name="T44" style:family="text">
      <style:text-properties officeooo:rsid="0040684a"/>
    </style:style>
    <style:style style:name="T45" style:family="text">
      <style:text-properties officeooo:rsid="006163eb"/>
    </style:style>
    <style:style style:name="T46" style:family="text">
      <style:text-properties officeooo:rsid="00712611"/>
    </style:style>
    <style:style style:name="T47" style:family="text">
      <style:text-properties officeooo:rsid="0071dcf4"/>
    </style:style>
    <style:style style:name="T48" style:family="text">
      <style:text-properties officeooo:rsid="0072ed4e"/>
    </style:style>
    <style:style style:name="T49" style:family="text">
      <style:text-properties officeooo:rsid="0074eb40"/>
    </style:style>
    <style:style style:name="T50" style:family="text">
      <style:text-properties officeooo:rsid="0076b094"/>
    </style:style>
    <style:style style:name="T51" style:family="text">
      <style:text-properties officeooo:rsid="007a110e"/>
    </style:style>
    <style:style style:name="T52" style:family="text">
      <style:text-properties officeooo:rsid="00777ba6"/>
    </style:style>
    <style:style style:name="T53" style:family="text">
      <style:text-properties officeooo:rsid="005ac241"/>
    </style:style>
    <style:style style:name="T54" style:family="text">
      <style:text-properties officeooo:rsid="00ba9bf2"/>
    </style:style>
    <style:style style:name="T55" style:family="text">
      <style:text-properties officeooo:rsid="006f03da"/>
    </style:style>
    <style:style style:name="T56" style:family="text">
      <style:text-properties officeooo:rsid="00708cff"/>
    </style:style>
    <style:style style:name="T57" style:family="text">
      <style:text-properties officeooo:rsid="0064d8e3"/>
    </style:style>
    <style:style style:name="T58" style:family="text">
      <style:text-properties officeooo:rsid="0066dd6d"/>
    </style:style>
    <style:style style:name="T59" style:family="text">
      <style:text-properties officeooo:rsid="0068ef9c"/>
    </style:style>
    <style:style style:name="T60" style:family="text">
      <style:text-properties officeooo:rsid="00695487"/>
    </style:style>
    <style:style style:name="T61" style:family="text">
      <style:text-properties officeooo:rsid="00c096f2"/>
    </style:style>
    <style:style style:name="T62" style:family="text">
      <style:text-properties officeooo:rsid="00d28935"/>
    </style:style>
    <style:style style:name="T63" style:family="text">
      <style:text-properties officeooo:rsid="00d36685"/>
    </style:style>
    <style:style style:name="T64" style:family="text">
      <style:text-properties officeooo:rsid="00d3c164"/>
    </style:style>
    <style:style style:name="T65" style:family="text">
      <style:text-properties officeooo:rsid="00d62d33"/>
    </style:style>
    <style:style style:name="T66" style:family="text">
      <style:text-properties officeooo:rsid="00ffa1a8"/>
    </style:style>
    <style:style style:name="T67" style:family="text">
      <style:text-properties officeooo:rsid="00daf0b1"/>
    </style:style>
    <style:style style:name="T68" style:family="text">
      <style:text-properties officeooo:rsid="00e04467"/>
    </style:style>
    <style:style style:name="T69" style:family="text">
      <style:text-properties officeooo:rsid="00ee5d02"/>
    </style:style>
    <style:style style:name="T70" style:family="text">
      <style:text-properties officeooo:rsid="00e53b62"/>
    </style:style>
    <style:style style:name="T71" style:family="text">
      <style:text-properties officeooo:rsid="00fd35fb"/>
    </style:style>
    <style:style style:name="T72" style:family="text">
      <style:text-properties officeooo:rsid="00e5de6c"/>
    </style:style>
    <style:style style:name="T73" style:family="text">
      <style:text-properties officeooo:rsid="00e7c890"/>
    </style:style>
    <style:style style:name="T74" style:family="text">
      <style:text-properties officeooo:rsid="00e7ff9d"/>
    </style:style>
    <style:style style:name="T75" style:family="text">
      <style:text-properties officeooo:rsid="00e8d30f"/>
    </style:style>
    <style:style style:name="T76" style:family="text">
      <style:text-properties officeooo:rsid="00ebe782"/>
    </style:style>
    <style:style style:name="T77" style:family="text">
      <style:text-properties officeooo:rsid="00ec0ec1"/>
    </style:style>
    <style:style style:name="T78" style:family="text">
      <style:text-properties officeooo:rsid="00f07ecf"/>
    </style:style>
    <style:style style:name="T79" style:family="text">
      <style:text-properties officeooo:rsid="00f14083"/>
    </style:style>
    <style:style style:name="T80" style:family="text">
      <style:text-properties officeooo:rsid="00f212d9"/>
    </style:style>
    <style:style style:name="T81" style:family="text">
      <style:text-properties officeooo:rsid="00f458d7"/>
    </style:style>
    <style:style style:name="T82" style:family="text">
      <style:text-properties officeooo:rsid="00f64f8f"/>
    </style:style>
    <style:style style:name="T83" style:family="text">
      <style:text-properties officeooo:rsid="00feb589"/>
    </style:style>
    <style:style style:name="T84" style:family="text">
      <style:text-properties officeooo:rsid="0103904b"/>
    </style:style>
    <style:style style:name="T85" style:family="text">
      <style:text-properties officeooo:rsid="01071a9e"/>
    </style:style>
    <style:style style:name="T86" style:family="text">
      <style:text-properties officeooo:rsid="01077a47"/>
    </style:style>
    <style:style style:name="T87" style:family="text">
      <style:text-properties officeooo:rsid="01113b12"/>
    </style:style>
    <style:style style:name="T88" style:family="text">
      <style:text-properties officeooo:rsid="010a71c6"/>
    </style:style>
    <style:style style:name="T89" style:family="text">
      <style:text-properties officeooo:rsid="010b50ce"/>
    </style:style>
    <style:style style:name="T90" style:family="text">
      <style:text-properties officeooo:rsid="010c89db"/>
    </style:style>
    <style:style style:name="T91" style:family="text">
      <style:text-properties officeooo:rsid="0113f17d"/>
    </style:style>
    <style:style style:name="T92" style:family="text">
      <style:text-properties officeooo:rsid="010de5ac"/>
    </style:style>
    <style:style style:name="T93" style:family="text">
      <style:text-properties officeooo:rsid="011522c2"/>
    </style:style>
    <style:style style:name="T94" style:family="text">
      <style:text-properties officeooo:rsid="0116c309"/>
    </style:style>
    <style:style style:name="T95" style:family="text">
      <style:text-properties officeooo:rsid="0118ba46"/>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Deliverable Management and Quality Impact</text:p>
      <text:p text:style-name="P4"/>
      <text:p text:style-name="P4">1.1. Preliminary Codebase Examination</text:p>
      <text:p text:style-name="P5"/>
      <text:p text:style-name="P6"><text:span text:style-name="T1">A</text:span><text:span text:style-name="T2">.</text:span> Dead Code</text:p>
      <text:p text:style-name="P5"/>
      <text:p text:style-name="P7">Initial examination reveals three dead functions; “validate_priority”, “format_task_for_display”, and “calculate_workload”. <text:span text:style-name="T3">A comment in “validate_priority” informs the user about this. </text:span></text:p>
      <text:p text:style-name="P7"/>
      <text:p text:style-name="P7">“<text:span text:style-name="T3">flask.render_template_string” is imported but never used.</text:span></text:p>
      <text:p text:style-name="P7"/>
      <text:p text:style-name="P8">To prevent this in the future, pylint could be incorporated. <text:span text:style-name="T4">Pylint scanning could be carried out automatically in the CI/CD pipeline to catch and prune or integrate dead code before deployment. </text:span></text:p>
      <text:p text:style-name="P7"/>
      <text:p text:style-name="P9"/>
      <text:p text:style-name="P10"><text:span text:style-name="T1">B</text:span><text:span text:style-name="T5">.</text:span> <text:span text:style-name="T6">Query</text:span><text:span text:style-name="T7"> Inconsistencies</text:span></text:p>
      <text:p text:style-name="P11"/>
      <text:p text:style-name="P12">The codebase contains inconsistent SQL queries. <text:span text:style-name="T8">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9">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0">One other place where</text:span> string formatting <text:span text:style-name="T10">is </text:span>being used in place of parameterised queries <text:span text:style-name="T11">is the</text:span> “<text:span text:style-name="T10">search_tasks</text:span>” <text:span text:style-name="T11">function.</text:span></text:p>
      <text:p text:style-name="P19"/>
      <text:p text:style-name="P20"/>
      <text:p text:style-name="P21"><text:soft-page-break/>To patch this, all <text:span text:style-name="T12">queries should move away from string formatting, instead opting for parameterised </text:span><text:span text:style-name="T13">queries</text:span><text:span text:style-name="T12">.</text:span></text:p>
      <text:p text:style-name="P21"/>
      <text:p text:style-name="P20">To prevent this type of inconsistenc<text:span text:style-name="T14">y</text:span> in the future, <text:span text:style-name="T15">an SQL injection </text:span><text:span text:style-name="T16">scanner</text:span><text:span text:style-name="T15"> could be </text:span><text:span text:style-name="T17">implemented</text:span><text:span text:style-name="T15">. </text:span><text:span text:style-name="T18">By iterating over each POST endpoint </text:span><text:span text:style-name="T19">and attempting </text:span><text:span text:style-name="T20">controlled injection payloads</text:span><text:span text:style-name="T19">, </text:span><text:span text:style-name="T21">such inconsistencies could be caught early and before deployment. </text:span><text:span text:style-name="T22">This </text:span><text:span text:style-name="T23">is vital b</text:span><text:span text:style-name="T24">ecause relying on string formatting carries the risk of </text:span><text:span text:style-name="T25">irreversible</text:span><text:span text:style-name="T24"> </text:span><text:span text:style-name="T26">and complete</text:span><text:span text:style-name="T24"> data </text:span><text:span text:style-name="T27">loss</text:span><text:span text:style-name="T24">.</text:span></text:p>
      <text:p text:style-name="P20"/>
      <text:p text:style-name="P22">Additionally, to secure the database against the risk of data loss, backups should be ma<text:span text:style-name="T28">d</text:span>e periodically, <text:span text:style-name="T29">and a roll-back tool should be incorporated to </text:span><text:span text:style-name="T30">allow for remote restoration of data.</text:span></text:p>
      <text:p text:style-name="P22"/>
      <text:p text:style-name="P23"/>
      <text:p text:style-name="P24"><text:span text:style-name="T31">C</text:span><text:span text:style-name="T5">.</text:span> <text:span text:style-name="T32">Input Validation Inconsistencies</text:span></text:p>
      <text:p text:style-name="P25"><text:span text:style-name="T33">Input validation inconsistencies were also found. </text:span><text:span text:style-name="T34">The “create_task”</text:span> <text:span text:style-name="T35">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5">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6">i</text:span><text:span text:style-name="T37">ntegrated</text:span><text:span text:style-name="T36">.</text:span></text:p>
      <text:p text:style-name="P32"/>
      <text:p text:style-name="P32"><text:span text:style-name="T38">D</text:span><text:span text:style-name="T5">.</text:span> <text:span text:style-name="T39">Error-Handling</text:span><text:span text:style-name="T7"> Inconsistencies</text:span></text:p>
      <text:p text:style-name="P32"/>
      <text:p text:style-name="P33"><text:span text:style-name="T40">E</text:span>rror-handling inconsistencies <text:span text:style-name="T40">were found </text:span><text:span text:style-name="T41">as well. </text:span><text:span text:style-name="T42">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3">while </text:span><text:span text:style-name="T44">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5">This fails silently</text:span>).</text:p>
      <text:p text:style-name="P36"/>
      <text:p text:style-name="P37"><text:span text:style-name="T46">This quality issue could be prevented by </text:span><text:span text:style-name="T47">including error handling in each CRUD (Create, Read, Update, Delete) operation. Unit tests should be written to </text:span><text:span text:style-name="T48">test for known failure points. </text:span><text:span text:style-name="T49">Execution of said unit tests could be automated in the CI/CD pipeline </text:span><text:span text:style-name="T50">to catch </text:span><text:span text:style-name="T51">such inconsistencies</text:span><text:span text:style-name="T50"> before </text:span><text:span text:style-name="T52">deployment.</text:span><text:line-break/></text:p>
      <text:p text:style-name="P38"><text:span text:style-name="T53">E</text:span><text:span text:style-name="T5">.</text:span> <text:span text:style-name="T53">Authentication</text:span><text:span text:style-name="T7">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4">If it matches, authentication is successful, if not, an appropriate error is returned along redirecting the user to the login portal.</text:span></text:p>
      <text:p text:style-name="P42"/>
      <text:p text:style-name="P42"><text:span text:style-name="T55">Integration could be tested automatically with an enumeration script </text:span><text:span text:style-name="T56">that navigates to each endpoint without appropriate permissions.</text:span></text:p>
      <text:p text:style-name="P35"/>
      <text:p text:style-name="P35"/>
      <text:p text:style-name="P44"><text:span text:style-name="T57">F</text:span><text:span text:style-name="T5">.</text:span> <text:span text:style-name="T58">No Database Error Handling</text:span></text:p>
      <text:p text:style-name="P35"/>
      <text:p text:style-name="P45">A<text:span text:style-name="T59">cross the entire file, not one database call includes error handling. If an error was to occur in a “db.execute” call, </text:span><text:span text:style-name="T60">the application would fail, </text:span><text:span text:style-name="T61">and data could be lost</text:span><text:span text:style-name="T60">.</text:span></text:p>
      <text:p text:style-name="P35"/>
      <text:p text:style-name="P46">To patch this, try-except blocks should be implemented in each database call block, <text:span text:style-name="T62">and appropriate HTTP error responses should be returned. </text:span><text:span text:style-name="T63">Additionally, </text:span><text:span text:style-name="T64">form input validation should be incorporated to prevent the user from being able to submit obviously wrong data.</text:span></text:p>
      <text:p text:style-name="P47"/>
      <text:p text:style-name="P47"/>
      <text:p text:style-name="P48"><text:span text:style-name="T65">G</text:span><text:span text:style-name="T5">.</text:span> <text:span text:style-name="T66">Poor </text:span><text:span text:style-name="T67">Deliverable </text:span><text:span text:style-name="T68">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69">instance</text:span> is the aforementioned utility function “validate_priority”. <text:span text:style-name="T70">It was planned for, implemented, but never integrated. This </text:span><text:span text:style-name="T71">(as well as the comment)</text:span><text:span text:style-name="T70"> is a clear sign of poor deliverable management. </text:span><text:span text:style-name="T72">The task should </text:span><text:span text:style-name="T73">have necessitated integration of this function instead of </text:span><text:span text:style-name="T74">splitting the task into two separate tickets. </text:span><text:span text:style-name="T75">Additionally, a definition of done should have </text:span><text:span text:style-name="T76">demanded </text:span><text:span text:style-name="T77">that the function is being called and works as planned.</text:span></text:p>
      <text:p text:style-name="P51"/>
      <text:p text:style-name="P52">The second instance is the “<text:span text:style-name="T8">login” </text:span><text:span text:style-name="T78">function. </text:span><text:span text:style-name="T79">In it, the query is formatted using string formatting. Th</text:span><text:span text:style-name="T80">is is inconsistent with other functions, and a clear sign of a poor deliverable management. The acceptance criteria for the ticket should’ve demanded that the </text:span><text:span text:style-name="T81">function uses parameterised queries </text:span><text:span text:style-name="T82">instead.</text:span></text:p>
      <text:p text:style-name="P52"/>
      <text:p text:style-name="P52"/>
      <text:p text:style-name="P53"><text:soft-page-break/><text:span text:style-name="T83">H</text:span><text:span text:style-name="T5">.</text:span> <text:span text:style-name="T83">Effective Deliverable Management </text:span></text:p>
      <text:p text:style-name="P54"/>
      <text:p text:style-name="P55">The<text:span text:style-name="T84">re are numerous benefits to effective deliverable management; </text:span><text:span text:style-name="T85">both to the development team as well as the </text:span><text:span text:style-name="T86">end users. </text:span></text:p>
      <text:p text:style-name="P56"/>
      <text:p text:style-name="P57">For developers, it helps reduce workload and deliver features quicker and more robust<text:span text:style-name="T87">ly</text:span>. It also <text:span text:style-name="T88">minimises the need for reworks </text:span><text:span text:style-name="T89">or </text:span><text:span text:style-name="T88">refactor</text:span><text:span text:style-name="T89">s. For example, if the </text:span><text:span text:style-name="T90">task for </text:span><text:span text:style-name="T91">the</text:span><text:span text:style-name="T90"> </text:span><text:span text:style-name="T89">function “validate_priority” had been </text:span><text:span text:style-name="T92">planned out properly, </text:span><text:span text:style-name="T93">the function could’ve been implemented and integrated in a single ticket, by a single developer.</text:span></text:p>
      <text:p text:style-name="P57"/>
      <text:p text:style-name="P58">Similarly, </text:p>
      <text:p text:style-name="P57"/>
      <text:p text:style-name="P59">Alternatively, the function “login”</text:p>
      <text:p text:style-name="P57"/>
      <text:p text:style-name="P57"><text:span text:style-name="T93"><text:s/></text:span><text:span text:style-name="T94">Instead, since integration is a separate ticket, </text:span><text:span text:style-name="T95">now a different developer might take it, likely taking longer to integrate since they may have not seen it before.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17:49:20.481492963</dc:date>
    <meta:editing-duration>PT4H21M26S</meta:editing-duration>
    <meta:editing-cycles>233</meta:editing-cycles>
    <meta:document-statistic meta:table-count="0" meta:image-count="6" meta:object-count="0" meta:page-count="4" meta:paragraph-count="44" meta:word-count="813" meta:character-count="5562" meta:non-whitespace-character-count="4781"/>
  </office:meta>
</office:document-meta>
</file>