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paragraph-rsid="0020970b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9139a" officeooo:paragraph-rsid="0049139a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T15" style:family="text">
      <style:text-properties officeooo:rsid="0040684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/>
      <text:p text:style-name="P11">The codebase contains inconsistent SQL queries. <text:span text:style-name="T4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5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9"/>
      <text:p text:style-name="P20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1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text:soft-page-break/></text:p>
      <text:p text:style-name="P17"/>
      <text:p text:style-name="P22"/>
      <text:p text:style-name="P23">, <text:span text:style-name="T10">while “update_task” does not:</text:span></text:p>
      <text:p text:style-name="P22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2"/>
      <text:p text:style-name="P22"/>
      <text:p text:style-name="P24"/>
      <text:p text:style-name="P24"/>
      <text:p text:style-name="P25">One other example of this is the “add_comment” function, where input is not being validated either.</text:p>
      <text:p text:style-name="P25"/>
      <text:p text:style-name="P26"/>
      <text:p text:style-name="P26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6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6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7"/>
      <text:p text:style-name="P27"/>
      <text:p text:style-name="P28">, <text:span text:style-name="T14">while </text:span><text:span text:style-name="T15">other functions like “delete_task” do not:</text:span></text:p>
      <text:p text:style-name="P28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(Existence of record is never verified before deletion attempt).<text:line-break/></text:p>
      <text:p text:style-name="P29"/>
      <text:p text:style-name="P30">Authentication inconsistencies were found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8:58.115191108</dc:date>
    <meta:editing-duration>PT2H42M35S</meta:editing-duration>
    <meta:editing-cycles>53</meta:editing-cycles>
    <meta:document-statistic meta:table-count="0" meta:image-count="6" meta:object-count="0" meta:page-count="2" meta:paragraph-count="19" meta:word-count="176" meta:character-count="1343" meta:non-whitespace-character-count="1182"/>
  </office:meta>
</office:document-meta>
</file>