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example is the aforementioned utility function “validate_priority”. The method itself looks functiona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25:54.398697799</dc:date>
    <meta:editing-duration>PT3H58M24S</meta:editing-duration>
    <meta:editing-cycles>182</meta:editing-cycles>
    <meta:document-statistic meta:table-count="0" meta:image-count="6" meta:object-count="0" meta:page-count="3" meta:paragraph-count="37" meta:word-count="626" meta:character-count="4359" meta:non-whitespace-character-count="3763"/>
  </office:meta>
</office:document-meta>
</file>