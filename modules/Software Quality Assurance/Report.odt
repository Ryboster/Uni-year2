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6163eb"/>
    </style:style>
    <style:style style:name="T24" style:family="text">
      <style:text-properties officeooo:rsid="005ac241"/>
    </style:style>
    <style:style style:name="T25" style:family="text">
      <style:text-properties officeooo:rsid="0064d8e3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 – <text:span text:style-name="T23">This fails silently</text:span>).<text:line-break/></text:p>
      <text:p text:style-name="P32"><text:span text:style-name="T24">E</text:span><text:span text:style-name="T4">.</text:span> <text:span text:style-name="T24">Authentication</text:span><text:span text:style-name="T6"> Inconsistencies</text:span></text:p>
      <text:p text:style-name="P33"/>
      <text:p text:style-name="P34">Authentication only exists at the /login endpoint. No other endpoint requires it. This effectively makes authentication a feature rather than a system-wide integration.</text:p>
      <text:p text:style-name="P30"/>
      <text:p text:style-name="P30"/>
      <text:p text:style-name="P35"><text:span text:style-name="T25">F</text:span><text:span text:style-name="T4">.</text:span> </text:p>
      <text:p text:style-name="P30"/>
      <text:p text:style-name="P30"/>
      <text:p text:style-name="P30"/>
      <text:p text:style-name="P3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14:39.544868437</dc:date>
    <meta:editing-duration>PT2H48M6S</meta:editing-duration>
    <meta:editing-cycles>73</meta:editing-cycles>
    <meta:document-statistic meta:table-count="0" meta:image-count="6" meta:object-count="0" meta:page-count="3" meta:paragraph-count="23" meta:word-count="210" meta:character-count="1600" meta:non-whitespace-character-count="1408"/>
  </office:meta>
</office:document-meta>
</file>