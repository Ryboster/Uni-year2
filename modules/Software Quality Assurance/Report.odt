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1865869BC9.png" manifest:media-type="image/png"/>
  <manifest:file-entry manifest:full-path="Pictures/10000001000002A70000012BDE73539F.png" manifest:media-type="image/png"/>
  <manifest:file-entry manifest:full-path="Pictures/1000000100000272000000ECFEA7B1B8.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b817c" officeooo:paragraph-rsid="015b817c"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7cm" svg:height="7.486cm" draw:z-index="6"><draw:image xlink:href="Pictures/10000001000002A70000012BDE73539F.png" xlink:type="simple" xlink:show="embed" xlink:actuate="onLoad" draw:mime-type="image/png"/></draw:frame></text:p>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text:soft-page-break/></text:p>
      <text:p text:style-name="P68"><draw:frame draw:style-name="fr6" draw:name="Image8" text:anchor-type="char" svg:width="16.563cm" svg:height="6.244cm" draw:z-index="7"><draw:image xlink:href="Pictures/1000000100000272000000ECFEA7B1B8.png" xlink:type="simple" xlink:show="embed" xlink:actuate="onLoad" draw:mime-type="image/png"/></draw:frame></text:p>
      <text:p text:style-name="P71"/>
      <text:p text:style-name="P72"><text:span text:style-name="T108">Lastly, a boundary test was conducted to </text:span><text:span text:style-name="T114">ensure that the input behaves predictably. </text:span><text:span text:style-name="T115">This test sends the correct data type, but </text:span><text:span text:style-name="T116">incorrect values.</text:span></text:p>
      <text:p text:style-name="P73"><draw:frame draw:style-name="fr5" draw:name="Image9" text:anchor-type="char" svg:width="17cm" svg:height="6.77cm" draw:z-index="8"><draw:image xlink:href="Pictures/10000001000002BF0000011865869BC9.png" xlink:type="simple" xlink:show="embed" xlink:actuate="onLoad" draw:mime-type="image/png"/></draw:frame></text:p>
      <text:p text:style-name="P74">Boundary</text:p>
      <text:p text:style-name="P74"/>
      <text:p text:style-name="P74"/>
      <text:p text:style-name="P75"/>
      <text:p text:style-name="P74"/>
      <text:p text:style-name="P74"/>
      <text:p text:style-name="P74"/>
      <text:p text:style-name="P74"/>
      <text:p text:style-name="P74"/>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9:53:50.452443025</dc:date>
    <meta:editing-duration>PT6H25M34S</meta:editing-duration>
    <meta:editing-cycles>283</meta:editing-cycles>
    <meta:document-statistic meta:table-count="0" meta:image-count="9" meta:object-count="0" meta:page-count="5" meta:paragraph-count="49" meta:word-count="986" meta:character-count="6685" meta:non-whitespace-character-count="5737"/>
  </office:meta>
</office:document-meta>
</file>