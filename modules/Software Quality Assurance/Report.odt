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0f62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0a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Inconsistencies between similar endpoints were found. </text:p>
      <text:p text:style-name="P7"/>
      <text:p text:style-name="P7"/>
      <text:p text:style-name="P8"/>
      <text:p text:style-name="P8"/>
      <text:p text:style-name="P8">1.1(b) <text:span text:style-name="T2">Comments suggesting incomplete workflow</text:span></text:p>
      <text:p text:style-name="P8"/>
      <text:p text:style-name="P8">1.1(c)</text:p>
      <text:p text:style-name="P8">1.1(d)</text:p>
      <text:p text:style-name="P8">1.1(e)</text:p>
      <text:p text:style-name="P8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25:02.577090104</dc:date>
    <meta:editing-duration>PT1H59M1S</meta:editing-duration>
    <meta:editing-cycles>15</meta:editing-cycles>
    <meta:document-statistic meta:table-count="0" meta:image-count="0" meta:object-count="0" meta:page-count="1" meta:paragraph-count="11" meta:word-count="72" meta:character-count="605" meta:non-whitespace-character-count="542"/>
  </office:meta>
</office:document-meta>
</file>