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D00000111631E0A24.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T120" style:family="text">
      <style:text-properties officeooo:rsid="0175248a"/>
    </style:style>
    <style:style style:name="T121" style:family="text">
      <style:text-properties officeooo:rsid="0178b00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asks” endpoint was tested in context of creating new task<text:span text:style-name="T119">s</text:span> (POST as opposed to GET). <text:span text:style-name="T120">This is the core functionality </text:span><text:span text:style-name="T121">of this application so it needs to </text:span></text:p>
      <text:p text:style-name="P75"><draw:frame draw:style-name="fr5" draw:name="Image10" text:anchor-type="char" svg:width="13.044cm" svg:height="7.223cm" draw:z-index="9"><draw:image xlink:href="Pictures/10000001000001ED00000111631E0A24.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03:28.826114049</dc:date>
    <meta:editing-duration>PT6H35M2S</meta:editing-duration>
    <meta:editing-cycles>300</meta:editing-cycles>
    <meta:document-statistic meta:table-count="0" meta:image-count="10" meta:object-count="0" meta:page-count="6" meta:paragraph-count="49" meta:word-count="1032" meta:character-count="6956" meta:non-whitespace-character-count="5960"/>
  </office:meta>
</office:document-meta>
</file>