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3897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example is the aforementioned utility function “validate_priority”. The method itself looks functional, <text:span text:style-name="T68">an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6:21.262098862</dc:date>
    <meta:editing-duration>PT3H58M50S</meta:editing-duration>
    <meta:editing-cycles>184</meta:editing-cycles>
    <meta:document-statistic meta:table-count="0" meta:image-count="6" meta:object-count="0" meta:page-count="3" meta:paragraph-count="37" meta:word-count="627" meta:character-count="4363" meta:non-whitespace-character-count="3766"/>
  </office:meta>
</office:document-meta>
</file>