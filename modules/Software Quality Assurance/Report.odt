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c3121"/>
    </style:style>
    <style:style style:name="T95" style:family="text">
      <style:text-properties officeooo:rsid="01220a7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8">Similarly, <text:span text:style-name="T94">since the function “login” has been implemented poorly, it now requires a refactor, which vastly increases the workload – both for the original developer, as well as the reviewer.</text:span></text:p>
      <text:p text:style-name="P57"/>
      <text:p text:style-name="P59">For end users, <text:span text:style-name="T95">effective deliverable managemen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0:57.095366223</dc:date>
    <meta:editing-duration>PT4H23M1S</meta:editing-duration>
    <meta:editing-cycles>236</meta:editing-cycles>
    <meta:document-statistic meta:table-count="0" meta:image-count="6" meta:object-count="0" meta:page-count="4" meta:paragraph-count="43" meta:word-count="816" meta:character-count="5589" meta:non-whitespace-character-count="4805"/>
  </office:meta>
</office:document-meta>
</file>