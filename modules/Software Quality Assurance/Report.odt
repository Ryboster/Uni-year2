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4c29b"/>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text:span text:style-name="T180">for this codebase. </text:span></text:p>
      <text:p text:style-name="P110"/>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2:02:17.655990618</dc:date>
    <meta:editing-duration>PT8H32M45S</meta:editing-duration>
    <meta:editing-cycles>433</meta:editing-cycles>
    <meta:document-statistic meta:table-count="0" meta:image-count="21" meta:object-count="0" meta:page-count="10" meta:paragraph-count="80" meta:word-count="1717" meta:character-count="11417" meta:non-whitespace-character-count="9767"/>
  </office:meta>
</office:document-meta>
</file>