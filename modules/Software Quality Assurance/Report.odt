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e63bcd"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dfbce9"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6" style:family="paragraph" style:parent-style-name="Standard" style:list-style-name="L1">
      <style:paragraph-properties fo:text-align="start" style:justify-single-word="false"/>
      <style:text-properties fo:font-size="12pt" fo:font-style="normal" style:text-underline-style="none" fo:font-weight="normal" officeooo:rsid="01e8955a" officeooo:paragraph-rsid="01e8955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start" style:justify-single-word="false"/>
      <style:text-properties fo:font-size="12pt" fo:font-style="normal" style:text-underline-style="none" fo:font-weight="normal" officeooo:rsid="01eb2eea" officeooo:paragraph-rsid="01eb2eea"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T159" style:family="text">
      <style:text-properties officeooo:rsid="01e63bcd"/>
    </style:style>
    <style:style style:name="T160" style:family="text">
      <style:text-properties officeooo:rsid="01e6b5e7"/>
    </style:style>
    <style:style style:name="T161" style:family="text">
      <style:text-properties officeooo:rsid="01e7c21f"/>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E501 – This is a flake8 style violation. </text:p>
          <text:list>
            <text:list-item>
              <text:p text:style-name="P93"><text:span text:style-name="T159">This</text:span> means that the specified line of code exceeded the recommended length limit of 79 characters.</text:p>
            </text:list-item>
          </text:list>
        </text:list-item>
        <text:list-item>
          <text:p text:style-name="P94">C0116: Missing function or method docstring (missing-function-docstring)</text:p>
          <text:list>
            <text:list-item>
              <text:p text:style-name="P95">This means <text:span text:style-name="T160">that </text:span><text:span text:style-name="T161">the specified function has no docstring; the comment written as a string directly below the function’s definition.</text:span></text:p>
            </text:list-item>
          </text:list>
        </text:list-item>
        <text:list-item>
          <text:p text:style-name="P95">Formatting a regular string which could be an f-string</text:p>
          <text:list>
            <text:list-item>
              <text:p text:style-name="P96">This means that the specified line of code uses the old string formatting syntax; “ ‘Hello {}’.format(name) instead of f’Hello {name}’ ”.</text:p>
            </text:list-item>
          </text:list>
        </text:list-item>
      </text:list>
      <text:p text:style-name="P97"/>
      <text:p text:style-name="P98"/>
      <text:p text:style-name="P92">Potential Bugs</text:p>
      <text:list text:style-name="L2">
        <text:list-item>
          <text:p text:style-name="P99">flask.render_template_string imported but unused.</text:p>
        </text:list-item>
        <text:list-item>
          <text:p text:style-name="P99">W0613: Unused argument 'exception' (unused-argument)</text:p>
          <text:list>
            <text:list-item>
              <text:p text:style-name="P100">This means that a function takes an argument (named “exception”) but never uses it.</text:p>
            </text:list-item>
          </text:list>
        </text:list-item>
      </text:list>
      <text:p text:style-name="P101"/>
      <text:p text:style-name="P98"/>
      <text:p text:style-name="P91"><text:soft-page-break/></text:p>
      <text:p text:style-name="P91"/>
      <text:p text:style-name="P91"/>
      <text:p text:style-name="P90"/>
      <text:p text:style-name="P90"/>
      <text:p text:style-name="P90"/>
      <text:p text:style-name="P90"/>
      <text:p text:style-name="P90"/>
      <text:p text:style-name="P90"/>
      <text:p text:style-name="P9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1:36:46.238889867</dc:date>
    <meta:editing-duration>PT8H7M31S</meta:editing-duration>
    <meta:editing-cycles>394</meta:editing-cycles>
    <meta:document-statistic meta:table-count="0" meta:image-count="19" meta:object-count="0" meta:page-count="10" meta:paragraph-count="72" meta:word-count="1489" meta:character-count="9910" meta:non-whitespace-character-count="8486"/>
  </office:meta>
</office:document-meta>
</file>