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D000000C8F7426F06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1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20970b" officeooo:paragraph-rsid="0020970b" fo:background-color="transparent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T1" style:family="text">
      <style:text-properties officeooo:rsid="000d801d"/>
    </style:style>
    <style:style style:name="T2" style:family="text">
      <style:text-properties officeooo:rsid="0016e436"/>
    </style:style>
    <style:style style:name="T3" style:family="text">
      <style:text-properties officeooo:rsid="001cb2f1"/>
    </style:style>
    <style:style style:name="T4" style:family="text">
      <style:text-properties officeooo:rsid="000a79f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1"/>
      <text:p text:style-name="P2"/>
      <text:p text:style-name="P3">1. Deliverable Management and Quality Impact</text:p>
      <text:p text:style-name="P3"/>
      <text:p text:style-name="P4">1.1. Preliminary Codebase Examination</text:p>
      <text:p text:style-name="P4"/>
      <text:p text:style-name="P5">Initial examination reveals three dead functions; “validate_priority”, “format_task_for_display”, and “calculate_workload”. <text:span text:style-name="T1">A comment in “validate_priority” informs the user about this. This suggests that while validation logic was planned for and implemented, it was never integrated, suggesting rushed delivery.</text:span></text:p>
      <text:p text:style-name="P5"/>
      <text:p text:style-name="P5">“<text:span text:style-name="T1">flask.render_template_string” is imported but never used.</text:span></text:p>
      <text:p text:style-name="P5"/>
      <text:p text:style-name="P6">The codebase contains inconsistent SQL queries. <text:span text:style-name="T2">The “login” function uses string formatting in its query:</text:span></text:p>
      <text:p text:style-name="P6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7">, which is insecure, while the “get_task” function uses <text:span text:style-name="T3">context-</text:span>appropriate parameterised queries:</text:p>
      <text:p text:style-name="P7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6"/>
      <text:p text:style-name="P6"/>
      <text:p text:style-name="P8"><text:s/></text:p>
      <text:p text:style-name="P6"/>
      <text:p text:style-name="P6"/>
      <text:p text:style-name="P6"/>
      <text:p text:style-name="P6"/>
      <text:p text:style-name="P6"/>
      <text:p text:style-name="P6"/>
      <text:p text:style-name="P9">.</text:p>
      <text:p text:style-name="P10"/>
      <text:p text:style-name="P11">Input validation inconsistencies were also found. </text:p>
      <text:p text:style-name="P10"/>
      <text:p text:style-name="P12"/>
      <text:p text:style-name="P12"/>
      <text:p text:style-name="P12">1.1(b) <text:span text:style-name="T4">Comments suggesting incomplete workflow</text:span></text:p>
      <text:p text:style-name="P12"/>
      <text:p text:style-name="P12">1.1(c)</text:p>
      <text:p text:style-name="P12">1.1(d)</text:p>
      <text:p text:style-name="P12">1.1(e)</text:p>
      <text:p text:style-name="P12"><text:soft-page-break/></text:p>
      <text:p text:style-name="P4"/>
      <text:p text:style-name="P4"/>
      <text:p text:style-name="P4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5:39:12.131448001</dc:date>
    <meta:editing-duration>PT2H13M6S</meta:editing-duration>
    <meta:editing-cycles>24</meta:editing-cycles>
    <meta:document-statistic meta:table-count="0" meta:image-count="2" meta:object-count="0" meta:page-count="2" meta:paragraph-count="15" meta:word-count="100" meta:character-count="806" meta:non-whitespace-character-count="717"/>
  </office:meta>
</office:document-meta>
</file>