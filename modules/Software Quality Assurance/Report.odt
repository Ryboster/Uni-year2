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0970b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59e12"/>
    </style:style>
    <style:style style:name="T15" style:family="text">
      <style:text-properties officeooo:rsid="0085eaae"/>
    </style:style>
    <style:style style:name="T16" style:family="text">
      <style:text-properties officeooo:rsid="00810935"/>
    </style:style>
    <style:style style:name="T17" style:family="text">
      <style:text-properties officeooo:rsid="0082656c"/>
    </style:style>
    <style:style style:name="T18" style:family="text">
      <style:text-properties officeooo:rsid="0083a7ab"/>
    </style:style>
    <style:style style:name="T19" style:family="text">
      <style:text-properties officeooo:rsid="008904ed"/>
    </style:style>
    <style:style style:name="T20" style:family="text">
      <style:text-properties officeooo:rsid="008a8014"/>
    </style:style>
    <style:style style:name="T21" style:family="text">
      <style:text-properties officeooo:rsid="008afd66"/>
    </style:style>
    <style:style style:name="T22" style:family="text">
      <style:text-properties officeooo:rsid="008c7445"/>
    </style:style>
    <style:style style:name="T23" style:family="text">
      <style:text-properties officeooo:rsid="0053f89c"/>
    </style:style>
    <style:style style:name="T24" style:family="text">
      <style:text-properties officeooo:rsid="0052fe26"/>
    </style:style>
    <style:style style:name="T25" style:family="text">
      <style:text-properties fo:color="#ffffff" loext:opacity="100%" fo:font-weight="normal" officeooo:rsid="0020970b" fo:background-color="transparent" loext:char-shading-value="0"/>
    </style:style>
    <style:style style:name="T26" style:family="text">
      <style:text-properties fo:color="#ffffff" loext:opacity="100%" fo:font-weight="normal" officeooo:rsid="0021bc69" fo:background-color="transparent" loext:char-shading-value="0"/>
    </style:style>
    <style:style style:name="T27" style:family="text">
      <style:text-properties officeooo:rsid="0021bc69"/>
    </style:style>
    <style:style style:name="T28" style:family="text">
      <style:text-properties officeooo:rsid="00562ae4"/>
    </style:style>
    <style:style style:name="T29" style:family="text">
      <style:text-properties officeooo:rsid="0055c7b1"/>
    </style:style>
    <style:style style:name="T30" style:family="text">
      <style:text-properties officeooo:rsid="002bc841"/>
    </style:style>
    <style:style style:name="T31" style:family="text">
      <style:text-properties officeooo:rsid="003751e3"/>
    </style:style>
    <style:style style:name="T32" style:family="text">
      <style:text-properties officeooo:rsid="00391f21"/>
    </style:style>
    <style:style style:name="T33" style:family="text">
      <style:text-properties officeooo:rsid="003f50b5"/>
    </style:style>
    <style:style style:name="T34" style:family="text">
      <style:text-properties officeooo:rsid="0040684a"/>
    </style:style>
    <style:style style:name="T35" style:family="text">
      <style:text-properties officeooo:rsid="006163eb"/>
    </style:style>
    <style:style style:name="T36" style:family="text">
      <style:text-properties officeooo:rsid="00712611"/>
    </style:style>
    <style:style style:name="T37" style:family="text">
      <style:text-properties officeooo:rsid="0071dcf4"/>
    </style:style>
    <style:style style:name="T38" style:family="text">
      <style:text-properties officeooo:rsid="0072ed4e"/>
    </style:style>
    <style:style style:name="T39" style:family="text">
      <style:text-properties officeooo:rsid="0074eb40"/>
    </style:style>
    <style:style style:name="T40" style:family="text">
      <style:text-properties officeooo:rsid="0076b094"/>
    </style:style>
    <style:style style:name="T41" style:family="text">
      <style:text-properties officeooo:rsid="007a110e"/>
    </style:style>
    <style:style style:name="T42" style:family="text">
      <style:text-properties officeooo:rsid="00777ba6"/>
    </style:style>
    <style:style style:name="T43" style:family="text">
      <style:text-properties officeooo:rsid="005ac241"/>
    </style:style>
    <style:style style:name="T44" style:family="text">
      <style:text-properties officeooo:rsid="006f03da"/>
    </style:style>
    <style:style style:name="T45" style:family="text">
      <style:text-properties officeooo:rsid="00708cff"/>
    </style:style>
    <style:style style:name="T46" style:family="text">
      <style:text-properties officeooo:rsid="0064d8e3"/>
    </style:style>
    <style:style style:name="T47" style:family="text">
      <style:text-properties officeooo:rsid="0066dd6d"/>
    </style:style>
    <style:style style:name="T48" style:family="text">
      <style:text-properties officeooo:rsid="0068ef9c"/>
    </style:style>
    <style:style style:name="T49" style:family="text">
      <style:text-properties officeooo:rsid="00695487"/>
    </style:style>
    <style:style style:name="T50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</text:span><text:span text:style-name="T14">scanner</text:span><text:span text:style-name="T13"> could be </text:span><text:span text:style-name="T15">implemented</text:span><text:span text:style-name="T13">. </text:span><text:span text:style-name="T16">By iterating over each POST endpoint </text:span><text:span text:style-name="T17">and attempting to perform a relatively safe SQL injection, </text:span><text:span text:style-name="T18">such inconsistencies could be caught early and before deployment. </text:span><text:span text:style-name="T19">This </text:span><text:span text:style-name="T20">is vital b</text:span><text:span text:style-name="T21">ecause relying on string formatting carries the risk of the </text:span><text:span text:style-name="T22">irreversible</text:span><text:span text:style-name="T21"> loss of all data.</text:span></text:p>
      <text:p text:style-name="P21"/>
      <text:p text:style-name="P21"/>
      <text:p text:style-name="P21"/>
      <text:p text:style-name="P21"/>
      <text:p text:style-name="P22"><text:span text:style-name="T23">C</text:span><text:span text:style-name="T5">.</text:span> <text:span text:style-name="T24">Input Validation Inconsistencies</text:span></text:p>
      <text:p text:style-name="P23"><text:span text:style-name="T25">Input validation inconsistencies were also found. </text:span><text:span text:style-name="T26">The “create_task”</text:span> <text:span text:style-name="T27">function validates input properly:</text:span></text:p>
      <text:p text:style-name="P2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5"/>
      <text:p text:style-name="P26">, <text:span text:style-name="T27">while “update_task” does not:</text:span></text:p>
      <text:p text:style-name="P2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8">One other example of this is the “add_comment” function, where input is not being validated either.</text:p>
      <text:p text:style-name="P29"/>
      <text:p text:style-name="P29"><text:span text:style-name="T28">D</text:span><text:span text:style-name="T5">.</text:span> <text:span text:style-name="T29">Error-Handling</text:span><text:span text:style-name="T7"> Inconsistencies</text:span></text:p>
      <text:p text:style-name="P29"/>
      <text:p text:style-name="P30"><text:span text:style-name="T30">E</text:span>rror-handling inconsistencies <text:span text:style-name="T30">were found </text:span><text:span text:style-name="T31">as well. </text:span><text:span text:style-name="T32">Some functions like “get_task” incorporate proper error handling:</text:span></text:p>
      <text:p text:style-name="P30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0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32">, <text:span text:style-name="T33">while </text:span><text:span text:style-name="T34">other functions like “delete_task” do not:</text:span></text:p>
      <text:p text:style-name="P32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Existence of record is never verified before deletion attempt – <text:span text:style-name="T35">This fails silently</text:span>).</text:p>
      <text:p text:style-name="P33"/>
      <text:p text:style-name="P33"><text:span text:style-name="T36">This quality issue could be prevented by </text:span><text:span text:style-name="T37">including error handling in each CRUD (Create, Read, Update, Delete) operation. Unit tests should be written to </text:span><text:span text:style-name="T38">test for known failure points. </text:span><text:span text:style-name="T39">Execution of </text:span><text:soft-page-break/><text:span text:style-name="T39">said unit tests could be automated in the CI/CD pipeline </text:span><text:span text:style-name="T40">to catch </text:span><text:span text:style-name="T41">such inconsistencies</text:span><text:span text:style-name="T40"> before </text:span><text:span text:style-name="T42">deployment.</text:span><text:line-break/></text:p>
      <text:p text:style-name="P34"><text:span text:style-name="T43">E</text:span><text:span text:style-name="T5">.</text:span> <text:span text:style-name="T43">Authentication</text:span><text:span text:style-name="T7"> Inconsistencies</text:span></text:p>
      <text:p text:style-name="P35"/>
      <text:p text:style-name="P36">Authentication only exists at the /login endpoint. No other endpoint requires it. This effectively makes authentication a feature rather than a system-wide integration.</text:p>
      <text:p text:style-name="P37"/>
      <text:p text:style-name="P37">This quality issue could be prevented by integrating authentication system-wide. <text:span text:style-name="T44">Integration could be tested automatically with an enumeration script </text:span><text:span text:style-name="T45">that navigates to each endpoint without appropriate permissions. </text:span></text:p>
      <text:p text:style-name="P37"/>
      <text:p text:style-name="P32"/>
      <text:p text:style-name="P32"/>
      <text:p text:style-name="P38"><text:span text:style-name="T46">F</text:span><text:span text:style-name="T5">.</text:span> <text:span text:style-name="T47">No Database Error Handling</text:span></text:p>
      <text:p text:style-name="P32"/>
      <text:p text:style-name="P39">A<text:span text:style-name="T48">cross the entire file, not one database call includes error handling. If an error was to occur in a “db.execute” call, </text:span><text:span text:style-name="T49">the application would fail. </text:span><text:span text:style-name="T50">This could be remedied with try-except blocks. </text:span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8:37.174797290</dc:date>
    <meta:editing-duration>PT3H1M44S</meta:editing-duration>
    <meta:editing-cycles>107</meta:editing-cycles>
    <meta:document-statistic meta:table-count="0" meta:image-count="6" meta:object-count="0" meta:page-count="3" meta:paragraph-count="28" meta:word-count="409" meta:character-count="2900" meta:non-whitespace-character-count="2512"/>
  </office:meta>
</office:document-meta>
</file>