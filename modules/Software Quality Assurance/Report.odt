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2fc7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f desirable. Particularly in this <text:span text:style-name="T179">case</text:span>.</text:p>
      <text:p text:style-name="P11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9:00.887942098</dc:date>
    <meta:editing-duration>PT8H29M29S</meta:editing-duration>
    <meta:editing-cycles>431</meta:editing-cycles>
    <meta:document-statistic meta:table-count="0" meta:image-count="21" meta:object-count="0" meta:page-count="10" meta:paragraph-count="80" meta:word-count="1718" meta:character-count="11425" meta:non-whitespace-character-count="9775"/>
  </office:meta>
</office:document-meta>
</file>