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b4218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5ac241"/>
    </style:style>
    <style:style style:name="T24" style:family="text">
      <style:text-properties officeooo:rsid="005f4c19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).<text:line-break/></text:p>
      <text:p text:style-name="P32"><text:span text:style-name="T23">E</text:span><text:span text:style-name="T4">.</text:span> <text:span text:style-name="T23">Authentication</text:span><text:span text:style-name="T6"> Inconsistencies</text:span></text:p>
      <text:p text:style-name="P32"/>
      <text:p text:style-name="P33">The only endpoint that <text:span text:style-name="T24">includes authentication is /login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0:45.696823040</dc:date>
    <meta:editing-duration>PT2H44M14S</meta:editing-duration>
    <meta:editing-cycles>68</meta:editing-cycles>
    <meta:document-statistic meta:table-count="0" meta:image-count="6" meta:object-count="0" meta:page-count="2" meta:paragraph-count="22" meta:word-count="191" meta:character-count="1465" meta:non-whitespace-character-count="1292"/>
  </office:meta>
</office:document-meta>
</file>