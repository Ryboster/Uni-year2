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3"/>
      <text:p text:style-name="P90"/>
      <text:p text:style-name="P90"/>
      <text:p text:style-name="P104">The tests cover 72% of the code. <text:span text:style-name="T166">Missing lines include 145, 190, 226, 244-247, 255-260, 266-276, 284-286, 294-298, 305-307, 312, 321-325, 331-334. </text:span></text:p>
      <text:p text:style-name="P104"/>
      <text:p text:style-name="P105">To see why some of the lines are missing, consider the following example:</text:p>
      <text:p text:style-name="P104"/>
      <text:p text:style-name="P104"><draw:frame draw:style-name="fr3" draw:name="Image21" text:anchor-type="char" svg:width="14.446cm" svg:height="3.598cm" draw:z-index="20"><draw:image xlink:href="Pictures/100000010000022200000088320A0B57.png" xlink:type="simple" xlink:show="embed" xlink:actuate="onLoad" draw:mime-type="image/png"/></draw:frame></text:p>
      <text:p text:style-name="P104"/>
      <text:p text:style-name="P106"><text:s/></text:p>
      <text:p text:style-name="P107"/>
      <text:p text:style-name="P107"/>
      <text:p text:style-name="P107"/>
      <text:p text:style-name="P107"/>
      <text:p text:style-name="P107"/>
      <text:p text:style-name="P105">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5"/>
      <text:p text:style-name="P108">The risks of uncovered code are unknown and hard to quantify. </text:p>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2:56.130190290</dc:date>
    <meta:editing-duration>PT8H23M32S</meta:editing-duration>
    <meta:editing-cycles>414</meta:editing-cycles>
    <meta:document-statistic meta:table-count="0" meta:image-count="21" meta:object-count="0" meta:page-count="10" meta:paragraph-count="79" meta:word-count="1645" meta:character-count="10929" meta:non-whitespace-character-count="9351"/>
  </office:meta>
</office:document-meta>
</file>