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paragraph-rsid="0020970b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6163eb"/>
    </style:style>
    <style:style style:name="T24" style:family="text">
      <style:text-properties officeooo:rsid="00712611"/>
    </style:style>
    <style:style style:name="T25" style:family="text">
      <style:text-properties officeooo:rsid="0071dcf4"/>
    </style:style>
    <style:style style:name="T26" style:family="text">
      <style:text-properties officeooo:rsid="0072ed4e"/>
    </style:style>
    <style:style style:name="T27" style:family="text">
      <style:text-properties officeooo:rsid="0074eb40"/>
    </style:style>
    <style:style style:name="T28" style:family="text">
      <style:text-properties officeooo:rsid="0076b094"/>
    </style:style>
    <style:style style:name="T29" style:family="text">
      <style:text-properties officeooo:rsid="007a110e"/>
    </style:style>
    <style:style style:name="T30" style:family="text">
      <style:text-properties officeooo:rsid="00777ba6"/>
    </style:style>
    <style:style style:name="T31" style:family="text">
      <style:text-properties officeooo:rsid="005ac241"/>
    </style:style>
    <style:style style:name="T32" style:family="text">
      <style:text-properties officeooo:rsid="006f03da"/>
    </style:style>
    <style:style style:name="T33" style:family="text">
      <style:text-properties officeooo:rsid="00708cff"/>
    </style:style>
    <style:style style:name="T34" style:family="text">
      <style:text-properties officeooo:rsid="0064d8e3"/>
    </style:style>
    <style:style style:name="T35" style:family="text">
      <style:text-properties officeooo:rsid="0066dd6d"/>
    </style:style>
    <style:style style:name="T36" style:family="text">
      <style:text-properties officeooo:rsid="0068ef9c"/>
    </style:style>
    <style:style style:name="T37" style:family="text">
      <style:text-properties officeooo:rsid="00695487"/>
    </style:style>
    <style:style style:name="T38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/text:p>
      <text:p text:style-name="P7"/>
      <text:p text:style-name="P9"/>
      <text:p text:style-name="P10"><text:span text:style-name="T1">B</text:span><text:span text:style-name="T4">.</text:span> <text:span text:style-name="T5">Query</text:span><text:span text:style-name="T6"> Inconsistencies</text:span></text:p>
      <text:p text:style-name="P11"/>
      <text:p text:style-name="P12">The codebase contains inconsistent SQL queries. <text:span text:style-name="T7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8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20"/>
      <text:p text:style-name="P20"/>
      <text:p text:style-name="P20"><text:soft-page-break/></text:p>
      <text:p text:style-name="P20"/>
      <text:p text:style-name="P21"><text:span text:style-name="T11">C</text:span><text:span text:style-name="T4">.</text:span> <text:span text:style-name="T12">Input Validation Inconsistencies</text:span></text:p>
      <text:p text:style-name="P22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3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4"/>
      <text:p text:style-name="P25">, <text:span text:style-name="T15">while “update_task” does not:</text:span></text:p>
      <text:p text:style-name="P24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4"/>
      <text:p text:style-name="P24"/>
      <text:p text:style-name="P26"/>
      <text:p text:style-name="P26"/>
      <text:p text:style-name="P27">One other example of this is the “add_comment” function, where input is not being validated either.</text:p>
      <text:p text:style-name="P28"/>
      <text:p text:style-name="P28"><text:span text:style-name="T16">D</text:span><text:span text:style-name="T4">.</text:span> <text:span text:style-name="T17">Error-Handling</text:span><text:span text:style-name="T6"> Inconsistencies</text:span></text:p>
      <text:p text:style-name="P28"/>
      <text:p text:style-name="P29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9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9"/>
      <text:p text:style-name="P26"/>
      <text:p text:style-name="P26"/>
      <text:p text:style-name="P24"/>
      <text:p text:style-name="P24"/>
      <text:p text:style-name="P24"/>
      <text:p text:style-name="P24"/>
      <text:p text:style-name="P24"/>
      <text:p text:style-name="P30"/>
      <text:p text:style-name="P30"/>
      <text:p text:style-name="P31">, <text:span text:style-name="T21">while </text:span><text:span text:style-name="T22">other functions like “delete_task” do not:</text:span></text:p>
      <text:p text:style-name="P31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(Existence of record is never verified before deletion attempt – <text:span text:style-name="T23">This fails silently</text:span>).</text:p>
      <text:p text:style-name="P32"/>
      <text:p text:style-name="P32"><text:span text:style-name="T24">This quality issue could be prevented by </text:span><text:span text:style-name="T25">including error handling in each CRUD (Create, Read, Update, Delete) operation. Unit tests should be written to </text:span><text:span text:style-name="T26">test for known failure points. </text:span><text:span text:style-name="T27">Execution of said unit tests could be automated in the CI/CD pipeline </text:span><text:span text:style-name="T28">to catch </text:span><text:span text:style-name="T29">such inconsistencies</text:span><text:span text:style-name="T28"> before </text:span><text:span text:style-name="T30">deployment.</text:span><text:line-break/></text:p>
      <text:p text:style-name="P33"><text:span text:style-name="T31">E</text:span><text:span text:style-name="T4">.</text:span> <text:span text:style-name="T31">Authentication</text:span><text:span text:style-name="T6"> Inconsistencies</text:span></text:p>
      <text:p text:style-name="P34"/>
      <text:p text:style-name="P35"><text:soft-page-break/>Authentication only exists at the /login endpoint. No other endpoint requires it. This effectively makes authentication a feature rather than a system-wide integration.</text:p>
      <text:p text:style-name="P36"/>
      <text:p text:style-name="P36">This quality issue could be prevented by integrating authentication system-wide. <text:span text:style-name="T32">Integration could be tested automatically with an enumeration script </text:span><text:span text:style-name="T33">that navigates to each endpoint without appropriate permissions. </text:span></text:p>
      <text:p text:style-name="P36"/>
      <text:p text:style-name="P31"/>
      <text:p text:style-name="P31"/>
      <text:p text:style-name="P37"><text:span text:style-name="T34">F</text:span><text:span text:style-name="T4">.</text:span> <text:span text:style-name="T35">No Database Error Handling</text:span></text:p>
      <text:p text:style-name="P31"/>
      <text:p text:style-name="P38">A<text:span text:style-name="T36">cross the entire file, not one database call includes error handling. If an error was to occur in a “db.execute” call, </text:span><text:span text:style-name="T37">the application would fail. </text:span><text:span text:style-name="T38">This could be remedied with try-except blocks. </text:span></text:p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21:38.964860727</dc:date>
    <meta:editing-duration>PT2H54M54S</meta:editing-duration>
    <meta:editing-cycles>91</meta:editing-cycles>
    <meta:document-statistic meta:table-count="0" meta:image-count="6" meta:object-count="0" meta:page-count="3" meta:paragraph-count="27" meta:word-count="330" meta:character-count="2399" meta:non-whitespace-character-count="2089"/>
  </office:meta>
</office:document-meta>
</file>