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officeooo:paragraph-rsid="0020970b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9139a" officeooo:paragraph-rsid="0049139a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34883b"/>
    </style:style>
    <style:style style:name="T5" style:family="text">
      <style:text-properties officeooo:rsid="0050a23e"/>
    </style:style>
    <style:style style:name="T6" style:family="text">
      <style:text-properties officeooo:rsid="004c1871"/>
    </style:style>
    <style:style style:name="T7" style:family="text">
      <style:text-properties officeooo:rsid="0016e436"/>
    </style:style>
    <style:style style:name="T8" style:family="text">
      <style:text-properties officeooo:rsid="001cb2f1"/>
    </style:style>
    <style:style style:name="T9" style:family="text">
      <style:text-properties officeooo:rsid="002505ed"/>
    </style:style>
    <style:style style:name="T10" style:family="text">
      <style:text-properties officeooo:rsid="002618e1"/>
    </style:style>
    <style:style style:name="T11" style:family="text">
      <style:text-properties officeooo:rsid="0053f89c"/>
    </style:style>
    <style:style style:name="T12" style:family="text">
      <style:text-properties officeooo:rsid="0052fe26"/>
    </style:style>
    <style:style style:name="T13" style:family="text">
      <style:text-properties fo:color="#ffffff" loext:opacity="100%" fo:font-weight="normal" officeooo:rsid="0020970b" fo:background-color="transparent" loext:char-shading-value="0"/>
    </style:style>
    <style:style style:name="T14" style:family="text">
      <style:text-properties fo:color="#ffffff" loext:opacity="100%" fo:font-weight="normal" officeooo:rsid="0021bc69" fo:background-color="transparent" loext:char-shading-value="0"/>
    </style:style>
    <style:style style:name="T15" style:family="text">
      <style:text-properties officeooo:rsid="0021bc69"/>
    </style:style>
    <style:style style:name="T16" style:family="text">
      <style:text-properties officeooo:rsid="002bc841"/>
    </style:style>
    <style:style style:name="T17" style:family="text">
      <style:text-properties officeooo:rsid="003751e3"/>
    </style:style>
    <style:style style:name="T18" style:family="text">
      <style:text-properties officeooo:rsid="00391f21"/>
    </style:style>
    <style:style style:name="T19" style:family="text">
      <style:text-properties officeooo:rsid="003f50b5"/>
    </style:style>
    <style:style style:name="T20" style:family="text">
      <style:text-properties officeooo:rsid="0040684a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/>
      <text:p text:style-name="P9"><text:span text:style-name="T1">B</text:span><text:span text:style-name="T4">.</text:span> <text:span text:style-name="T5">Query</text:span><text:span text:style-name="T6"> Inconsistencies</text:span></text:p>
      <text:p text:style-name="P10"/>
      <text:p text:style-name="P11">The codebase contains inconsistent SQL queries. <text:span text:style-name="T7">The “login” function uses string formatting in its query:</text:span></text:p>
      <text:p text:style-name="P12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3">, which is insecure, while the “get_task” function uses <text:span text:style-name="T8">context-</text:span>appropriate parameterised queries:</text:p>
      <text:p text:style-name="P14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2"/>
      <text:p text:style-name="P12"/>
      <text:p text:style-name="P15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6">.</text:p>
      <text:p text:style-name="P17"/>
      <text:p text:style-name="P18"><text:span text:style-name="T9">One other place where</text:span> string formatting <text:span text:style-name="T9">is </text:span>being used in place of parameterised queries <text:span text:style-name="T10">is the</text:span> “<text:span text:style-name="T9">search_tasks</text:span>” <text:span text:style-name="T10">function.</text:span></text:p>
      <text:p text:style-name="P19"/>
      <text:p text:style-name="P19"/>
      <text:p text:style-name="P19"/>
      <text:p text:style-name="P19"/>
      <text:p text:style-name="P20"><text:soft-page-break/><text:span text:style-name="T11">C</text:span><text:span text:style-name="T4">.</text:span> <text:span text:style-name="T12">Input Validation Inconsistencies</text:span></text:p>
      <text:p text:style-name="P21"><text:span text:style-name="T13">Input validation inconsistencies were also found. </text:span><text:span text:style-name="T14">The “create_task”</text:span> <text:span text:style-name="T15">function validates input properly:</text:span></text:p>
      <text:p text:style-name="P22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7"/>
      <text:p text:style-name="P23"/>
      <text:p text:style-name="P24">, <text:span text:style-name="T15">while “update_task” does not:</text:span></text:p>
      <text:p text:style-name="P23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3"/>
      <text:p text:style-name="P23"/>
      <text:p text:style-name="P25"/>
      <text:p text:style-name="P25"/>
      <text:p text:style-name="P26">One other example of this is the “add_comment” function, where input is not being validated either.</text:p>
      <text:p text:style-name="P26"/>
      <text:p text:style-name="P27"/>
      <text:p text:style-name="P27"><text:span text:style-name="T16">E</text:span>rror-handling inconsistencies <text:span text:style-name="T16">were found </text:span><text:span text:style-name="T17">as well. </text:span><text:span text:style-name="T18">Some functions like “get_task” incorporate proper error handling:</text:span></text:p>
      <text:p text:style-name="P27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7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8"/>
      <text:p text:style-name="P28"/>
      <text:p text:style-name="P29">, <text:span text:style-name="T19">while </text:span><text:span text:style-name="T20">other functions like “delete_task” do not:</text:span></text:p>
      <text:p text:style-name="P29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(Existence of record is never verified before deletion attempt).<text:line-break/></text:p>
      <text:p text:style-name="P30"/>
      <text:p text:style-name="P31">Authentication inconsistencies were found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09:51.910703195</dc:date>
    <meta:editing-duration>PT2H43M24S</meta:editing-duration>
    <meta:editing-cycles>60</meta:editing-cycles>
    <meta:document-statistic meta:table-count="0" meta:image-count="6" meta:object-count="0" meta:page-count="2" meta:paragraph-count="20" meta:word-count="181" meta:character-count="1384" meta:non-whitespace-character-count="1219"/>
  </office:meta>
</office:document-meta>
</file>