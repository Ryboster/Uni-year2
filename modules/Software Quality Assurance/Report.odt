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46d9f3" officeooo:paragraph-rsid="025415c1"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3a30b3" officeooo:paragraph-rsid="025415c1"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officeooo:rsid="024feae8"/>
    </style:style>
    <style:style style:name="T190" style:family="text">
      <style:text-properties officeooo:rsid="02488339"/>
    </style:style>
    <style:style style:name="T191" style:family="text">
      <style:text-properties officeooo:rsid="025415c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Once the piece of functionality is planned, a test for it could be devised. You could gather all the ways in which the feature could fail, and then write tests that incorporate those failures, <text:span text:style-name="T189">i.e. Aim to trigger them</text:span>. <text:span text:style-name="T190">Once the test is complete, </text:span><text:span text:style-name="T191">a ticket for the feature could’ve been created with acceptance criteria that demand </text:span></text:p>
      <text:p text:style-name="P116"/>
      <text:p text:style-name="P117"/>
      <text:p text:style-name="P112"/>
      <text:p text:style-name="P112"/>
      <text:p text:style-name="P1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1:28.793669216</dc:date>
    <meta:editing-duration>PT8H51M37S</meta:editing-duration>
    <meta:editing-cycles>468</meta:editing-cycles>
    <meta:document-statistic meta:table-count="0" meta:image-count="21" meta:object-count="0" meta:page-count="11" meta:paragraph-count="83" meta:word-count="1867" meta:character-count="12368" meta:non-whitespace-character-count="10570"/>
  </office:meta>
</office:document-meta>
</file>