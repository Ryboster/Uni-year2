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daf0b1"/>
    </style:style>
    <style:style style:name="T67" style:family="text">
      <style:text-properties officeooo:rsid="00e0446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Deliverable </text:span><text:span text:style-name="T67">Management </text:span><text:span text:style-name="T66">Impact</text:span></text:p>
      <text:p text:style-name="P49"/>
      <text:p text:style-name="P49"/>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22:38.702204205</dc:date>
    <meta:editing-duration>PT3H55M10S</meta:editing-duration>
    <meta:editing-cycles>179</meta:editing-cycles>
    <meta:document-statistic meta:table-count="0" meta:image-count="6" meta:object-count="0" meta:page-count="3" meta:paragraph-count="35" meta:word-count="595" meta:character-count="4120" meta:non-whitespace-character-count="3554"/>
  </office:meta>
</office:document-meta>
</file>