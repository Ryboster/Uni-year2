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text:span text:style-name="T108">Lastly, a boundary test was conducted to </text:span><text:span text:style-name="T114">ensure that the input behaves predictably. </text:span><text:span text:style-name="T115">This test sends the correct data type, but </text:span><text:span text:style-name="T116">incorrect values.</text:span></text:p>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2:39.394376342</dc:date>
    <meta:editing-duration>PT6H24M25S</meta:editing-duration>
    <meta:editing-cycles>278</meta:editing-cycles>
    <meta:document-statistic meta:table-count="0" meta:image-count="8" meta:object-count="0" meta:page-count="6" meta:paragraph-count="48" meta:word-count="985" meta:character-count="6677" meta:non-whitespace-character-count="5729"/>
  </office:meta>
</office:document-meta>
</file>