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c32546"/>
    </style:style>
    <style:style style:name="T145" style:family="text">
      <style:text-properties officeooo:rsid="01c55cb8"/>
    </style:style>
    <style:style style:name="T146" style:family="text">
      <style:text-properties officeooo:rsid="01c83915"/>
    </style:style>
    <style:style style:name="T147" style:family="text">
      <style:text-properties officeooo:rsid="01b96a99"/>
    </style:style>
    <style:style style:name="T148" style:family="text">
      <style:text-properties officeooo:rsid="01b9b7dc"/>
    </style:style>
    <style:style style:name="T149" style:family="text">
      <style:text-properties officeooo:rsid="01bb636c"/>
    </style:style>
    <style:style style:name="T150" style:family="text">
      <style:text-properties officeooo:rsid="01bc40e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06">Unit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4">s written earlier don’t actually verify the results of their operations. Unit tests in principle only test that a given unit responsible for a given piece of functionality functions as expected, e.g. that the function “create_task” responds with the </text:span><text:span text:style-name="T145">status code 201 when given correct payload.</text:span></text:p>
      <text:p text:style-name="P88"/>
      <text:p text:style-name="P88">To address this blind spot, integration tests are used instead. <text:span text:style-name="T146">By using an integration test, we can test multiple units in unison to </text:span></text:p>
      <text:p text:style-name="P87"/>
      <text:p text:style-name="P87"><text:s/>for creating tasks only ensures that the unit responsible for <text:span text:style-name="T147">creating</text:span> task<text:span text:style-name="T147">s</text:span> functions correctly, i.e. returns a 201 status code. <text:span text:style-name="T148">It doesn’t actually test whether the task is being created – that’s outside of its responsibility. </text:span><text:span text:style-name="T149">Due to that, I created an integration test to </text:span><text:span text:style-name="T150">verify that.</text:span></text:p>
      <text:p text:style-name="P82"/>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55:59.285107703</dc:date>
    <meta:editing-duration>PT7H27M2S</meta:editing-duration>
    <meta:editing-cycles>358</meta:editing-cycles>
    <meta:document-statistic meta:table-count="0" meta:image-count="17" meta:object-count="0" meta:page-count="8" meta:paragraph-count="60" meta:word-count="1366" meta:character-count="9071" meta:non-whitespace-character-count="7749"/>
  </office:meta>
</office:document-meta>
</file>