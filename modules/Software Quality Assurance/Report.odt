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be2c4d" style:font-size-asian="12pt" style:font-weight-asian="normal" style:font-size-complex="12pt"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6a7e30"/>
    </style:style>
    <style:style style:name="T62" style:family="text">
      <style:text-properties officeooo:rsid="00bf5fe1"/>
    </style:style>
    <style:style style:name="T63" style:family="text">
      <style:text-properties officeooo:rsid="00bf8e8c"/>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This could be remedied with try-except blocks. </text:span></text:p>
      <text:p text:style-name="P35"/>
      <text:p text:style-name="P35"/>
      <text:p text:style-name="P46">To patch this, try-except blocks should be implemented in each database call block. <text:span text:style-name="T62">Additionally, transactions and roll-backs should be implemented in each database query to prevent </text:span><text:span text:style-name="T63">data loss in case of erro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10:56.695371485</dc:date>
    <meta:editing-duration>PT3H43M41S</meta:editing-duration>
    <meta:editing-cycles>154</meta:editing-cycles>
    <meta:document-statistic meta:table-count="0" meta:image-count="6" meta:object-count="0" meta:page-count="3" meta:paragraph-count="34" meta:word-count="585" meta:character-count="4055" meta:non-whitespace-character-count="3497"/>
  </office:meta>
</office:document-meta>
</file>