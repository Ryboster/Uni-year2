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fo:font-weight="bold" officeooo:rsid="0002df3a" officeooo:paragraph-rsid="0002df3a"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T1" style:family="text">
      <style:text-properties officeooo:rsid="004aeffb"/>
    </style:style>
    <style:style style:name="T2" style:family="text">
      <style:text-properties officeooo:rsid="0032f33d"/>
    </style:style>
    <style:style style:name="T3" style:family="text">
      <style:text-properties officeooo:rsid="000d801d"/>
    </style:style>
    <style:style style:name="T4" style:family="text">
      <style:text-properties officeooo:rsid="007c2e90"/>
    </style:style>
    <style:style style:name="T5" style:family="text">
      <style:text-properties officeooo:rsid="0034883b"/>
    </style:style>
    <style:style style:name="T6" style:family="text">
      <style:text-properties officeooo:rsid="0050a23e"/>
    </style:style>
    <style:style style:name="T7" style:family="text">
      <style:text-properties officeooo:rsid="004c1871"/>
    </style:style>
    <style:style style:name="T8" style:family="text">
      <style:text-properties officeooo:rsid="0016e436"/>
    </style:style>
    <style:style style:name="T9" style:family="text">
      <style:text-properties officeooo:rsid="001cb2f1"/>
    </style:style>
    <style:style style:name="T10" style:family="text">
      <style:text-properties officeooo:rsid="002505ed"/>
    </style:style>
    <style:style style:name="T11" style:family="text">
      <style:text-properties officeooo:rsid="002618e1"/>
    </style:style>
    <style:style style:name="T12" style:family="text">
      <style:text-properties officeooo:rsid="009f9c12"/>
    </style:style>
    <style:style style:name="T13" style:family="text">
      <style:text-properties officeooo:rsid="00a0c28f"/>
    </style:style>
    <style:style style:name="T14" style:family="text">
      <style:text-properties officeooo:rsid="00859692"/>
    </style:style>
    <style:style style:name="T15" style:family="text">
      <style:text-properties officeooo:rsid="007f98fc"/>
    </style:style>
    <style:style style:name="T16" style:family="text">
      <style:text-properties officeooo:rsid="00859e12"/>
    </style:style>
    <style:style style:name="T17" style:family="text">
      <style:text-properties officeooo:rsid="0085eaae"/>
    </style:style>
    <style:style style:name="T18" style:family="text">
      <style:text-properties officeooo:rsid="00810935"/>
    </style:style>
    <style:style style:name="T19" style:family="text">
      <style:text-properties officeooo:rsid="0082656c"/>
    </style:style>
    <style:style style:name="T20" style:family="text">
      <style:text-properties officeooo:rsid="00a29adf"/>
    </style:style>
    <style:style style:name="T21" style:family="text">
      <style:text-properties officeooo:rsid="0083a7ab"/>
    </style:style>
    <style:style style:name="T22" style:family="text">
      <style:text-properties officeooo:rsid="008904ed"/>
    </style:style>
    <style:style style:name="T23" style:family="text">
      <style:text-properties officeooo:rsid="008a8014"/>
    </style:style>
    <style:style style:name="T24" style:family="text">
      <style:text-properties officeooo:rsid="008afd66"/>
    </style:style>
    <style:style style:name="T25" style:family="text">
      <style:text-properties officeooo:rsid="008c7445"/>
    </style:style>
    <style:style style:name="T26" style:family="text">
      <style:text-properties officeooo:rsid="00a51396"/>
    </style:style>
    <style:style style:name="T27" style:family="text">
      <style:text-properties officeooo:rsid="00a656f3"/>
    </style:style>
    <style:style style:name="T28" style:family="text">
      <style:text-properties officeooo:rsid="00924a23"/>
    </style:style>
    <style:style style:name="T29" style:family="text">
      <style:text-properties officeooo:rsid="008fbd41"/>
    </style:style>
    <style:style style:name="T30" style:family="text">
      <style:text-properties officeooo:rsid="009060a1"/>
    </style:style>
    <style:style style:name="T31" style:family="text">
      <style:text-properties officeooo:rsid="0053f89c"/>
    </style:style>
    <style:style style:name="T32" style:family="text">
      <style:text-properties officeooo:rsid="0052fe26"/>
    </style:style>
    <style:style style:name="T33" style:family="text">
      <style:text-properties fo:color="#ffffff" loext:opacity="100%" fo:font-weight="normal" officeooo:rsid="0020970b" fo:background-color="transparent" loext:char-shading-value="0"/>
    </style:style>
    <style:style style:name="T34" style:family="text">
      <style:text-properties fo:color="#ffffff" loext:opacity="100%" fo:font-weight="normal" officeooo:rsid="0021bc69" fo:background-color="transparent" loext:char-shading-value="0"/>
    </style:style>
    <style:style style:name="T35" style:family="text">
      <style:text-properties officeooo:rsid="0021bc69"/>
    </style:style>
    <style:style style:name="T36" style:family="text">
      <style:text-properties officeooo:rsid="0099b404"/>
    </style:style>
    <style:style style:name="T37" style:family="text">
      <style:text-properties officeooo:rsid="009a5da0"/>
    </style:style>
    <style:style style:name="T38" style:family="text">
      <style:text-properties officeooo:rsid="00562ae4"/>
    </style:style>
    <style:style style:name="T39" style:family="text">
      <style:text-properties officeooo:rsid="0055c7b1"/>
    </style:style>
    <style:style style:name="T40" style:family="text">
      <style:text-properties officeooo:rsid="002bc841"/>
    </style:style>
    <style:style style:name="T41" style:family="text">
      <style:text-properties officeooo:rsid="003751e3"/>
    </style:style>
    <style:style style:name="T42" style:family="text">
      <style:text-properties officeooo:rsid="00391f21"/>
    </style:style>
    <style:style style:name="T43" style:family="text">
      <style:text-properties officeooo:rsid="003f50b5"/>
    </style:style>
    <style:style style:name="T44" style:family="text">
      <style:text-properties officeooo:rsid="0040684a"/>
    </style:style>
    <style:style style:name="T45" style:family="text">
      <style:text-properties officeooo:rsid="006163eb"/>
    </style:style>
    <style:style style:name="T46" style:family="text">
      <style:text-properties officeooo:rsid="00712611"/>
    </style:style>
    <style:style style:name="T47" style:family="text">
      <style:text-properties officeooo:rsid="0071dcf4"/>
    </style:style>
    <style:style style:name="T48" style:family="text">
      <style:text-properties officeooo:rsid="0072ed4e"/>
    </style:style>
    <style:style style:name="T49" style:family="text">
      <style:text-properties officeooo:rsid="0074eb40"/>
    </style:style>
    <style:style style:name="T50" style:family="text">
      <style:text-properties officeooo:rsid="0076b094"/>
    </style:style>
    <style:style style:name="T51" style:family="text">
      <style:text-properties officeooo:rsid="007a110e"/>
    </style:style>
    <style:style style:name="T52" style:family="text">
      <style:text-properties officeooo:rsid="00777ba6"/>
    </style:style>
    <style:style style:name="T53" style:family="text">
      <style:text-properties officeooo:rsid="005ac241"/>
    </style:style>
    <style:style style:name="T54" style:family="text">
      <style:text-properties officeooo:rsid="00ba9bf2"/>
    </style:style>
    <style:style style:name="T55" style:family="text">
      <style:text-properties officeooo:rsid="006f03da"/>
    </style:style>
    <style:style style:name="T56" style:family="text">
      <style:text-properties officeooo:rsid="00708cff"/>
    </style:style>
    <style:style style:name="T57" style:family="text">
      <style:text-properties officeooo:rsid="0064d8e3"/>
    </style:style>
    <style:style style:name="T58" style:family="text">
      <style:text-properties officeooo:rsid="0066dd6d"/>
    </style:style>
    <style:style style:name="T59" style:family="text">
      <style:text-properties officeooo:rsid="0068ef9c"/>
    </style:style>
    <style:style style:name="T60" style:family="text">
      <style:text-properties officeooo:rsid="00695487"/>
    </style:style>
    <style:style style:name="T61" style:family="text">
      <style:text-properties officeooo:rsid="00c096f2"/>
    </style:style>
    <style:style style:name="T62" style:family="text">
      <style:text-properties officeooo:rsid="00d28935"/>
    </style:style>
    <style:style style:name="T63" style:family="text">
      <style:text-properties officeooo:rsid="00d36685"/>
    </style:style>
    <style:style style:name="T64" style:family="text">
      <style:text-properties officeooo:rsid="00d3c164"/>
    </style:style>
    <style:style style:name="T65" style:family="text">
      <style:text-properties officeooo:rsid="00d62d33"/>
    </style:style>
    <style:style style:name="T66" style:family="text">
      <style:text-properties officeooo:rsid="00daf0b1"/>
    </style:style>
    <style:style style:name="T67" style:family="text">
      <style:text-properties officeooo:rsid="00e04467"/>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Deliverable Management and Quality Impact</text:p>
      <text:p text:style-name="P4"/>
      <text:p text:style-name="P4">1.1. Preliminary Codebase Examination</text:p>
      <text:p text:style-name="P5"/>
      <text:p text:style-name="P6"><text:span text:style-name="T1">A</text:span><text:span text:style-name="T2">.</text:span> Dead Code</text:p>
      <text:p text:style-name="P5"/>
      <text:p text:style-name="P7">Initial examination reveals three dead functions; “validate_priority”, “format_task_for_display”, and “calculate_workload”. <text:span text:style-name="T3">A comment in “validate_priority” informs the user about this. This suggests that while validation logic was planned for and implemented, it was never integrated, suggesting rushed delivery.</text:span></text:p>
      <text:p text:style-name="P7"/>
      <text:p text:style-name="P7">“<text:span text:style-name="T3">flask.render_template_string” is imported but never used.</text:span></text:p>
      <text:p text:style-name="P7"/>
      <text:p text:style-name="P8">To prevent this in the future, pylint could be incorporated. <text:span text:style-name="T4">Pylint scanning could be carried out automatically in the CI/CD pipeline to catch and prune or integrate dead code before deployment. </text:span></text:p>
      <text:p text:style-name="P7"/>
      <text:p text:style-name="P9"/>
      <text:p text:style-name="P10"><text:span text:style-name="T1">B</text:span><text:span text:style-name="T5">.</text:span> <text:span text:style-name="T6">Query</text:span><text:span text:style-name="T7"> Inconsistencies</text:span></text:p>
      <text:p text:style-name="P11"/>
      <text:p text:style-name="P12">The codebase contains inconsistent SQL queries. <text:span text:style-name="T8">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9">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0">One other place where</text:span> string formatting <text:span text:style-name="T10">is </text:span>being used in place of parameterised queries <text:span text:style-name="T11">is the</text:span> “<text:span text:style-name="T10">search_tasks</text:span>” <text:span text:style-name="T11">function.</text:span></text:p>
      <text:p text:style-name="P19"/>
      <text:p text:style-name="P20"><text:soft-page-break/></text:p>
      <text:p text:style-name="P21">To patch this, all <text:span text:style-name="T12">queries should move away from string formatting, instead opting for parameterised </text:span><text:span text:style-name="T13">queries</text:span><text:span text:style-name="T12">.</text:span></text:p>
      <text:p text:style-name="P21"/>
      <text:p text:style-name="P20">To prevent this type of inconsistenc<text:span text:style-name="T14">y</text:span> in the future, <text:span text:style-name="T15">an SQL injection </text:span><text:span text:style-name="T16">scanner</text:span><text:span text:style-name="T15"> could be </text:span><text:span text:style-name="T17">implemented</text:span><text:span text:style-name="T15">. </text:span><text:span text:style-name="T18">By iterating over each POST endpoint </text:span><text:span text:style-name="T19">and attempting </text:span><text:span text:style-name="T20">controlled injection payloads</text:span><text:span text:style-name="T19">, </text:span><text:span text:style-name="T21">such inconsistencies could be caught early and before deployment. </text:span><text:span text:style-name="T22">This </text:span><text:span text:style-name="T23">is vital b</text:span><text:span text:style-name="T24">ecause relying on string formatting carries the risk of </text:span><text:span text:style-name="T25">irreversible</text:span><text:span text:style-name="T24"> </text:span><text:span text:style-name="T26">and complete</text:span><text:span text:style-name="T24"> data </text:span><text:span text:style-name="T27">loss</text:span><text:span text:style-name="T24">.</text:span></text:p>
      <text:p text:style-name="P20"/>
      <text:p text:style-name="P22">Additionally, to secure the database against the risk of data loss, backups should be ma<text:span text:style-name="T28">d</text:span>e periodically, <text:span text:style-name="T29">and a roll-back tool should be incorporated to </text:span><text:span text:style-name="T30">allow for remote restoration of data.</text:span></text:p>
      <text:p text:style-name="P22"/>
      <text:p text:style-name="P23"/>
      <text:p text:style-name="P24"><text:span text:style-name="T31">C</text:span><text:span text:style-name="T5">.</text:span> <text:span text:style-name="T32">Input Validation Inconsistencies</text:span></text:p>
      <text:p text:style-name="P25"><text:span text:style-name="T33">Input validation inconsistencies were also found. </text:span><text:span text:style-name="T34">The “create_task”</text:span> <text:span text:style-name="T35">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5">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6">i</text:span><text:span text:style-name="T37">ntegrated</text:span><text:span text:style-name="T36">.</text:span></text:p>
      <text:p text:style-name="P32"/>
      <text:p text:style-name="P32"><text:span text:style-name="T38">D</text:span><text:span text:style-name="T5">.</text:span> <text:span text:style-name="T39">Error-Handling</text:span><text:span text:style-name="T7"> Inconsistencies</text:span></text:p>
      <text:p text:style-name="P32"/>
      <text:p text:style-name="P33"><text:span text:style-name="T40">E</text:span>rror-handling inconsistencies <text:span text:style-name="T40">were found </text:span><text:span text:style-name="T41">as well. </text:span><text:span text:style-name="T42">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3">while </text:span><text:span text:style-name="T44">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text:soft-page-break/></text:p>
      <text:p text:style-name="P36">(Existence of record is never verified before deletion attempt – <text:span text:style-name="T45">This fails silently</text:span>).</text:p>
      <text:p text:style-name="P36"/>
      <text:p text:style-name="P37"><text:span text:style-name="T46">This quality issue could be prevented by </text:span><text:span text:style-name="T47">including error handling in each CRUD (Create, Read, Update, Delete) operation. Unit tests should be written to </text:span><text:span text:style-name="T48">test for known failure points. </text:span><text:span text:style-name="T49">Execution of said unit tests could be automated in the CI/CD pipeline </text:span><text:span text:style-name="T50">to catch </text:span><text:span text:style-name="T51">such inconsistencies</text:span><text:span text:style-name="T50"> before </text:span><text:span text:style-name="T52">deployment.</text:span><text:line-break/></text:p>
      <text:p text:style-name="P38"><text:span text:style-name="T53">E</text:span><text:span text:style-name="T5">.</text:span> <text:span text:style-name="T53">Authentication</text:span><text:span text:style-name="T7">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4">If it matches, authentication is successful, if not, an appropriate error is returned along redirecting the user to the login portal.</text:span></text:p>
      <text:p text:style-name="P42"/>
      <text:p text:style-name="P42"><text:span text:style-name="T55">Integration could be tested automatically with an enumeration script </text:span><text:span text:style-name="T56">that navigates to each endpoint without appropriate permissions.</text:span></text:p>
      <text:p text:style-name="P35"/>
      <text:p text:style-name="P35"/>
      <text:p text:style-name="P44"><text:span text:style-name="T57">F</text:span><text:span text:style-name="T5">.</text:span> <text:span text:style-name="T58">No Database Error Handling</text:span></text:p>
      <text:p text:style-name="P35"/>
      <text:p text:style-name="P45">A<text:span text:style-name="T59">cross the entire file, not one database call includes error handling. If an error was to occur in a “db.execute” call, </text:span><text:span text:style-name="T60">the application would fail, </text:span><text:span text:style-name="T61">and data could be lost</text:span><text:span text:style-name="T60">.</text:span></text:p>
      <text:p text:style-name="P35"/>
      <text:p text:style-name="P46">To patch this, try-except blocks should be implemented in each database call block, <text:span text:style-name="T62">and appropriate HTTP error responses should be returned. </text:span><text:span text:style-name="T63">Additionally, </text:span><text:span text:style-name="T64">form input validation should be incorporated to prevent the user from being able to submit obviously wrong data.</text:span></text:p>
      <text:p text:style-name="P47"/>
      <text:p text:style-name="P47"/>
      <text:p text:style-name="P48"><text:span text:style-name="T65">G</text:span><text:span text:style-name="T5">.</text:span> <text:span text:style-name="T66">Deliverable </text:span><text:span text:style-name="T67">Management </text:span><text:span text:style-name="T66">Impact</text:span></text:p>
      <text:p text:style-name="P49"/>
      <text:p text:style-name="P49"/>
      <text:p text:style-name="P50">I identified two specific instances in the codebase where better deliverable management would have directly improved quality.</text:p>
      <text:p text:style-name="P5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7:23:04.287703271</dc:date>
    <meta:editing-duration>PT3H55M35S</meta:editing-duration>
    <meta:editing-cycles>180</meta:editing-cycles>
    <meta:document-statistic meta:table-count="0" meta:image-count="6" meta:object-count="0" meta:page-count="3" meta:paragraph-count="36" meta:word-count="612" meta:character-count="4245" meta:non-whitespace-character-count="3663"/>
  </office:meta>
</office:document-meta>
</file>