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8000000B814111214.png" manifest:media-type="image/png"/>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text-align="start" style:justify-single-word="false"/>
      <style:text-properties fo:font-size="12pt" fo:font-style="normal" style:text-underline-style="none" fo:font-weight="normal" officeooo:rsid="01e8955a" officeooo:paragraph-rsid="01e8955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start" style:justify-single-word="false"/>
      <style:text-properties fo:font-size="12pt" fo:font-style="normal" style:text-underline-style="none" fo:font-weight="normal" officeooo:rsid="01eb2eea" officeooo:paragraph-rsid="01eb2eea"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officeooo:paragraph-rsid="01fa0d7d"/>
    </style:style>
    <style:style style:name="P103" style:family="paragraph" style:parent-style-name="Standard">
      <style:paragraph-properties fo:text-align="start" style:justify-single-word="false"/>
      <style:text-properties fo:font-size="13pt" fo:font-weight="bold" officeooo:rsid="0031f879" officeooo:paragraph-rsid="01fc6890" style:font-size-asian="11.3500003814697pt" style:font-weight-asian="bold" style:font-size-complex="13pt" style:font-weight-complex="bold"/>
    </style:style>
    <style:style style:name="P104" style:family="paragraph" style:parent-style-name="Standard">
      <style:paragraph-properties fo:text-align="start" style:justify-single-word="false"/>
      <style:text-properties fo:font-size="12pt" fo:font-style="normal" style:text-underline-style="none" fo:font-weight="normal" officeooo:rsid="0201419b" officeooo:paragraph-rsid="0201419b"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T162" style:family="text">
      <style:text-properties fo:font-size="12pt" fo:font-style="normal" style:text-underline-style="none" fo:font-weight="normal" officeooo:rsid="01f4b4e6" style:font-size-asian="12pt" style:font-style-asian="normal" style:font-weight-asian="normal" style:font-size-complex="12pt" style:font-style-complex="normal" style:font-weight-complex="normal"/>
    </style:style>
    <style:style style:name="T163" style:family="text">
      <style:text-properties fo:font-size="12pt" fo:font-style="normal" style:text-underline-style="none" fo:font-weight="normal" officeooo:rsid="01f6aae2" style:font-size-asian="12pt" style:font-style-asian="normal" style:font-weight-asian="normal" style:font-size-complex="12pt" style:font-style-complex="normal" style:font-weight-complex="normal"/>
    </style:style>
    <style:style style:name="T164" style:family="text">
      <style:text-properties fo:font-size="12pt" fo:font-style="normal" style:text-underline-style="none" fo:font-weight="normal" officeooo:rsid="01fa0d7d" style:font-size-asian="12pt" style:font-style-asian="normal" style:font-weight-asian="normal" style:font-size-complex="12pt" style:font-style-complex="normal" style:font-weight-complex="normal"/>
    </style:style>
    <style:style style:name="T165" style:family="text">
      <style:text-properties officeooo:rsid="01fcaa2d"/>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C0116: 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item>
          <text:p text:style-name="P95">C0209: Formatting a regular string which could be an f-string (consider-using-f-string)</text:p>
          <text:list>
            <text:list-item>
              <text:p text:style-name="P96">This means that the specified line of code uses the old string formatting syntax; “ ‘Hello {}’.format(name) instead of f’Hello {name}’ ”.</text:p>
            </text:list-item>
          </text:list>
        </text:list-item>
      </text:list>
      <text:p text:style-name="P97"/>
      <text:p text:style-name="P98"/>
      <text:p text:style-name="P92">Potential Bugs</text:p>
      <text:list text:style-name="L2">
        <text:list-item>
          <text:p text:style-name="P99">F401 'flask.render_template_string' imported but unused</text:p>
        </text:list-item>
        <text:list-item>
          <text:p text:style-name="P99">W0613: Unused argument 'exception' (unused-argument)</text:p>
          <text:list>
            <text:list-item>
              <text:p text:style-name="P100">This means that a function takes an argument (named “exception”) but never uses it.</text:p>
            </text:list-item>
          </text:list>
        </text:list-item>
      </text:list>
      <text:p text:style-name="P101"/>
      <text:p text:style-name="P98"/>
      <text:p text:style-name="P91"><text:soft-page-break/></text:p>
      <text:p text:style-name="P102"><text:span text:style-name="T162">All of these would’ve gone uncaught if relying on unit testing or integration testing alone. </text:span><text:span text:style-name="T163">This showcases the utility of non-execution verificatio</text:span><text:span text:style-name="T164">n. It is used for identifying issues in the code’s structure, style, and potential logic problems without requiring the program to be executed, allowing developers to catch maintainability issues, dead code, and hidden bugs early in the development process before runtime testing is performed.</text:span></text:p>
      <text:p text:style-name="P102"/>
      <text:p text:style-name="P102"/>
      <text:p text:style-name="P102"><draw:frame draw:style-name="fr6" draw:name="Image20" text:anchor-type="char" svg:width="17cm" svg:height="2.397cm" draw:z-index="19"><draw:image xlink:href="Pictures/1000000100000518000000B814111214.png" xlink:type="simple" xlink:show="embed" xlink:actuate="onLoad" draw:mime-type="image/png"/></draw:frame></text:p>
      <text:p text:style-name="P90"/>
      <text:p text:style-name="P103"><text:span text:style-name="T165">D</text:span><text:span text:style-name="T6">.</text:span> <text:span text:style-name="T165">Test Coverage</text:span></text:p>
      <text:p text:style-name="P103"/>
      <text:p text:style-name="P90"/>
      <text:p text:style-name="P104">The tests cover 72% of the code. </text:p>
      <text:p text:style-name="P90"/>
      <text:p text:style-name="P90"/>
      <text:p text:style-name="P9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1:46:01.401282184</dc:date>
    <meta:editing-duration>PT8H16M41S</meta:editing-duration>
    <meta:editing-cycles>407</meta:editing-cycles>
    <meta:document-statistic meta:table-count="0" meta:image-count="20" meta:object-count="0" meta:page-count="10" meta:paragraph-count="75" meta:word-count="1567" meta:character-count="10439" meta:non-whitespace-character-count="8939"/>
  </office:meta>
</office:document-meta>
</file>