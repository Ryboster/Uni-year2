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b96a99"/>
    </style:style>
    <style:style style:name="T145" style:family="text">
      <style:text-properties officeooo:rsid="01b9b7dc"/>
    </style:style>
    <style:style style:name="T146" style:family="text">
      <style:text-properties officeooo:rsid="01bb636c"/>
    </style:style>
    <style:style style:name="T147"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4"><text:span text:style-name="T143">B</text:span><text:span text:style-name="T6">.</text:span> <text:span text:style-name="T106">Unit Testing</text:span></text:p>
      <text:p text:style-name="P82"/>
      <text:p text:style-name="P82"/>
      <text:p text:style-name="P85"/>
      <text:p text:style-name="P82"><draw:frame draw:style-name="fr8" draw:name="Image16" text:anchor-type="char" svg:width="15.187cm" svg:height="8.705cm" draw:z-index="15"><draw:image xlink:href="Pictures/100000010000023E0000014916B8939E.png" xlink:type="simple" xlink:show="embed" xlink:actuate="onLoad" draw:mime-type="image/png"/></draw:frame><text:soft-page-break/></text:p>
      <text:p text:style-name="P82"/>
      <text:p text:style-name="P82"/>
      <text:p text:style-name="P82"/>
      <text:p text:style-name="P82"/>
      <text:p text:style-name="P82"/>
      <text:p text:style-name="P82"><draw:frame draw:style-name="fr6" draw:name="Image17" text:anchor-type="char" svg:width="17cm" svg:height="11.8cm" draw:z-index="16"><draw:image xlink:href="Pictures/10000001000002BF000001E8AEEAFC08.png" xlink:type="simple" xlink:show="embed" xlink:actuate="onLoad" draw:mime-type="image/png"/></draw:frame></text:p>
      <text:p text:style-name="P82"/>
      <text:p text:style-name="P82"/>
      <text:p text:style-name="P86"><text:soft-page-break/>The unit test for creating tasks only ensures that the unit responsible for <text:span text:style-name="T144">creating</text:span> task<text:span text:style-name="T144">s</text:span> functions correctly, i.e. returns a 201 status code. <text:span text:style-name="T145">It doesn’t actually test whether the task is being created – that’s outside of its responsibility. </text:span><text:span text:style-name="T146">Due to that, I created an integration test to </text:span><text:span text:style-name="T147">verify that.</text:span></text:p>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1:58.849786487</dc:date>
    <meta:editing-duration>PT7H23M5S</meta:editing-duration>
    <meta:editing-cycles>353</meta:editing-cycles>
    <meta:document-statistic meta:table-count="0" meta:image-count="17" meta:object-count="0" meta:page-count="9" meta:paragraph-count="59" meta:word-count="1299" meta:character-count="8654" meta:non-whitespace-character-count="7400"/>
  </office:meta>
</office:document-meta>
</file>