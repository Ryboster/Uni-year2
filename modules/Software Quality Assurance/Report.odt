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cb2f1"/>
    </style:style>
    <style:style style:name="T4" style:family="text">
      <style:text-properties officeooo:rsid="001e727c"/>
    </style:style>
    <style:style style:name="T5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. <text:span text:style-name="T2">The “login” function uses string formatting in its query:</text:span></text:p>
      <text:p text:style-name="P6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7">, which is insecure, while the “get_task” function uses <text:span text:style-name="T3">context-</text:span>appropriate parameterised queries:</text:p>
      <text:p text:style-name="P7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6"/>
      <text:p text:style-name="P6"/>
      <text:p text:style-name="P8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. <text:span text:style-name="T4">This suggests </text:span></text:p>
      <text:p text:style-name="P10"/>
      <text:p text:style-name="P10"/>
      <text:p text:style-name="P11"/>
      <text:p text:style-name="P11"/>
      <text:p text:style-name="P11">1.1(b) <text:span text:style-name="T5">Comments suggesting incomplete workflow</text:span></text:p>
      <text:p text:style-name="P11"/>
      <text:p text:style-name="P11">1.1(c)</text:p>
      <text:p text:style-name="P11">1.1(d)</text:p>
      <text:p text:style-name="P11">1.1(e)</text:p>
      <text:p text:style-name="P11"><text:soft-page-break/></text:p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37:38.311581386</dc:date>
    <meta:editing-duration>PT2H11M33S</meta:editing-duration>
    <meta:editing-cycles>22</meta:editing-cycles>
    <meta:document-statistic meta:table-count="0" meta:image-count="2" meta:object-count="0" meta:page-count="2" meta:paragraph-count="14" meta:word-count="96" meta:character-count="771" meta:non-whitespace-character-count="685"/>
  </office:meta>
</office:document-meta>
</file>