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97" style:family="paragraph" style:parent-style-name="Standard" style:list-style-name="L3">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
        </text:list-item>
      </text:list>
      <text:p text:style-name="P94"/>
      <text:p text:style-name="P92">Potential Bugs</text:p>
      <text:list text:style-name="L2">
        <text:list-item>
          <text:p text:style-name="P95">flask.render_template_string imported but unused</text:p>
          <text:list>
            <text:list-item>
              <text:p text:style-name="P95">This shows up in both pylint and flake8. It </text:p>
            </text:list-item>
          </text:list>
        </text:list-item>
      </text:list>
      <text:p text:style-name="P96"/>
      <text:p text:style-name="P92">Complexity Warnings</text:p>
      <text:list text:style-name="L3">
        <text:list-item>
          <text:p text:style-name="P97"/>
        </text:list-item>
      </text:list>
      <text:p text:style-name="P91"/>
      <text:p text:style-name="P91"/>
      <text:p text:style-name="P91"/>
      <text:p text:style-name="P90"/>
      <text:p text:style-name="P90"/>
      <text:p text:style-name="P90"/>
      <text:p text:style-name="P90"/>
      <text:p text:style-name="P90"/>
      <text:p text:style-name="P90"/>
      <text:p text:style-name="P90"><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1:27:42.490345450</dc:date>
    <meta:editing-duration>PT7H58M35S</meta:editing-duration>
    <meta:editing-cycles>378</meta:editing-cycles>
    <meta:document-statistic meta:table-count="0" meta:image-count="19" meta:object-count="0" meta:page-count="10" meta:paragraph-count="68" meta:word-count="1395" meta:character-count="9300" meta:non-whitespace-character-count="7960"/>
  </office:meta>
</office:document-meta>
</file>