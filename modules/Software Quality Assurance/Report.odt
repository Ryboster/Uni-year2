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c32546"/>
    </style:style>
    <style:style style:name="T145" style:family="text">
      <style:text-properties officeooo:rsid="01c55cb8"/>
    </style:style>
    <style:style style:name="T146" style:family="text">
      <style:text-properties officeooo:rsid="01c83915"/>
    </style:style>
    <style:style style:name="T147" style:family="text">
      <style:text-properties officeooo:rsid="01ca468c"/>
    </style:style>
    <style:style style:name="T148" style:family="text">
      <style:text-properties officeooo:rsid="01c8e819"/>
    </style:style>
    <style:style style:name="T149" style:family="text">
      <style:text-properties officeooo:rsid="01c96731"/>
    </style:style>
    <style:style style:name="T150" style:family="text">
      <style:text-properties fo:font-style="italic" officeooo:rsid="01c96731" style:font-style-asian="italic" style:font-style-complex="italic"/>
    </style:style>
    <style:style style:name="T151" style:family="text">
      <style:text-properties officeooo:rsid="01ca246d"/>
    </style:style>
    <style:style style:name="T152" style:family="text">
      <style:text-properties officeooo:rsid="01cdda7f"/>
    </style:style>
    <style:style style:name="T153" style:family="text">
      <style:text-properties officeooo:rsid="01cf5f83"/>
    </style:style>
    <style:style style:name="T154" style:family="text">
      <style:text-properties officeooo:rsid="01d0a08b"/>
    </style:style>
    <style:style style:name="T155" style:family="text">
      <style:text-properties officeooo:rsid="01d214b4"/>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06">Unit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4">s written earlier don’t actually verify the results of their operations. Unit tests in principle only test that a given unit responsible for a given piece of functionality functions as expected, e.g. that the function “create_task” responds with the </text:span><text:span text:style-name="T145">status code 201 when given correct payload.</text:span></text:p>
      <text:p text:style-name="P88"/>
      <text:p text:style-name="P88">To address this blind spot, integration tests are used instead. <text:span text:style-name="T146">By using an integration test, we can test </text:span><text:span text:style-name="T147">integrations between </text:span><text:span text:style-name="T146">multiple units in to </text:span><text:span text:style-name="T148">verify </text:span><text:span text:style-name="T149">a given </text:span><text:span text:style-name="T150">behaviour </text:span><text:span text:style-name="T149">is true, </text:span><text:span text:style-name="T151">e.g. that “</text:span><text:span text:style-name="T147">create_task” actually </text:span><text:span text:style-name="T152">inserts the new record into the database, </text:span><text:span text:style-name="T153">and that “get_tasks” actually detects that </text:span><text:span text:style-name="T154">change</text:span><text:span text:style-name="T153">.</text:span></text:p>
      <text:p text:style-name="P82"/>
      <text:p text:style-name="P82"/>
      <text:p text:style-name="P82"/>
      <text:p text:style-name="P82"/>
      <text:p text:style-name="P82"/>
      <text:p text:style-name="P89"><text:soft-page-break/><text:span text:style-name="T155">C</text:span><text:span text:style-name="T6">.</text:span> <text:span text:style-name="T106">Unit Test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58:14.915997049</dc:date>
    <meta:editing-duration>PT7H29M13S</meta:editing-duration>
    <meta:editing-cycles>368</meta:editing-cycles>
    <meta:document-statistic meta:table-count="0" meta:image-count="17" meta:object-count="0" meta:page-count="9" meta:paragraph-count="60" meta:word-count="1348" meta:character-count="8971" meta:non-whitespace-character-count="7670"/>
  </office:meta>
</office:document-meta>
</file>