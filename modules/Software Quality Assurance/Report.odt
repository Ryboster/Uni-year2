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1865869BC9.png" manifest:media-type="image/png"/>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text:soft-page-break/></text:p>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draw:frame draw:style-name="fr5" draw:name="Image9" text:anchor-type="char" svg:width="17cm" svg:height="6.77cm" draw:z-index="8"><draw:image xlink:href="Pictures/10000001000002BF0000011865869BC9.png" xlink:type="simple" xlink:show="embed" xlink:actuate="onLoad" draw:mime-type="image/png"/></draw:frame></text:p>
      <text:p text:style-name="P74">Second, the “tasks” endpoint was tested in context of creating new task<text:span text:style-name="T119">s</text:span> (POST as opposed to GET). </text:p>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7:20.441740013</dc:date>
    <meta:editing-duration>PT6H28M57S</meta:editing-duration>
    <meta:editing-cycles>295</meta:editing-cycles>
    <meta:document-statistic meta:table-count="0" meta:image-count="9" meta:object-count="0" meta:page-count="5" meta:paragraph-count="49" meta:word-count="1020" meta:character-count="6889" meta:non-whitespace-character-count="5905"/>
  </office:meta>
</office:document-meta>
</file>