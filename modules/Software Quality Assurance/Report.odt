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01ff5"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1542813" officeooo:paragraph-rsid="0154281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8"/>
      <text:p text:style-name="P68"/>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68"/>
      <text:p text:style-name="P71"/>
      <text:p text:style-name="P72"><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3"/>
      <text:p text:style-name="P73"><draw:frame draw:style-name="fr6" draw:name="Image9" text:anchor-type="char" svg:width="17cm" svg:height="6.449cm" draw:z-index="8"><draw:image xlink:href="Pictures/10000001000002C50000010D638F523D.png" xlink:type="simple" xlink:show="embed" xlink:actuate="onLoad" draw:mime-type="image/png"/></draw:frame></text:p>
      <text:p text:style-name="P73"/>
      <text:p text:style-name="P73"/>
      <text:p text:style-name="P73"/>
      <text:p text:style-name="P74">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5"/>
      <text:p text:style-name="P75"/>
      <text:p text:style-name="P75"/>
      <text:p text:style-name="P75"><draw:frame draw:style-name="fr4" draw:name="Image10" text:anchor-type="char" svg:width="13.547cm" svg:height="7.303cm" draw:z-index="9"><draw:image xlink:href="Pictures/100000010000020000000114D5F44112.png" xlink:type="simple" xlink:show="embed" xlink:actuate="onLoad" draw:mime-type="image/png"/></draw:frame></text:p>
      <text:p text:style-name="P75"/>
      <text:p text:style-name="P75"/>
      <text:p text:style-name="P75"/>
      <text:p text:style-name="P75"/>
      <text:p text:style-name="P75"/>
      <text:p text:style-name="P75"/>
      <text:p text:style-name="P75"/>
      <text:p text:style-name="P75"><text:soft-page-break/></text:p>
      <text:p text:style-name="P75"/>
      <text:p text:style-name="P76">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5"/>
      <text:p text:style-name="P75"><draw:frame draw:style-name="fr3" draw:name="Image12" text:anchor-type="char" svg:width="13.203cm" svg:height="5.424cm" draw:z-index="10"><draw:image xlink:href="Pictures/10000001000001F3000000CD67D27DDF.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7">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5"/>
      <text:p text:style-name="P75"><draw:frame draw:style-name="fr6" draw:name="Image11" text:anchor-type="char" svg:width="17cm" svg:height="5.886cm" draw:z-index="11"><draw:image xlink:href="Pictures/100000010000035100000126A317F146.png" xlink:type="simple" xlink:show="embed" xlink:actuate="onLoad" draw:mime-type="image/png"/></draw:frame></text:p>
      <text:p text:style-name="P75"/>
      <text:p text:style-name="P78">Lastly, the “<text:span text:style-name="T121">/</text:span><text:span text:style-name="T122">api</text:span><text:span text:style-name="T121">/</text:span>task<text:span text:style-name="T133">s</text:span>/&lt;id&gt;”:</text:p>
      <text:p text:style-name="P78"/>
      <text:p text:style-name="P75"/>
      <text:p text:style-name="P79">Similarly to creating tasks, retrieving of tasks is of equal importance. </text:p>
      <text:p text:style-name="P75"/>
      <text:p text:style-name="P75"/>
      <text:p text:style-name="P75"><draw:frame draw:style-name="fr3" draw:name="Image13" text:anchor-type="char" svg:width="11.906cm" svg:height="5.609cm" draw:z-index="14"><draw:image xlink:href="Pictures/10000001000001C2000000D444FA64E0.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p text:style-name="P75"><draw:frame draw:style-name="fr3" draw:name="Image14" text:anchor-type="char" svg:width="12.965cm" svg:height="5.609cm" draw:z-index="12"><draw:image xlink:href="Pictures/10000001000001EA000000D4A8118BA5.png" xlink:type="simple" xlink:show="embed" xlink:actuate="onLoad" draw:mime-type="image/png"/></draw:frame></text:p>
      <text:p text:style-name="P75"/>
      <text:p text:style-name="P75"/>
      <text:p text:style-name="P75"/>
      <text:p text:style-name="P75"/>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frame draw:style-name="fr7" draw:name="Image15" text:anchor-type="char" svg:width="17cm" svg:height="8.925cm" draw:z-index="13"><draw:image xlink:href="Pictures/10000001000002A6000001648100D259.png" xlink:type="simple" xlink:show="embed" xlink:actuate="onLoad" draw:mime-type="image/png"/></draw:frame></text:p>
      <text:p text:style-name="P80"/>
      <text:p text:style-name="P80"/>
      <text:p text:style-name="P80"/>
      <text:p text:style-name="P80"/>
      <text:p text:style-name="P80"/>
      <text:p text:style-name="P80"/>
      <text:p text:style-name="P80"/>
      <text:p text:style-name="P80"><text:soft-page-break/>hjkjghjg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18:59.163579945</dc:date>
    <meta:editing-duration>PT6H50M19S</meta:editing-duration>
    <meta:editing-cycles>327</meta:editing-cycles>
    <meta:document-statistic meta:table-count="0" meta:image-count="15" meta:object-count="0" meta:page-count="8" meta:paragraph-count="54" meta:word-count="1148" meta:character-count="7750" meta:non-whitespace-character-count="6642"/>
  </office:meta>
</office:document-meta>
</file>