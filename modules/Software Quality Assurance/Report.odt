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be2c4d"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c6f0d0" officeooo:paragraph-rsid="00c6f0d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paragraph-rsid="00c8eaa6"/>
    </style:style>
    <style:style style:name="P49" style:family="paragraph" style:parent-style-name="Standard">
      <style:paragraph-properties fo:text-align="start" style:justify-single-word="false"/>
      <style:text-properties fo:font-size="12pt" fo:font-weight="normal" officeooo:rsid="00c8eaa6" officeooo:paragraph-rsid="00c8eaa6"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bf5fe1"/>
    </style:style>
    <style:style style:name="T63" style:family="text">
      <style:text-properties officeooo:rsid="00bf8e8c"/>
    </style:style>
    <style:style style:name="T64" style:family="text">
      <style:text-properties officeooo:rsid="00c6f0d0"/>
    </style:style>
    <style:style style:name="T65" style:family="text">
      <style:text-properties officeooo:rsid="00c6f0d0" style:font-size-asian="12pt" style:font-weight-asian="normal" style:font-size-complex="12pt" style:font-weight-complex="normal"/>
    </style:style>
    <style:style style:name="T66" style:family="text">
      <style:text-properties officeooo:rsid="00c8eaa6" style:font-size-asian="12pt" style:font-weight-asian="normal" style:font-size-complex="12pt" style:font-weight-complex="normal"/>
    </style:style>
    <style:style style:name="T67" style:family="text">
      <style:text-properties officeooo:rsid="00cad8c6" style:font-size-asian="12pt" style:font-weight-asian="normal" style:font-size-complex="12pt" style:font-weight-complex="normal"/>
    </style:style>
    <style:style style:name="T68" style:family="text">
      <style:text-properties officeooo:rsid="00cb163e" style:font-size-asian="12pt" style:font-weight-asian="normal" style:font-size-complex="12pt" style:font-weight-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dditionally, transactions and roll-backs should be implemented in each database query to prevent </text:span><text:span text:style-name="T63">data loss in case of errors; </text:span><text:span text:style-name="T64">e.g.</text:span></text:p>
      <text:p text:style-name="P46"/>
      <text:p text:style-name="P47">the query </text:p>
      <text:p text:style-name="P47"/>
      <text:p text:style-name="P47"/>
      <text:p text:style-name="P48"><text:span text:style-name="T65">“ </text:span><text:span text:style-name="T66">INSERT INTO tasks(title, description, priority, assigned_to, created_by) </text:span><text:span text:style-name="T65">“ </text:span><text:span text:style-name="T67">from “</text:span><text:span text:style-name="T68">create_task” function </text:span><text:span text:style-name="T66">would become:</text:span></text:p>
      <text:p text:style-name="P49">“</text:p>
      <text:p text:style-name="P49"/>
      <text:p text:style-name="P4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15:19.719805873</dc:date>
    <meta:editing-duration>PT3H47M59S</meta:editing-duration>
    <meta:editing-cycles>162</meta:editing-cycles>
    <meta:document-statistic meta:table-count="0" meta:image-count="6" meta:object-count="0" meta:page-count="3" meta:paragraph-count="38" meta:word-count="602" meta:character-count="4166" meta:non-whitespace-character-count="3595"/>
  </office:meta>
</office:document-meta>
</file>