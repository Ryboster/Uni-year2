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3a30b3" officeooo:paragraph-rsid="023cbb6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239b13a" officeooo:paragraph-rsid="0239b13a"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243c099" officeooo:paragraph-rsid="0243c099"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3cbb63"/>
    </style:style>
    <style:style style:name="T187" style:family="text">
      <style:text-properties officeooo:rsid="023f273e"/>
    </style:style>
    <style:style style:name="T188" style:family="text">
      <style:text-properties officeooo:rsid="024041d5"/>
    </style:style>
    <style:style style:name="T189" style:family="text">
      <style:text-properties officeooo:rsid="02408ad5"/>
    </style:style>
    <style:style style:name="T190" style:family="text">
      <style:text-properties officeooo:rsid="024289ff"/>
    </style:style>
    <style:style style:name="T191" style:family="text">
      <style:text-properties officeooo:rsid="0242c78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p>
      <text:p text:style-name="P114"/>
      <text:p text:style-name="P114"><text:soft-page-break/><text:span text:style-name="T186">By devising a test before developing the feature, </text:span><text:span text:style-name="T187">complete with all </text:span><text:span text:style-name="T188">assumed failure </text:span><text:span text:style-name="T189">cases, </text:span><text:span text:style-name="T190">the function could’ve been written to account for </text:span><text:span text:style-name="T191">those cases. </text:span><text:s/></text:p>
      <text:p text:style-name="P115"/>
      <text:p text:style-name="P115"/>
      <text:p text:style-name="P115"/>
      <text:p text:style-name="P116">1. Devise tests</text:p>
      <text:p text:style-name="P116">2. Think of all failures</text:p>
      <text:p text:style-name="P116">3. Write the tests</text:p>
      <text:p text:style-name="P116">4. Write the function</text:p>
      <text:p text:style-name="P112"/>
      <text:p text:style-name="P112"/>
      <text:p text:style-name="P112"/>
      <text:p text:style-name="P112"/>
      <text:p text:style-name="P112"/>
      <text:p text:style-name="P112"><text:span text:style-name="T182">coverage</text:span></text:p>
      <text:p text:style-name="P112"/>
      <text:p text:style-name="P112"><text:span text:style-name="T182">cover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16:30.508516882</dc:date>
    <meta:editing-duration>PT8H46M47S</meta:editing-duration>
    <meta:editing-cycles>454</meta:editing-cycles>
    <meta:document-statistic meta:table-count="0" meta:image-count="21" meta:object-count="0" meta:page-count="11" meta:paragraph-count="89" meta:word-count="1829" meta:character-count="12144" meta:non-whitespace-character-count="10388"/>
  </office:meta>
</office:document-meta>
</file>