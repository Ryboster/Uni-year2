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T15" style:family="text">
      <style:text-properties officeooo:rsid="0040684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5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7">, <text:span text:style-name="T14">while </text:span><text:span text:style-name="T15">other functions like “delete_task” or “” do not: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3:22.060462282</dc:date>
    <meta:editing-duration>PT2H37M3S</meta:editing-duration>
    <meta:editing-cycles>47</meta:editing-cycles>
    <meta:document-statistic meta:table-count="0" meta:image-count="5" meta:object-count="0" meta:page-count="2" meta:paragraph-count="17" meta:word-count="165" meta:character-count="1241" meta:non-whitespace-character-count="1091"/>
  </office:meta>
</office:document-meta>
</file>