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10000012A07424260.png" manifest:media-type="image/png"/>
  <manifest:file-entry manifest:full-path="Pictures/10000001000001F3000000CD67D27DDF.png" manifest:media-type="image/png"/>
  <manifest:file-entry manifest:full-path="Pictures/100000010000020000000114D5F44112.png" manifest:media-type="image/png"/>
  <manifest:file-entry manifest:full-path="Pictures/10000001000002C50000010D638F523D.png" manifest:media-type="image/png"/>
  <manifest:file-entry manifest:full-path="Pictures/100000010000020A00000096462F6CF5.png" manifest:media-type="image/png"/>
  <manifest:file-entry manifest:full-path="Pictures/100000010000020800000030DA0392BE.png" manifest:media-type="image/png"/>
  <manifest:file-entry manifest:full-path="Pictures/100000010000026A000000ED2D43131D.png" manifest:media-type="image/png"/>
  <manifest:file-entry manifest:full-path="Pictures/100000010000027A000001066ECD5BB4.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40759c"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4fd8f0"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01ff5"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style="normal" style:text-underline-style="none" fo:font-weight="normal" officeooo:rsid="01542813" officeooo:paragraph-rsid="01542813"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62ae01" officeooo:paragraph-rsid="0162ae01"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414e6c" style:font-style-asian="normal" style:font-style-complex="normal"/>
    </style:style>
    <style:style style:name="T111" style:family="text">
      <style:text-properties fo:font-style="normal" style:text-underline-style="none" officeooo:rsid="0145f3a0" style:font-style-asian="normal" style:font-style-complex="normal"/>
    </style:style>
    <style:style style:name="T112" style:family="text">
      <style:text-properties fo:font-style="normal" style:text-underline-style="none" officeooo:rsid="0146d432" style:font-style-asian="normal" style:font-style-complex="normal"/>
    </style:style>
    <style:style style:name="T113" style:family="text">
      <style:text-properties fo:font-style="normal" style:text-underline-style="none" officeooo:rsid="01501ff5" style:font-style-asian="normal" style:font-style-complex="normal"/>
    </style:style>
    <style:style style:name="T114" style:family="text">
      <style:text-properties fo:font-style="normal" style:text-underline-style="none" officeooo:rsid="01589549" style:font-style-asian="normal" style:font-style-complex="normal"/>
    </style:style>
    <style:style style:name="T115" style:family="text">
      <style:text-properties fo:font-style="normal" style:text-underline-style="none" officeooo:rsid="0158a72a" style:font-style-asian="normal" style:font-style-complex="normal"/>
    </style:style>
    <style:style style:name="T116" style:family="text">
      <style:text-properties fo:font-style="normal" style:text-underline-style="none" officeooo:rsid="0158aafe" style:font-style-asian="normal" style:font-style-complex="normal"/>
    </style:style>
    <style:style style:name="T117" style:family="text">
      <style:text-properties fo:font-style="normal" style:text-underline-style="none" officeooo:rsid="015d8a4d" style:font-style-asian="normal" style:font-style-complex="normal"/>
    </style:style>
    <style:style style:name="T118" style:family="text">
      <style:text-properties fo:font-style="normal" style:text-underline-style="none" officeooo:rsid="015e327b" style:font-style-asian="normal" style:font-style-complex="normal"/>
    </style:style>
    <style:style style:name="T119" style:family="text">
      <style:text-properties officeooo:rsid="0167737e"/>
    </style:style>
    <style:style style:name="T120" style:family="text">
      <style:text-properties officeooo:rsid="0175248a"/>
    </style:style>
    <style:style style:name="T121" style:family="text">
      <style:text-properties officeooo:rsid="0178b005"/>
    </style:style>
    <style:style style:name="T122" style:family="text">
      <style:text-properties officeooo:rsid="017b9889"/>
    </style:style>
    <style:style style:name="T123" style:family="text">
      <style:text-properties officeooo:rsid="017d36f0"/>
    </style:style>
    <style:style style:name="T124" style:family="text">
      <style:text-properties officeooo:rsid="018461e7"/>
    </style:style>
    <style:style style:name="T125" style:family="text">
      <style:text-properties officeooo:rsid="0186d500"/>
    </style:style>
    <style:style style:name="T126" style:family="text">
      <style:text-properties officeooo:rsid="0187ba35"/>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login”, “/tasks”, “/tasks/&lt;id&gt;”</text:span><text:span text:style-name="T108">. Following are the rationale behind the </text:span><text:span text:style-name="T110">tests.</text:span></text:p>
      <text:p text:style-name="P66"/>
      <text:p text:style-name="P67"><text:span text:style-name="T108">First, a test of the “/login” endpoint was conducted due to the fact that the </text:span><text:span text:style-name="T111">development team is currently integrating authentication. To ensure that the implemented function can safely be integrated, the “/login” endpoint must be evaluated and proven to work, </text:span><text:span text:style-name="T112">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8"/>
      <text:p text:style-name="P68"/>
      <text:p text:style-name="P69"><text:span text:style-name="T108">Next, a test was conducted to ensure that incorrect credentials are met with an appropriate error response. </text:span><text:span text:style-name="T113">This is important as this proves that “/l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68"/>
      <text:p text:style-name="P71"/>
      <text:p text:style-name="P72"><text:span text:style-name="T108">Lastly, a boundary test was conducted to </text:span><text:span text:style-name="T114">ensure that the input behaves predictably. </text:span><text:span text:style-name="T115">This test sends the correct data type, but </text:span><text:span text:style-name="T116">incorrect values. </text:span><text:span text:style-name="T117">This is important because incorrect values like these could cause </text:span><text:span text:style-name="T118">the server to crash if not handled correctly</text:span><text:span text:style-name="T117">. </text:span></text:p>
      <text:p text:style-name="P73"/>
      <text:p text:style-name="P73"><draw:frame draw:style-name="fr6" draw:name="Image9" text:anchor-type="char" svg:width="17cm" svg:height="6.449cm" draw:z-index="8"><draw:image xlink:href="Pictures/10000001000002C50000010D638F523D.png" xlink:type="simple" xlink:show="embed" xlink:actuate="onLoad" draw:mime-type="image/png"/></draw:frame></text:p>
      <text:p text:style-name="P73"/>
      <text:p text:style-name="P73"/>
      <text:p text:style-name="P73"/>
      <text:p text:style-name="P74">Second, the “/tasks” endpoint was tested in context of creating new task<text:span text:style-name="T119">s</text:span> (POST as opposed to GET). <text:span text:style-name="T120">This is the core functionality </text:span><text:span text:style-name="T121">of this application so it needs to </text:span><text:span text:style-name="T122">function properly. Correctly formatted payloads must respond with 201, while incorrectly formatted payloads need to fail safely. </text:span><text:span text:style-name="T123">If this feature were to not work, all other features (like task retrieval) will fail as well.</text:span></text:p>
      <text:p text:style-name="P75"/>
      <text:p text:style-name="P75"/>
      <text:p text:style-name="P75"/>
      <text:p text:style-name="P75"><draw:frame draw:style-name="fr4" draw:name="Image10" text:anchor-type="char" svg:width="13.547cm" svg:height="7.303cm" draw:z-index="9"><draw:image xlink:href="Pictures/100000010000020000000114D5F44112.png" xlink:type="simple" xlink:show="embed" xlink:actuate="onLoad" draw:mime-type="image/png"/></draw:frame></text:p>
      <text:p text:style-name="P75"/>
      <text:p text:style-name="P75"/>
      <text:p text:style-name="P75"/>
      <text:p text:style-name="P75"/>
      <text:p text:style-name="P75"/>
      <text:p text:style-name="P75"/>
      <text:p text:style-name="P75"/>
      <text:p text:style-name="P75"><text:soft-page-break/></text:p>
      <text:p text:style-name="P75"/>
      <text:p text:style-name="P76">Similarly to testing correctly formatted payloads, <text:span text:style-name="T124">incorrectly formatted payloads we tested as well </text:span><text:span text:style-name="T125">to ensure that blank tasks are not being created. </text:span><text:span text:style-name="T126">If they were, it could lead to indexing problems and the loss of sequence of id’s.</text:span></text:p>
      <text:p text:style-name="P75"/>
      <text:p text:style-name="P75"><draw:frame draw:style-name="fr3" draw:name="Image12" text:anchor-type="char" svg:width="13.203cm" svg:height="5.424cm" draw:z-index="10"><draw:image xlink:href="Pictures/10000001000001F3000000CD67D27DDF.png" xlink:type="simple" xlink:show="embed" xlink:actuate="onLoad" draw: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7"/>
      <text:p text:style-name="P75"/>
      <text:p text:style-name="P75"><draw:frame draw:style-name="fr3" draw:name="Image11" text:anchor-type="char" svg:width="13.15cm" svg:height="7.885cm" draw:z-index="11"><draw:image xlink:href="Pictures/10000001000001F10000012A07424260.png" xlink:type="simple" xlink:show="embed" xlink:actuate="onLoad" draw: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7"/>
      <text:p text:style-name="P77"/>
      <text:p text:style-name="P77"/>
      <text:p text:style-name="P77"/>
      <text:p text:style-name="P77"/>
      <text:p text:style-name="P77"/>
      <text:p text:style-name="P77"/>
      <text:p text:style-name="P77"/>
      <text:p text:style-name="P77"/>
      <text:p text:style-name="P77"/>
      <text:p text:style-name="P77">hjkjghjgf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0:09:54.297961369</dc:date>
    <meta:editing-duration>PT6H41M22S</meta:editing-duration>
    <meta:editing-cycles>309</meta:editing-cycles>
    <meta:document-statistic meta:table-count="0" meta:image-count="12" meta:object-count="0" meta:page-count="6" meta:paragraph-count="51" meta:word-count="1105" meta:character-count="7420" meta:non-whitespace-character-count="6354"/>
  </office:meta>
</office:document-meta>
</file>