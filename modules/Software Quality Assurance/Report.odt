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38259" officeooo:paragraph-rsid="00238259" fo:background-color="transparent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0970b" officeooo:paragraph-rsid="0020970b"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paragraph-rsid="0020970b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cb2f1"/>
    </style:style>
    <style:style style:name="T4" style:family="text">
      <style:text-properties fo:color="#ffffff" loext:opacity="100%" style:font-name="Droid Sans Mono" fo:font-size="10.5pt" fo:font-weight="normal" officeooo:rsid="0020970b" fo:background-color="transparent" loext:char-shading-value="0"/>
    </style:style>
    <style:style style:name="T5" style:family="text">
      <style:text-properties fo:color="#ffffff" loext:opacity="100%" style:font-name="Droid Sans Mono" fo:font-size="10.5pt" fo:font-weight="normal" officeooo:rsid="0021bc69" fo:background-color="transparent" loext:char-shading-value="0"/>
    </style:style>
    <style:style style:name="T6" style:family="text">
      <style:text-properties officeooo:rsid="0021bc69"/>
    </style:style>
    <style:style style:name="T7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:</text:span></text:p>
      <text:p text:style-name="P6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7">, which is insecure, while the “get_task” function uses <text:span text:style-name="T3">context-</text:span>appropriate parameterised queries:</text:p>
      <text:p text:style-name="P7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6"/>
      <text:p text:style-name="P6"/>
      <text:p text:style-name="P8"><text:s/></text:p>
      <text:p text:style-name="P6"/>
      <text:p text:style-name="P6"/>
      <text:p text:style-name="P6"/>
      <text:p text:style-name="P6"/>
      <text:p text:style-name="P6"/>
      <text:p text:style-name="P6"/>
      <text:p text:style-name="P9">.</text:p>
      <text:p text:style-name="P10"/>
      <text:p text:style-name="P11">Other examples of string formatting being used in place of parameterised queries include: “”</text:p>
      <text:p text:style-name="P12"/>
      <text:p text:style-name="P13"><text:span text:style-name="T4">Input validation inconsistencies were also found. </text:span><text:span text:style-name="T5">The “create_task”</text:span> <text:span text:style-name="T6">function validates input properly:</text:span></text:p>
      <text:p text:style-name="P13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0"/>
      <text:p text:style-name="P14"/>
      <text:p text:style-name="P14">, <text:span text:style-name="T6">while “update_task” does not:</text:span></text:p>
      <text:p text:style-name="P14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14"><text:soft-page-break/></text:p>
      <text:p text:style-name="P14"/>
      <text:p text:style-name="P15">Other examples of</text:p>
      <text:p text:style-name="P15"/>
      <text:p text:style-name="P15">There are error-handling inconsistencies </text:p>
      <text:p text:style-name="P14"/>
      <text:p text:style-name="P14"/>
      <text:p text:style-name="P14">1.1(b) <text:span text:style-name="T7">Comments suggesting incomplete workflow</text:span></text:p>
      <text:p text:style-name="P14"/>
      <text:p text:style-name="P14">1.1(c)</text:p>
      <text:p text:style-name="P14">1.1(d)</text:p>
      <text:p text:style-name="P14">1.1(e)</text:p>
      <text:p text:style-name="P14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47:51.982119487</dc:date>
    <meta:editing-duration>PT2H21M44S</meta:editing-duration>
    <meta:editing-cycles>27</meta:editing-cycles>
    <meta:document-statistic meta:table-count="0" meta:image-count="4" meta:object-count="0" meta:page-count="2" meta:paragraph-count="19" meta:word-count="132" meta:character-count="1039" meta:non-whitespace-character-count="922"/>
  </office:meta>
</office:document-meta>
</file>