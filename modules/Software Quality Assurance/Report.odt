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T124" style:family="text">
      <style:text-properties officeooo:rsid="018461e7"/>
    </style:style>
    <style:style style:name="T125" style:family="text">
      <style:text-properties officeooo:rsid="0186d500"/>
    </style:style>
    <style:style style:name="T126" style:family="text">
      <style:text-properties officeooo:rsid="0187ba3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4">incorrectly formatted payloads we tested as well </text:span><text:span text:style-name="T125">to ensure that blank tasks are not being created. </text:span><text:span text:style-name="T126">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8:25.432399018</dc:date>
    <meta:editing-duration>PT6H39M54S</meta:editing-duration>
    <meta:editing-cycles>308</meta:editing-cycles>
    <meta:document-statistic meta:table-count="0" meta:image-count="11" meta:object-count="0" meta:page-count="6" meta:paragraph-count="50" meta:word-count="1104" meta:character-count="7410" meta:non-whitespace-character-count="6344"/>
  </office:meta>
</office:document-meta>
</file>