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F0000011865869BC9.png" manifest:media-type="image/png"/>
  <manifest:file-entry manifest:full-path="Pictures/10000001000002A70000012BDE73539F.png" manifest:media-type="image/png"/>
  <manifest:file-entry manifest:full-path="Pictures/1000000100000272000000ECFEA7B1B8.png" manifest:media-type="image/png"/>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40759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4fd8f0"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01ff5"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style:text-underline-style="none" fo:font-weight="normal" officeooo:rsid="01542813" officeooo:paragraph-rsid="01542813"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62ae01" officeooo:paragraph-rsid="0162ae01"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414e6c" style:font-style-asian="normal" style:font-style-complex="normal"/>
    </style:style>
    <style:style style:name="T111" style:family="text">
      <style:text-properties fo:font-style="normal" style:text-underline-style="none" officeooo:rsid="0145f3a0" style:font-style-asian="normal" style:font-style-complex="normal"/>
    </style:style>
    <style:style style:name="T112" style:family="text">
      <style:text-properties fo:font-style="normal" style:text-underline-style="none" officeooo:rsid="0146d432" style:font-style-asian="normal" style:font-style-complex="normal"/>
    </style:style>
    <style:style style:name="T113" style:family="text">
      <style:text-properties fo:font-style="normal" style:text-underline-style="none" officeooo:rsid="01501ff5" style:font-style-asian="normal" style:font-style-complex="normal"/>
    </style:style>
    <style:style style:name="T114" style:family="text">
      <style:text-properties fo:font-style="normal" style:text-underline-style="none" officeooo:rsid="01589549" style:font-style-asian="normal" style:font-style-complex="normal"/>
    </style:style>
    <style:style style:name="T115" style:family="text">
      <style:text-properties fo:font-style="normal" style:text-underline-style="none" officeooo:rsid="0158a72a" style:font-style-asian="normal" style:font-style-complex="normal"/>
    </style:style>
    <style:style style:name="T116" style:family="text">
      <style:text-properties fo:font-style="normal" style:text-underline-style="none" officeooo:rsid="0158aafe" style:font-style-asian="normal" style:font-style-complex="normal"/>
    </style:style>
    <style:style style:name="T117" style:family="text">
      <style:text-properties fo:font-style="normal" style:text-underline-style="none" officeooo:rsid="015d8a4d" style:font-style-asian="normal" style:font-style-complex="normal"/>
    </style:style>
    <style:style style:name="T118" style:family="text">
      <style:text-properties fo:font-style="normal" style:text-underline-style="none" officeooo:rsid="015e327b" style:font-style-asian="normal" style:font-style-complex="normal"/>
    </style:style>
    <style:style style:name="T119" style:family="text">
      <style:text-properties officeooo:rsid="0167737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login”, “/tasks”, “/tasks/&lt;id&gt;”</text:span><text:span text:style-name="T108">. Following are the rationale behind the </text:span><text:span text:style-name="T110">tests.</text:span></text:p>
      <text:p text:style-name="P66"/>
      <text:p text:style-name="P67"><text:span text:style-name="T108">First, a test of the “/login” endpoint was conducted due to the fact that the </text:span><text:span text:style-name="T111">development team is currently integrating authentication. To ensure that the implemented function can safely be integrated, the “/login” endpoint must be evaluated and proven to work, </text:span><text:span text:style-name="T112">i.e. that you can log in.</text:span></text:p>
      <text:p text:style-name="P68"/>
      <text:p text:style-name="P68"><draw:frame draw:style-name="fr5" draw:name="Image7" text:anchor-type="char" svg:width="17cm" svg:height="7.486cm" draw:z-index="6"><draw:image xlink:href="Pictures/10000001000002A70000012BDE73539F.png" xlink:type="simple" xlink:show="embed" xlink:actuate="onLoad" draw:mime-type="image/png"/></draw:frame></text:p>
      <text:p text:style-name="P68"/>
      <text:p text:style-name="P69"><text:span text:style-name="T108">Next, a test was conducted to ensure that incorrect credentials are met with an appropriate error response. </text:span><text:span text:style-name="T113">This is important as this proves that “/login” endpoint carries out actual authentication instead of just responding with 201.</text:span></text:p>
      <text:p text:style-name="P70"><text:soft-page-break/></text:p>
      <text:p text:style-name="P68"><draw:frame draw:style-name="fr6" draw:name="Image8" text:anchor-type="char" svg:width="16.563cm" svg:height="6.244cm" draw:z-index="7"><draw:image xlink:href="Pictures/1000000100000272000000ECFEA7B1B8.png" xlink:type="simple" xlink:show="embed" xlink:actuate="onLoad" draw:mime-type="image/png"/></draw:frame></text:p>
      <text:p text:style-name="P71"/>
      <text:p text:style-name="P72"><text:span text:style-name="T108">Lastly, a boundary test was conducted to </text:span><text:span text:style-name="T114">ensure that the input behaves predictably. </text:span><text:span text:style-name="T115">This test sends the correct data type, but </text:span><text:span text:style-name="T116">incorrect values. </text:span><text:span text:style-name="T117">This is important because incorrect values like these could cause </text:span><text:span text:style-name="T118">the server to crash if not handled correctly</text:span><text:span text:style-name="T117">. </text:span></text:p>
      <text:p text:style-name="P73"><draw:frame draw:style-name="fr5" draw:name="Image9" text:anchor-type="char" svg:width="17cm" svg:height="6.77cm" draw:z-index="8"><draw:image xlink:href="Pictures/10000001000002BF0000011865869BC9.png" xlink:type="simple" xlink:show="embed" xlink:actuate="onLoad" draw:mime-type="image/png"/></draw:frame></text:p>
      <text:p text:style-name="P74"/>
      <text:p text:style-name="P75">Second, the “tasks” endpoint was tested in context of creating new task<text:span text:style-name="T119">s</text:span> (POST as opposed to GET)</text:p>
      <text:p text:style-name="P74"/>
      <text:p text:style-name="P74"/>
      <text:p text:style-name="P74"/>
      <text:p text:style-name="P7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9:56:52.497680414</dc:date>
    <meta:editing-duration>PT6H28M33S</meta:editing-duration>
    <meta:editing-cycles>290</meta:editing-cycles>
    <meta:document-statistic meta:table-count="0" meta:image-count="9" meta:object-count="0" meta:page-count="5" meta:paragraph-count="49" meta:word-count="1020" meta:character-count="6887" meta:non-whitespace-character-count="5904"/>
  </office:meta>
</office:document-meta>
</file>