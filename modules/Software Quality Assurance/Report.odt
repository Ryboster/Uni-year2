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paragraph-rsid="0020970b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T1" style:family="text">
      <style:text-properties officeooo:rsid="000d801d"/>
    </style:style>
    <style:style style:name="T2" style:family="text">
      <style:text-properties officeooo:rsid="0016e436"/>
    </style:style>
    <style:style style:name="T3" style:family="text">
      <style:text-properties officeooo:rsid="001cb2f1"/>
    </style:style>
    <style:style style:name="T4" style:family="text">
      <style:text-properties fo:color="#ffffff" loext:opacity="100%" style:font-name="Droid Sans Mono" fo:font-size="10.5pt" fo:font-weight="normal" officeooo:rsid="0020970b" fo:background-color="transparent" loext:char-shading-value="0"/>
    </style:style>
    <style:style style:name="T5" style:family="text">
      <style:text-properties fo:color="#ffffff" loext:opacity="100%" style:font-name="Droid Sans Mono" fo:font-size="10.5pt" fo:font-weight="normal" officeooo:rsid="0021bc69" fo:background-color="transparent" loext:char-shading-value="0"/>
    </style:style>
    <style:style style:name="T6" style:family="text">
      <style:text-properties officeooo:rsid="0021bc69"/>
    </style:style>
    <style:style style:name="T7" style:family="text">
      <style:text-properties officeooo:rsid="000a79f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1"/>
      <text:p text:style-name="P2"/>
      <text:p text:style-name="P3">1. Deliverable Management and Quality Impact</text:p>
      <text:p text:style-name="P3"/>
      <text:p text:style-name="P4">1.1. Preliminary Codebase Examination</text:p>
      <text:p text:style-name="P4"/>
      <text:p text:style-name="P5">Initial examination reveals three dead functions; “validate_priority”, “format_task_for_display”, and “calculate_workload”. <text:span text:style-name="T1">A comment in “validate_priority” informs the user about this. This suggests that while validation logic was planned for and implemented, it was never integrated, suggesting rushed delivery.</text:span></text:p>
      <text:p text:style-name="P5"/>
      <text:p text:style-name="P5">“<text:span text:style-name="T1">flask.render_template_string” is imported but never used.</text:span></text:p>
      <text:p text:style-name="P5"/>
      <text:p text:style-name="P6">The codebase contains inconsistent SQL queries. <text:span text:style-name="T2">The “login” function uses string formatting in its query:</text:span></text:p>
      <text:p text:style-name="P6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7">, which is insecure, while the “get_task” function uses <text:span text:style-name="T3">context-</text:span>appropriate parameterised queries:</text:p>
      <text:p text:style-name="P7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6"/>
      <text:p text:style-name="P6"/>
      <text:p text:style-name="P8"><text:s/></text:p>
      <text:p text:style-name="P6"/>
      <text:p text:style-name="P6"/>
      <text:p text:style-name="P6"/>
      <text:p text:style-name="P6"/>
      <text:p text:style-name="P6"/>
      <text:p text:style-name="P6"/>
      <text:p text:style-name="P9">.</text:p>
      <text:p text:style-name="P10"/>
      <text:p text:style-name="P11"><text:span text:style-name="T4">Input validation inconsistencies were also found. </text:span><text:span text:style-name="T5">The “create_task”</text:span> <text:span text:style-name="T6">function validates input properly:</text:span></text:p>
      <text:p text:style-name="P11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0"/>
      <text:p text:style-name="P12"/>
      <text:p text:style-name="P12">, <text:span text:style-name="T6">while “update_task” does not:</text:span></text:p>
      <text:p text:style-name="P12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12"/>
      <text:p text:style-name="P12"/>
      <text:p text:style-name="P12"><text:soft-page-break/>1.1(b) <text:span text:style-name="T7">Comments suggesting incomplete workflow</text:span></text:p>
      <text:p text:style-name="P12"/>
      <text:p text:style-name="P12">1.1(c)</text:p>
      <text:p text:style-name="P12">1.1(d)</text:p>
      <text:p text:style-name="P12">1.1(e)</text:p>
      <text:p text:style-name="P12"/>
      <text:p text:style-name="P4"/>
      <text:p text:style-name="P4"/>
      <text:p text:style-name="P4">1.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5:45:00.318269707</dc:date>
    <meta:editing-duration>PT2H18M53S</meta:editing-duration>
    <meta:editing-cycles>26</meta:editing-cycles>
    <meta:document-statistic meta:table-count="0" meta:image-count="4" meta:object-count="0" meta:page-count="2" meta:paragraph-count="16" meta:word-count="111" meta:character-count="889" meta:non-whitespace-character-count="791"/>
  </office:meta>
</office:document-meta>
</file>