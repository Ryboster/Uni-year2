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55c04" officeooo:paragraph-rsid="023cbb6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2455c04" officeooo:paragraph-rsid="02455c04"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23a30b3" officeooo:paragraph-rsid="023cbb63"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39b13a" officeooo:paragraph-rsid="0239b13a"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style:text-underline-style="none" fo:font-weight="normal" officeooo:rsid="0243c099" officeooo:paragraph-rsid="0243c099"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3cbb63"/>
    </style:style>
    <style:style style:name="T188" style:family="text">
      <style:text-properties officeooo:rsid="023f273e"/>
    </style:style>
    <style:style style:name="T189" style:family="text">
      <style:text-properties officeooo:rsid="024041d5"/>
    </style:style>
    <style:style style:name="T190" style:family="text">
      <style:text-properties officeooo:rsid="02408ad5"/>
    </style:style>
    <style:style style:name="T191" style:family="text">
      <style:text-properties officeooo:rsid="024289ff"/>
    </style:style>
    <style:style style:name="T192" style:family="text">
      <style:text-properties officeooo:rsid="0242c78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text:span></text:p>
      <text:p text:style-name="P114"><text:soft-page-break/></text:p>
      <text:p text:style-name="P115">Once </text:p>
      <text:p text:style-name="P115"/>
      <text:p text:style-name="P115">By first devising a test, and gathering all the ways in which</text:p>
      <text:p text:style-name="P116"/>
      <text:p text:style-name="P116"/>
      <text:p text:style-name="P116"><text:span text:style-name="T187">By devising a test before developing the feature, </text:span><text:span text:style-name="T188">complete with all </text:span><text:span text:style-name="T189">assumed failure </text:span><text:span text:style-name="T190">cases, </text:span><text:span text:style-name="T191">the function could’ve been written to account for </text:span><text:span text:style-name="T192">those cases. </text:span><text:s/></text:p>
      <text:p text:style-name="P117"/>
      <text:p text:style-name="P117"/>
      <text:p text:style-name="P117"/>
      <text:p text:style-name="P118">1. Devise tests</text:p>
      <text:p text:style-name="P118">2. Think of all failures</text:p>
      <text:p text:style-name="P118">3. Write the tests</text:p>
      <text:p text:style-name="P118">4. Write the function</text:p>
      <text:p text:style-name="P112"/>
      <text:p text:style-name="P112"/>
      <text:p text:style-name="P112"/>
      <text:p text:style-name="P112"/>
      <text:p text:style-name="P112"/>
      <text:p text:style-name="P112"><text:span text:style-name="T182">coverage</text:span></text:p>
      <text:p text:style-name="P112"/>
      <text:p text:style-name="P112"><text:span text:style-name="T182">cover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17:38.318185785</dc:date>
    <meta:editing-duration>PT8H47M54S</meta:editing-duration>
    <meta:editing-cycles>455</meta:editing-cycles>
    <meta:document-statistic meta:table-count="0" meta:image-count="21" meta:object-count="0" meta:page-count="11" meta:paragraph-count="91" meta:word-count="1852" meta:character-count="12273" meta:non-whitespace-character-count="10496"/>
  </office:meta>
</office:document-meta>
</file>