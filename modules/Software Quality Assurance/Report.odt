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font-size="12pt" fo:font-style="normal" style:text-underline-style="none" fo:font-weight="normal" officeooo:rsid="022187e3" officeooo:paragraph-rsid="02393fb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239b13a" officeooo:paragraph-rsid="023cbb63"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246d9f3" officeooo:paragraph-rsid="0246d9f3"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officeooo:paragraph-rsid="02586010"/>
    </style:style>
    <style:style style:name="P116" style:family="paragraph" style:parent-style-name="Standard">
      <style:paragraph-properties fo:text-align="start" style:justify-single-word="false"/>
      <style:text-properties fo:font-size="12pt" fo:font-style="normal" style:text-underline-style="none" fo:font-weight="normal" officeooo:rsid="025927bb" officeooo:paragraph-rsid="02586010"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style:text-underline-style="none" fo:font-weight="normal" officeooo:rsid="025415c1" officeooo:paragraph-rsid="02586010"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2pt" fo:font-style="normal" style:text-underline-style="none" fo:font-weight="normal" officeooo:rsid="023a30b3" officeooo:paragraph-rsid="025415c1"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font-size="12pt" fo:font-style="normal" style:text-underline-style="none" fo:font-weight="normal" officeooo:rsid="022187e3" officeooo:paragraph-rsid="0239b13a"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T184" style:family="text">
      <style:text-properties officeooo:rsid="023a30b3"/>
    </style:style>
    <style:style style:name="T185" style:family="text">
      <style:text-properties officeooo:rsid="023a9a89"/>
    </style:style>
    <style:style style:name="T186" style:family="text">
      <style:text-properties officeooo:rsid="02455c04"/>
    </style:style>
    <style:style style:name="T187" style:family="text">
      <style:text-properties officeooo:rsid="0246d9f3"/>
    </style:style>
    <style:style style:name="T188" style:family="text">
      <style:text-properties officeooo:rsid="024f34c2"/>
    </style:style>
    <style:style style:name="T189" style:family="text">
      <style:text-properties fo:font-size="12pt" fo:font-style="normal" style:text-underline-style="none" fo:font-weight="normal" officeooo:rsid="0246d9f3" style:font-size-asian="12pt" style:font-style-asian="normal" style:font-weight-asian="normal" style:font-size-complex="12pt" style:font-style-complex="normal" style:font-weight-complex="normal"/>
    </style:style>
    <style:style style:name="T190" style:family="text">
      <style:text-properties fo:font-size="12pt" fo:font-style="normal" style:text-underline-style="none" fo:font-weight="normal" officeooo:rsid="024feae8" style:font-size-asian="12pt" style:font-style-asian="normal" style:font-weight-asian="normal" style:font-size-complex="12pt" style:font-style-complex="normal" style:font-weight-complex="normal"/>
    </style:style>
    <style:style style:name="T191" style:family="text">
      <style:text-properties fo:font-size="12pt" fo:font-style="normal" style:text-underline-style="none" fo:font-weight="normal" officeooo:rsid="02488339" style:font-size-asian="12pt" style:font-style-asian="normal" style:font-weight-asian="normal" style:font-size-complex="12pt" style:font-style-complex="normal" style:font-weight-complex="normal"/>
    </style:style>
    <style:style style:name="T192" style:family="text">
      <style:text-properties fo:font-size="12pt" fo:font-style="normal" style:text-underline-style="none" fo:font-weight="normal" officeooo:rsid="025415c1" style:font-size-asian="12pt" style:font-style-asian="normal" style:font-weight-asian="normal" style:font-size-complex="12pt" style:font-style-complex="normal" style:font-weight-complex="normal"/>
    </style:style>
    <style:style style:name="T193" style:family="text">
      <style:text-properties fo:font-size="12pt" fo:font-style="normal" style:text-underline-style="none" fo:font-weight="normal" officeooo:rsid="02586010" style:font-size-asian="12pt" style:font-style-asian="normal" style:font-weight-asian="normal" style:font-size-complex="12pt" style:font-style-complex="normal" style:font-weight-complex="normal"/>
    </style:style>
    <style:style style:name="T194" style:family="text">
      <style:text-properties fo:font-size="12pt" fo:font-style="normal" style:text-underline-style="none" fo:font-weight="normal" officeooo:rsid="025927bb"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2"/>
      <text:p text:style-name="P113">Creating new tasks could have been developed differently using TDD (Test-Driven Development). <text:span text:style-name="T184">Currently, the biggest problem with the function is that it does not filter out incorrect</text:span><text:span text:style-name="T185">ly structured payloads or payloads containing incorrect values</text:span><text:span text:style-name="T184">. </text:span><text:span text:style-name="T186">It simply returns 201 status code without applying the changes. </text:span><text:span text:style-name="T187">Instead of creating the feature first, </text:span><text:span text:style-name="T188">it could’ve been done the following way:</text:span></text:p>
      <text:p text:style-name="P114"><text:soft-page-break/></text:p>
      <text:p text:style-name="P115"><text:span text:style-name="T189">Once the piece of functionality is planned, a test for it could be devised. You could gather all the ways in which the feature could fail, and then write tests that incorporate those failures, </text:span><text:span text:style-name="T190">i.e. Aim to trigger them</text:span><text:span text:style-name="T189">. </text:span><text:span text:style-name="T191">Once the test is complete, </text:span><text:span text:style-name="T192">a ticket for the feature could’ve been created with acceptance criteria tha</text:span><text:span text:style-name="T193">t demand the function only returns a success response when the input payload is correctly structured and contains valid values, and otherwise returns an appropriate error response without </text:span><text:span text:style-name="T194">carrying out any changes.</text:span></text:p>
      <text:p text:style-name="P116"/>
      <text:p text:style-name="P116"/>
      <text:p text:style-name="P117"/>
      <text:p text:style-name="P117"/>
      <text:p text:style-name="P117"/>
      <text:p text:style-name="P115"><text:span text:style-name="T192">and </text:span>that demand the function only returns a success response (e.g. HTTP 201) when the input payload is correctly structured and contains valid values, and otherwise returns an appropriate error response (such as HTTP 400) without modifying any data.</text:p>
      <text:p text:style-name="P118"/>
      <text:p text:style-name="P118"/>
      <text:p text:style-name="P119"/>
      <text:p text:style-name="P112"/>
      <text:p text:style-name="P112"/>
      <text:p text:style-name="P1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22:55.375218600</dc:date>
    <meta:editing-duration>PT8H53M2S</meta:editing-duration>
    <meta:editing-cycles>472</meta:editing-cycles>
    <meta:document-statistic meta:table-count="0" meta:image-count="21" meta:object-count="0" meta:page-count="11" meta:paragraph-count="84" meta:word-count="1936" meta:character-count="12821" meta:non-whitespace-character-count="10956"/>
  </office:meta>
</office:document-meta>
</file>