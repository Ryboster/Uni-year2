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460b7"/>
    </style:style>
    <style:style style:name="T33" style:family="text">
      <style:text-properties officeooo:rsid="004756e2"/>
    </style:style>
    <style:style style:name="T34" style:family="text">
      <style:text-properties officeooo:rsid="0028b6fb"/>
    </style:style>
    <style:style style:name="T35" style:family="text">
      <style:text-properties officeooo:rsid="00292dc4"/>
    </style:style>
    <style:style style:name="T36" style:family="text">
      <style:text-properties officeooo:rsid="0034b93b"/>
    </style:style>
    <style:style style:name="T37" style:family="text">
      <style:text-properties officeooo:rsid="002ec9e2"/>
    </style:style>
    <style:style style:name="T38" style:family="text">
      <style:text-properties officeooo:rsid="0034bc00"/>
    </style:style>
    <style:style style:name="T39" style:family="text">
      <style:text-properties officeooo:rsid="003f25fd"/>
    </style:style>
    <style:style style:name="T40" style:family="text">
      <style:text-properties officeooo:rsid="002d47dc"/>
    </style:style>
    <style:style style:name="T41" style:family="text">
      <style:text-properties officeooo:rsid="00371c2c"/>
    </style:style>
    <style:style style:name="T42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guidelines. <text:span text:style-name="T32">Our team understood it well at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</text:p>
        </text:list-item>
        <text:list-item>
          <text:p text:style-name="P28">Coding Best Practices</text:p>
        </text:list-item>
        <text:list-item>
          <text:p text:style-name="P28">Directory Structure Convention</text:p>
        </text:list-item>
        <text:list-item>
          <text:p text:style-name="P28"/>
        </text:list-item>
      </text:list>
      <text:p text:style-name="P29"/>
      <text:p text:style-name="P13">1.2(f). <text:span text:style-name="T33">Design</text:span></text:p>
      <text:p text:style-name="P29"/>
      <text:p text:style-name="P30"/>
      <text:p text:style-name="P3">2. The Shadows of Vahlvadell</text:p>
      <text:p text:style-name="P31">2.1. Overview</text:p>
      <text:p text:style-name="P32">The Shadows of Vahlvadell is a Role-Playing <text:span text:style-name="T34">G</text:span>ame (RPG) <text:span text:style-name="T34">tit</text:span><text:span text:style-name="T35">le </text:span><text:span text:style-name="T36">lead by</text:span><text:span text:style-name="T35"> Aaron Stevens. </text:span><text:span text:style-name="T37">It is developed in Unreal Engine for </text:span><text:span text:style-name="T36">Windows and Linux. The project follows the Agile methodology. </text:span><text:span text:style-name="T38">During development, I fulfilled the role of a software developer.</text:span></text:p>
      <text:p text:style-name="P32"/>
      <text:p text:style-name="P33">2.2. Involvement</text:p>
      <text:p text:style-name="P34"><text:span text:style-name="T39">2</text:span>.2(a). Inventory System</text:p>
      <text:p text:style-name="P34"><text:span text:style-name="T39">2</text:span>.2(b). Weather System</text:p>
      <text:p text:style-name="P34"><text:span text:style-name="T39">2</text:span>.2(c). Combat System</text:p>
      <text:p text:style-name="P35"/>
      <text:p text:style-name="P30"/>
      <text:p text:style-name="P30">3. MauiScreenTime</text:p>
      <text:p text:style-name="P36"/>
      <text:p text:style-name="P37"><text:span text:style-name="T40">3</text:span>.1. Overview</text:p>
      <text:p text:style-name="P38">“MauiScreenTime” is a mobile application for <text:span text:style-name="T41">A</text:span>ndroid and IOS. <text:span text:style-name="T42">It follows the Agile methodology. </text:span><text:span text:style-name="T41">Although my involvement with it was brief, during its development I fulfilled the role of a software developer.</text:span></text:p>
      <text:p text:style-name="P38"/>
      <text:p text:style-name="P33">3.2. Involvement</text:p>
      <text:p text:style-name="P39"/>
      <text:p text:style-name="P40"><text:soft-page-break/>3.2(a). </text:p>
      <text:p text:style-name="P30"/>
      <text:p text:style-name="P30"/>
      <text:p text:style-name="P30"/>
      <text:p text:style-name="P41">4. Blazejowski.co.uk</text:p>
      <text:p text:style-name="P42">mobile-first design,</text:p>
      <text:p text:style-name="P42">security by design,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09:22.893309202</dc:date>
    <meta:editing-duration>PT18H25M56S</meta:editing-duration>
    <meta:editing-cycles>126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0" meta:word-count="517" meta:character-count="4447" meta:non-whitespace-character-count="3987"/>
  </office:meta>
</office:document-meta>
</file>