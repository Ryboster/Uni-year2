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3"/>
      <text:p text:style-name="P13">2. The Shadows of Vahlvadell</text:p>
      <text:p text:style-name="P13"/>
      <text:p text:style-name="P13">3. MauiScreenTime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35:29.581383858</dc:date>
    <meta:editing-duration>PT4H46M50S</meta:editing-duration>
    <meta:editing-cycles>31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2" meta:word-count="177" meta:character-count="1206" meta:non-whitespace-character-count="1050"/>
  </office:meta>
</office:document-meta>
</file>