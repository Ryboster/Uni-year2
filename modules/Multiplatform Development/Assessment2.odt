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54bcb3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535450"/>
    </style:style>
    <style:style style:name="T11" style:family="text">
      <style:text-properties officeooo:rsid="0057a59c"/>
    </style:style>
    <style:style style:name="T12" style:family="text">
      <style:text-properties officeooo:rsid="00464452"/>
    </style:style>
    <style:style style:name="T13" style:family="text">
      <style:text-properties officeooo:rsid="0043dd38"/>
    </style:style>
    <style:style style:name="T14" style:family="text">
      <style:text-properties officeooo:rsid="004756e2"/>
    </style:style>
    <style:style style:name="T15" style:family="text">
      <style:text-properties officeooo:rsid="0028b6fb"/>
    </style:style>
    <style:style style:name="T16" style:family="text">
      <style:text-properties officeooo:rsid="00292dc4"/>
    </style:style>
    <style:style style:name="T17" style:family="text">
      <style:text-properties officeooo:rsid="0034b93b"/>
    </style:style>
    <style:style style:name="T18" style:family="text">
      <style:text-properties officeooo:rsid="002ec9e2"/>
    </style:style>
    <style:style style:name="T19" style:family="text">
      <style:text-properties officeooo:rsid="0034bc00"/>
    </style:style>
    <style:style style:name="T20" style:family="text">
      <style:text-properties officeooo:rsid="003f25fd"/>
    </style:style>
    <style:style style:name="T21" style:family="text">
      <style:text-properties officeooo:rsid="002d47dc"/>
    </style:style>
    <style:style style:name="T22" style:family="text">
      <style:text-properties officeooo:rsid="00371c2c"/>
    </style:style>
    <style:style style:name="T23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with</text:span> the design and <text:span text:style-name="T10">development</text:span> of the game’s level<text:span text:style-name="T6">s</text:span>. <text:span text:style-name="T6">This includes the </text:span><text:span text:style-name="T11">main </text:span><text:span text:style-name="T6">game level as well as the main menu.</text:span></text:p>
      <text:p text:style-name="P9">For</text:p>
      <text:p text:style-name="P8"><text:s/>My contributions include:</text:p>
      <text:list text:style-name="L1">
        <text:list-item>
          <text:p text:style-name="P10"/>
        </text:list-item>
      </text:list>
      <text:p text:style-name="P7">1.2(b). <text:span text:style-name="T12">Accessibility</text:span></text:p>
      <text:p text:style-name="P11"/>
      <text:p text:style-name="P11">main menu, settings menu, navigation,</text:p>
      <text:p text:style-name="P11"/>
      <text:p text:style-name="P7">1.2(c). <text:span text:style-name="T13">Debugging</text:span></text:p>
      <text:p text:style-name="P7">1.2(d). <text:span text:style-name="T13">UI</text:span></text:p>
      <text:p text:style-name="P12">shop, main menu, settings menu, heads-up display (HUD) design, </text:p>
      <text:p text:style-name="P7">1.2(e). <text:span text:style-name="T14">Documentation</text:span></text:p>
      <text:p text:style-name="P7">1.2(f). <text:span text:style-name="T14">Design</text:span></text:p>
      <text:p text:style-name="P7"/>
      <text:p text:style-name="P3"/>
      <text:p text:style-name="P3">2. The Shadows of Vahlvadell</text:p>
      <text:p text:style-name="P13">2.1. Overview</text:p>
      <text:p text:style-name="P14"><text:soft-page-break/>The Shadows of Vahlvadell is a Role-Playing <text:span text:style-name="T15">G</text:span>ame (RPG) <text:span text:style-name="T15">tit</text:span><text:span text:style-name="T16">le </text:span><text:span text:style-name="T17">lead by</text:span><text:span text:style-name="T16"> Aaron Stevens. </text:span><text:span text:style-name="T18">It is developed in Unreal Engine for </text:span><text:span text:style-name="T17">Windows and Linux. The project follows the Agile methodology. </text:span><text:span text:style-name="T19">During development, I fulfilled the role of a software developer.</text:span></text:p>
      <text:p text:style-name="P14"/>
      <text:p text:style-name="P5">2.2. Involvement</text:p>
      <text:p text:style-name="P15"><text:span text:style-name="T20">2</text:span>.2(a). Inventory System</text:p>
      <text:p text:style-name="P15"><text:span text:style-name="T20">2</text:span>.2(b). Weather System</text:p>
      <text:p text:style-name="P15"><text:span text:style-name="T20">2</text:span>.2(c). Combat System</text:p>
      <text:p text:style-name="P16"/>
      <text:p text:style-name="P3"/>
      <text:p text:style-name="P3">3. MauiScreenTime</text:p>
      <text:p text:style-name="P17"/>
      <text:p text:style-name="P18"><text:span text:style-name="T21">3</text:span>.1. Overview</text:p>
      <text:p text:style-name="P19">“MauiScreenTime” is a mobile application for <text:span text:style-name="T22">A</text:span>ndroid and IOS. <text:span text:style-name="T23">It follows the Agile methodology. </text:span><text:span text:style-name="T22">Although my involvement with it was brief, during its development I fulfilled the role of a software developer.</text:span></text:p>
      <text:p text:style-name="P19"/>
      <text:p text:style-name="P5">3.2. Involvement</text:p>
      <text:p text:style-name="P20"/>
      <text:p text:style-name="P21">3.2(a). </text:p>
      <text:p text:style-name="P3"/>
      <text:p text:style-name="P3"/>
      <text:p text:style-name="P3"/>
      <text:p text:style-name="P22">4. Blazejowski.co.uk</text:p>
      <text:p text:style-name="P23">mobile-first design,</text:p>
      <text:p text:style-name="P23">security by design,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1:31.804885988</dc:date>
    <meta:editing-duration>PT16H24M26S</meta:editing-duration>
    <meta:editing-cycles>74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3" meta:word-count="228" meta:character-count="1491" meta:non-whitespace-character-count="1292"/>
  </office:meta>
</office:document-meta>
</file>