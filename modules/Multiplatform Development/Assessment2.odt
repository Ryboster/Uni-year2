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2pt" fo:font-style="italic" fo:font-weight="bold" officeooo:rsid="003ef905" officeooo:paragraph-rsid="016b616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fo:font-size="12pt" fo:font-style="normal" fo:font-weight="normal" officeooo:rsid="016fae42" officeooo:paragraph-rsid="0172533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3pt" fo:font-weight="bold" officeooo:rsid="0038518f" officeooo:paragraph-rsid="0038518f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size="12pt" fo:font-weight="bold" officeooo:rsid="00b2d3ce" officeooo:paragraph-rsid="00b2d3ce" style:font-size-asian="10.5pt" style:font-weight-asian="bold" style:font-size-complex="12pt" style:font-weight-complex="bold"/>
    </style:style>
    <style:style style:name="P43" style:family="paragraph" style:parent-style-name="Text_20_body" style:list-style-name="L6">
      <style:text-properties fo:font-size="12pt" fo:font-weight="normal" officeooo:rsid="00b2d3ce" officeooo:paragraph-rsid="013f3b91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5" style:family="paragraph" style:parent-style-name="Text_20_body" style:list-style-name="L6">
      <style:text-properties fo:font-size="12pt" fo:font-weight="normal" officeooo:rsid="00be4142" officeooo:paragraph-rsid="013fb12b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style="normal" fo:font-weight="normal" officeooo:rsid="01783f98" officeooo:paragraph-rsid="00265e6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italic" fo:font-weight="bold" officeooo:rsid="003ef905" officeooo:paragraph-rsid="01757824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4pt" fo:font-weight="bold" officeooo:rsid="00265e63" officeooo:paragraph-rsid="014652f4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3pt" fo:font-weight="bold" officeooo:rsid="002eb126" officeooo:paragraph-rsid="014652f4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ize="12pt" fo:font-weight="normal" officeooo:rsid="014858c2" officeooo:paragraph-rsid="0169feed" style:font-size-asian="10.5pt" style:font-weight-asian="normal" style:font-size-complex="12pt" style:font-weight-complex="normal"/>
    </style:style>
    <style:style style:name="P51" style:family="paragraph" style:parent-style-name="Text_20_body" style:list-style-name="L7">
      <style:text-properties fo:font-size="12pt" fo:font-weight="normal" officeooo:rsid="015bf5a1" officeooo:paragraph-rsid="015bf5a1" style:font-size-asian="10.5pt" style:font-weight-asian="normal" style:font-size-complex="12pt" style:font-weight-complex="normal"/>
    </style:style>
    <style:style style:name="P52" style:family="paragraph" style:parent-style-name="Text_20_body" style:list-style-name="L7">
      <style:text-properties fo:font-size="12pt" fo:font-weight="normal" officeooo:rsid="016616f1" officeooo:paragraph-rsid="01799534" style:font-size-asian="10.5pt" style:font-weight-asian="normal" style:font-size-complex="12pt" style:font-weight-complex="normal"/>
    </style:style>
    <style:style style:name="P53" style:family="paragraph" style:parent-style-name="Text_20_body" style:list-style-name="L7">
      <style:text-properties fo:font-size="12pt" fo:font-weight="normal" officeooo:rsid="017b7ecd" officeooo:paragraph-rsid="017b7ecd" style:font-size-asian="10.5pt" style:font-weight-asian="normal" style:font-size-complex="12pt" style:font-weight-complex="normal"/>
    </style:style>
    <style:style style:name="P54" style:family="paragraph" style:parent-style-name="Text_20_body" style:list-style-name="L7">
      <style:text-properties fo:font-size="12pt" fo:font-weight="normal" officeooo:rsid="017e05dc" officeooo:paragraph-rsid="017e05dc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14858c2" officeooo:paragraph-rsid="014858c2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3pt" fo:font-style="italic" fo:font-weight="bold" officeooo:rsid="0178ff44" officeooo:paragraph-rsid="0178ff44" style:font-size-asian="13pt" style:font-style-asian="italic" style:font-weight-asian="bold" style:font-size-complex="13pt" style:font-style-complex="italic" style:font-weight-complex="bold"/>
    </style:style>
    <style:style style:name="P57" style:family="paragraph" style:parent-style-name="Text_20_body">
      <style:text-properties fo:font-size="12pt" fo:font-style="normal" fo:font-weight="normal" officeooo:rsid="0178ff44" officeooo:paragraph-rsid="0178ff4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font-size="13pt" fo:font-weight="normal" officeooo:rsid="00266b26" officeooo:paragraph-rsid="014a4db4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4pt" fo:font-weight="bold" officeooo:rsid="00bf0c97" officeooo:paragraph-rsid="00bf0c97" style:font-size-asian="14pt" style:font-weight-asian="bold" style:font-size-complex="14pt" style:font-weight-complex="bold"/>
    </style:style>
    <style:style style:name="P60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63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4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5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6" style:family="paragraph" style:parent-style-name="Text_20_body">
      <style:text-properties fo:font-size="13pt" fo:font-weight="normal" officeooo:rsid="0142900e" officeooo:paragraph-rsid="0142900e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16b6168"/>
    </style:style>
    <style:style style:name="T74" style:family="text">
      <style:text-properties officeooo:rsid="01716df9"/>
    </style:style>
    <style:style style:name="T75" style:family="text">
      <style:text-properties officeooo:rsid="01725339"/>
    </style:style>
    <style:style style:name="T76" style:family="text">
      <style:text-properties fo:font-style="italic" officeooo:rsid="01725339" style:font-style-asian="italic" style:font-style-complex="italic"/>
    </style:style>
    <style:style style:name="T77" style:family="text">
      <style:text-properties officeooo:rsid="0173f191"/>
    </style:style>
    <style:style style:name="T78" style:family="text">
      <style:text-properties officeooo:rsid="0028b6fb"/>
    </style:style>
    <style:style style:name="T79" style:family="text">
      <style:text-properties officeooo:rsid="00292dc4"/>
    </style:style>
    <style:style style:name="T80" style:family="text">
      <style:text-properties officeooo:rsid="0034b93b"/>
    </style:style>
    <style:style style:name="T81" style:family="text">
      <style:text-properties officeooo:rsid="002ec9e2"/>
    </style:style>
    <style:style style:name="T82" style:family="text">
      <style:text-properties officeooo:rsid="0034bc00"/>
    </style:style>
    <style:style style:name="T83" style:family="text">
      <style:text-properties fo:font-style="italic" officeooo:rsid="012b38bd" style:font-style-asian="italic" style:font-style-complex="italic"/>
    </style:style>
    <style:style style:name="T84" style:family="text">
      <style:text-properties fo:font-style="italic" officeooo:rsid="013f3b91" style:font-style-asian="italic" style:font-style-complex="italic"/>
    </style:style>
    <style:style style:name="T85" style:family="text">
      <style:text-properties fo:font-style="italic" officeooo:rsid="012c5674" style:font-style-asian="italic" style:font-style-complex="italic"/>
    </style:style>
    <style:style style:name="T86" style:family="text">
      <style:text-properties officeooo:rsid="00bbe00c"/>
    </style:style>
    <style:style style:name="T87" style:family="text">
      <style:text-properties fo:font-style="italic" officeooo:rsid="01314900" style:font-style-asian="italic" style:font-style-complex="italic"/>
    </style:style>
    <style:style style:name="T88" style:family="text">
      <style:text-properties fo:font-style="italic" officeooo:rsid="01321924" style:font-style-asian="italic" style:font-style-complex="italic"/>
    </style:style>
    <style:style style:name="T89" style:family="text">
      <style:text-properties fo:font-style="italic" officeooo:rsid="0133a86a" style:font-style-asian="italic" style:font-style-complex="italic"/>
    </style:style>
    <style:style style:name="T90" style:family="text">
      <style:text-properties fo:font-style="italic" officeooo:rsid="01353272" style:font-style-asian="italic" style:font-style-complex="italic"/>
    </style:style>
    <style:style style:name="T91" style:family="text">
      <style:text-properties fo:font-style="italic" officeooo:rsid="013c8976" style:font-style-asian="italic" style:font-style-complex="italic"/>
    </style:style>
    <style:style style:name="T92" style:family="text">
      <style:text-properties fo:font-style="italic" officeooo:rsid="013f28b8" style:font-style-asian="italic" style:font-style-complex="italic"/>
    </style:style>
    <style:style style:name="T93" style:family="text">
      <style:text-properties fo:font-style="italic" officeooo:rsid="013fb12b" style:font-style-asian="italic" style:font-style-complex="italic"/>
    </style:style>
    <style:style style:name="T94" style:family="text">
      <style:text-properties fo:font-style="italic" officeooo:rsid="013ff355" style:font-style-asian="italic" style:font-style-complex="italic"/>
    </style:style>
    <style:style style:name="T95" style:family="text">
      <style:text-properties officeooo:rsid="01473ff3"/>
    </style:style>
    <style:style style:name="T96" style:family="text">
      <style:text-properties officeooo:rsid="0153d199"/>
    </style:style>
    <style:style style:name="T97" style:family="text">
      <style:text-properties officeooo:rsid="014d11ac"/>
    </style:style>
    <style:style style:name="T98" style:family="text">
      <style:text-properties officeooo:rsid="01567fbe"/>
    </style:style>
    <style:style style:name="T99" style:family="text">
      <style:text-properties officeooo:rsid="014ddaac"/>
    </style:style>
    <style:style style:name="T100" style:family="text">
      <style:text-properties officeooo:rsid="01632579"/>
    </style:style>
    <style:style style:name="T101" style:family="text">
      <style:text-properties officeooo:rsid="015e3739"/>
    </style:style>
    <style:style style:name="T102" style:family="text">
      <style:text-properties officeooo:rsid="016a33e6"/>
    </style:style>
    <style:style style:name="T103" style:family="text">
      <style:text-properties officeooo:rsid="0164e7bf"/>
    </style:style>
    <style:style style:name="T104" style:family="text">
      <style:text-properties officeooo:rsid="0165327b"/>
    </style:style>
    <style:style style:name="T105" style:family="text">
      <style:text-properties officeooo:rsid="014a4db4"/>
    </style:style>
    <style:style style:name="T106" style:family="text">
      <style:text-properties officeooo:rsid="01799534"/>
    </style:style>
    <style:style style:name="T107" style:family="text">
      <style:text-properties officeooo:rsid="017bd08e"/>
    </style:style>
    <style:style style:name="T108" style:family="text">
      <style:text-properties officeooo:rsid="017d85ed"/>
    </style:style>
    <style:style style:name="T109" style:family="text">
      <style:text-properties officeooo:rsid="017e05dc"/>
    </style:style>
    <style:style style:name="T110" style:family="text">
      <style:text-properties officeooo:rsid="017eba94"/>
    </style:style>
    <style:style style:name="T111" style:family="text">
      <style:text-properties officeooo:rsid="017f2396"/>
    </style:style>
    <style:style style:name="T112" style:family="text">
      <style:text-properties fo:font-size="12pt" fo:font-weight="bold" style:font-size-asian="12pt" style:font-weight-asian="bold" style:font-size-complex="12pt" style:font-weight-complex="bold"/>
    </style:style>
    <style:style style:name="T113" style:family="text">
      <style:text-properties fo:font-size="12pt" fo:font-weight="bold" officeooo:rsid="00c55401" style:font-size-asian="12pt" style:font-weight-asian="bold" style:font-size-complex="12pt" style:font-weight-complex="bold"/>
    </style:style>
    <style:style style:name="T114" style:family="text">
      <style:text-properties fo:font-size="12pt" fo:font-weight="bold" officeooo:rsid="00c945a8" style:font-size-asian="12pt" style:font-weight-asian="bold" style:font-size-complex="12pt" style:font-weight-complex="bold"/>
    </style:style>
    <style:style style:name="T115" style:family="text">
      <style:text-properties fo:font-size="12pt" style:font-size-asian="12pt" style:font-size-complex="12pt"/>
    </style:style>
    <style:style style:name="T116" style:family="text">
      <style:text-properties fo:font-size="12pt" fo:font-style="italic" style:font-size-asian="12pt" style:font-style-asian="italic" style:font-size-complex="12pt" style:font-style-complex="italic"/>
    </style:style>
    <style:style style:name="T117" style:family="text">
      <style:text-properties fo:font-size="12pt" fo:font-weight="bold" officeooo:rsid="00c5460f" style:font-size-asian="12pt" style:font-weight-asian="bold" style:font-size-complex="12pt" style:font-weight-complex="bold"/>
    </style:style>
    <style:style style:name="T118" style:family="text">
      <style:text-properties fo:font-size="12pt" officeooo:rsid="00c5460f" style:font-size-asian="12pt" style:font-size-complex="12pt"/>
    </style:style>
    <style:style style:name="T119" style:family="text">
      <style:text-properties fo:font-size="12pt" fo:font-style="italic" officeooo:rsid="00c5460f" style:font-size-asian="12pt" style:font-style-asian="italic" style:font-size-complex="12pt" style:font-style-complex="italic"/>
    </style:style>
    <style:style style:name="T120" style:family="text">
      <style:text-properties fo:font-size="12pt" fo:font-weight="bold" officeooo:rsid="00d39f75" style:font-size-asian="12pt" style:font-weight-asian="bold" style:font-size-complex="12pt" style:font-weight-complex="bold"/>
    </style:style>
    <style:style style:name="T121" style:family="text">
      <style:text-properties fo:font-size="12pt" fo:font-style="italic" officeooo:rsid="00dcbc28" style:font-size-asian="12pt" style:font-style-asian="italic" style:font-size-complex="12pt" style:font-style-complex="italic"/>
    </style:style>
    <style:style style:name="T122" style:family="text">
      <style:text-properties fo:font-size="12pt" fo:font-weight="bold" officeooo:rsid="0128bc99" style:font-size-asian="12pt" style:font-weight-asian="bold" style:font-size-complex="12pt" style:font-weight-complex="bold"/>
    </style:style>
    <style:style style:name="T123" style:family="text">
      <style:text-properties fo:font-size="12pt" officeooo:rsid="00cbbf6a" style:font-size-asian="12pt" style:font-size-complex="12pt"/>
    </style:style>
    <style:style style:name="T124" style:family="text">
      <style:text-properties fo:font-size="12pt" fo:font-style="italic" officeooo:rsid="00cbbf6a" style:font-size-asian="12pt" style:font-style-asian="italic" style:font-size-complex="12pt" style:font-style-complex="italic"/>
    </style:style>
    <style:style style:name="T125" style:family="text">
      <style:text-properties fo:font-size="12pt" fo:font-weight="bold" officeooo:rsid="00d42837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1.2(c). <text:span text:style-name="T33">Debugging</text:span></text:p>
      <text:p text:style-name="P20"><text:soft-page-break/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7"/>
      <text:p text:style-name="P37">1.2(<text:span text:style-name="T73">g</text:span>). <text:span text:style-name="T73">Workflow</text:span></text:p>
      <text:p text:style-name="P38"><text:soft-page-break/>The project was developed collaboratively within the scrum framework. Each sprint would last two weeks. <text:span text:style-name="T74">Planning and retrospectives would take place on our project board </text:span><text:span text:style-name="T72">(Mash It!, 2026(c)). </text:span><text:span text:style-name="T75">Reviews would be held on GitHub </text:span><text:span text:style-name="T72">(Mash It!, 2026(</text:span><text:span text:style-name="T76">b</text:span><text:span text:style-name="T72">)), </text:span><text:span text:style-name="T75">and dailies would take the form of a short message being sent at the start of each day in our Teams group chat – </text:span><text:span text:style-name="T77">This allowed us to detect problems early and act on them.</text:span></text:p>
      <text:p text:style-name="P37"/>
      <text:p text:style-name="P36"/>
      <text:p text:style-name="P3">2. The Shadows of Vahlvadell</text:p>
      <text:p text:style-name="P39">2.1. Overview</text:p>
      <text:p text:style-name="P40">The Shadows of Vahlvadell is a Role-Playing <text:span text:style-name="T78">G</text:span>ame (RPG) <text:span text:style-name="T78">tit</text:span><text:span text:style-name="T79">le </text:span><text:span text:style-name="T80">lead by</text:span><text:span text:style-name="T79"> Aaron Stevens. </text:span><text:span text:style-name="T81">It is developed in Unreal Engine for </text:span><text:span text:style-name="T80">Windows and Linux. The project follows the Agile methodology. </text:span><text:span text:style-name="T82">During development, I fulfilled the role of a software developer.</text:span></text:p>
      <text:p text:style-name="P40"/>
      <text:p text:style-name="P41">2.2. Involvement</text:p>
      <text:p text:style-name="P42">2.2(a) Systems</text:p>
      <text:list text:style-name="L6">
        <text:list-item>
          <text:p text:style-name="P43">Given my previous experience with developing inventory systems for another project (Scattered Lands), I was assigned to the task of designing and implementing an inventory system <text:span text:style-name="T83">(The Shadows of Vahlvadell, 2026(a), #54) (The Shadows of Vahlvadell, 2026(a), #4</text:span><text:span text:style-name="T84">0</text:span><text:span text:style-name="T83">) (The Shadows of Vahlvadell, 2026(</text:span><text:span text:style-name="T85">b</text:span><text:span text:style-name="T83">), #61).</text:span></text:p>
        </text:list-item>
        <text:list-item>
          <text:p text:style-name="P44">Designed <text:span text:style-name="T86">and</text:span> developed a dynamic weather system <text:span text:style-name="T83">(The Shadows of Vahlvadell, 2026(a), #</text:span><text:span text:style-name="T87">3</text:span><text:span text:style-name="T83">) (The Shadows of Vahlvadell, 2026(</text:span><text:span text:style-name="T85">b</text:span><text:span text:style-name="T83">), #</text:span><text:span text:style-name="T88">31</text:span><text:span text:style-name="T83">) </text:span><text:span text:style-name="T89">(The Shadows of Vahlvadell, 2026(c)). </text:span><text:s/><text:span text:style-name="T86">Then, collaborated with Aaron on implementing it</text:span> <text:span text:style-name="T83">(The Shadows of Vahlvadell, 2026(a), #</text:span><text:span text:style-name="T90">40</text:span><text:span text:style-name="T83">).</text:span></text:p>
        </text:list-item>
        <text:list-item>
          <text:p text:style-name="P45">Collaborated on the design<text:span text:style-name="T48"> </text:span><text:span text:style-name="T91">(The Shadows of Vahlvadell, 2026(c))</text:span><text:span text:style-name="T48"> </text:span>and development of the combat system <text:span text:style-name="T92">(</text:span><text:span text:style-name="T83">The Shadows of Vahlvadell, 2026(a), #</text:span><text:span text:style-name="T92">45</text:span><text:span text:style-name="T83">) </text:span><text:span text:style-name="T92">(</text:span><text:span text:style-name="T83">The Shadows of Vahlvadell, 2026(a), #</text:span><text:span text:style-name="T92">27</text:span><text:span text:style-name="T83">) </text:span><text:span text:style-name="T92">(</text:span><text:span text:style-name="T83">The Shadows of Vahlvadell, 2026(a), #</text:span><text:span text:style-name="T92">16</text:span><text:span text:style-name="T83">) </text:span><text:span text:style-name="T92">(</text:span><text:span text:style-name="T83">The Shadows of Vahlvadell, 2026(a), #</text:span><text:span text:style-name="T92">26</text:span><text:span text:style-name="T83">) <text:s/>(The Shadows of Vahlvadell, 2026(a), #54) (The Shadows of Vahlvadell, 2026(</text:span><text:span text:style-name="T93">b</text:span><text:span text:style-name="T83">), #</text:span><text:span text:style-name="T93">46</text:span><text:span text:style-name="T83">) (The Shadows of Vahlvadell, 2026(</text:span><text:span text:style-name="T93">b</text:span><text:span text:style-name="T83">), #</text:span><text:span text:style-name="T93">47</text:span><text:span text:style-name="T83">) (The Shadows of Vahlvadell, 2026(</text:span><text:span text:style-name="T93">b</text:span><text:span text:style-name="T83">), #</text:span><text:span text:style-name="T93">48</text:span><text:span text:style-name="T83">) (The Shadows of Vahlvadell, 2026(</text:span><text:span text:style-name="T93">b</text:span><text:span text:style-name="T83">), #</text:span><text:span text:style-name="T94">49</text:span><text:span text:style-name="T83">).</text:span></text:p>
        </text:list-item>
      </text:list>
      <text:p text:style-name="P46"/>
      <text:p text:style-name="P47"/>
      <text:p text:style-name="P48">2. <text:span text:style-name="T95">Personal Website</text:span></text:p>
      <text:p text:style-name="P49">2.1. Overview</text:p>
      <text:p text:style-name="P50">This website is a solo projec<text:span text:style-name="T96">t</text:span>. It is a<text:span text:style-name="T97">n ever-evolving </text:span><text:span text:style-name="T98">website</text:span><text:span text:style-name="T99"> aimed at increasing my understanding and proficiency with web development. </text:span><text:span text:style-name="T100">It is built on Flask in Python, and runs on</text:span><text:span text:style-name="T101"> a raspberry pi computer, within a docker container. It uses a PostgreSQL database which is contained within a separate </text:span><text:span text:style-name="T102">docker container</text:span><text:span text:style-name="T101"> for security. </text:span><text:span text:style-name="T103">For additional layer of security, the incoming connections go through an NginX server. </text:span><text:span text:style-name="T104">So far, maintaining this project helped me gain understanding and experience in the following </text:span><text:span text:style-name="T105">(Personal RESTful API, 2026)</text:span><text:span text:style-name="T104">:</text:span></text:p>
      <text:list text:style-name="L7">
        <text:list-item>
          <text:p text:style-name="P51"><text:soft-page-break/>Mobile-first design </text:p>
          <text:list>
            <text:list-item>
              <text:p text:style-name="P52"><text:span text:style-name="T106">The website prioritises mobile devices. Design and layout would start from the mobile version, scaling up to desktop later on </text:span><text:span text:style-name="T107">as needed</text:span><text:span text:style-name="T106">. If a given feature didn’t work on mobile, it was rejected.</text:span></text:p>
            </text:list-item>
          </text:list>
        </text:list-item>
        <text:list-item>
          <text:p text:style-name="P51">Security by design</text:p>
          <text:list>
            <text:list-item>
              <text:p text:style-name="P53">Instead of relying on high-level security tools, security is ensured by the design. <text:span text:style-name="T108">The server itself is isolated within a docker container – This ensures that even if a malicious actor is able to execute code on my device, </text:span><text:span text:style-name="T109">they are unable to access any sensitive files stored within the device.</text:span></text:p>
            </text:list-item>
            <text:list-item>
              <text:p text:style-name="P54">Since the database may contain sensitive information such as logins and passwords, <text:span text:style-name="T110">it</text:span> is also isolated within a separate docker container. <text:span text:style-name="T111">Communication between the two containers occurs through randomised local ports.</text:span></text:p>
            </text:list-item>
          </text:list>
        </text:list-item>
      </text:list>
      <text:p text:style-name="P55"/>
      <text:p text:style-name="P56">2.2 Workflow</text:p>
      <text:p text:style-name="P57">Given that this is a solo project, no official framework was adopted during its development. I would simply work on it when I could make the time for it.</text:p>
      <text:p text:style-name="P58"/>
      <text:p text:style-name="P59">References:</text:p>
      <text:p text:style-name="P60"><text:span text:style-name="T112">Mash It!</text:span><text:span text:style-name="T112"> </text:span><text:span text:style-name="T113">(</text:span><text:span text:style-name="T114">Brewing Game</text:span><text:span text:style-name="T113">)</text:span><text:span text:style-name="T112"> </text:span><text:span text:style-name="T115">(2026a) </text:span><text:span text:style-name="T116">Kanban</text:span><text:span text:style-name="T115">. Available at: </text:span><text:a xlink:type="simple" xlink:href="https://github.com/orgs/Brewing-Game/projects/1" text:style-name="Internet_20_link" text:visited-style-name="Visited_20_Internet_20_Link"><text:span text:style-name="T115">https://github.com/orgs/Brewing-Game/projects/1</text:span></text:a><text:span text:style-name="T115"> (Accessed: 20 May 2026).</text:span></text:p>
      <text:p text:style-name="P61"><text:span text:style-name="T117">Mash It! </text:span><text:span text:style-name="T113">(</text:span><text:span text:style-name="T114">Brewing Game</text:span><text:span text:style-name="T113">)</text:span><text:span text:style-name="T118"> (2026b) </text:span><text:span text:style-name="T119">Pull Requests</text:span><text:span text:style-name="T118">. Available at: </text:span><text:a xlink:type="simple" xlink:href="https://github.com/Brewing-Game/brewing-game/pulls" text:style-name="Internet_20_link" text:visited-style-name="Visited_20_Internet_20_Link"><text:span text:style-name="T118">https://github.com/Brewing-Game/brewing-game/pulls</text:span></text:a><text:span text:style-name="T118"> (Accessed: 20 May 2026).</text:span></text:p>
      <text:p text:style-name="P62"><text:span text:style-name="T112">Mash It! </text:span><text:span text:style-name="T120">(Brewing Game)</text:span><text:span text:style-name="T115"> (2026c) </text:span><text:span text:style-name="T121">Project</text:span><text:span text:style-name="T116"> Board</text:span><text:span text:style-name="T115">. Available at: </text:span><text:a xlink:type="simple" xlink:href="https://app.mural.co/t/farmingsimulator9293/m/farmingsimulator9293/1762074910299/66ec2841ac6d7c3ddc9a248ef1a43dd3283119ff" text:style-name="Internet_20_link" text:visited-style-name="Visited_20_Internet_20_Link"><text:span text:style-name="T115">https://app.mural.co/t/farmingsimulator9293/m/farmingsimulator9293/1762074910299/66ec2841ac6d7c3ddc9a248ef1a43dd3283119ff</text:span></text:a><text:span text:style-name="T115"> (Accessed: 20 May 2026).</text:span></text:p>
      <text:p text:style-name="P63"><text:span text:style-name="T122">The </text:span><text:span text:style-name="T112">Shadows of Vahlvadell (Aaron Stevens)</text:span><text:span text:style-name="T115"> </text:span><text:span text:style-name="T123">(2026a) </text:span><text:span text:style-name="T124">Kanban</text:span><text:span text:style-name="T123">. Available at: </text:span><text:a xlink:type="simple" xlink:href="https://github.com/users/Strivion/projects/2/views/1" text:style-name="Internet_20_link" text:visited-style-name="Visited_20_Internet_20_Link"><text:span text:style-name="T123">https://github.com/users/Strivion/projects/2/views/1</text:span></text:a><text:span text:style-name="T123"> <text:s/>(Accessed: 20 May 2026).</text:span></text:p>
      <text:p text:style-name="P64"><text:span text:style-name="T122">The </text:span><text:span text:style-name="T112">Shadows of Vahlvadell (Aaron Stevens)</text:span><text:span text:style-name="T115"> (2026b) </text:span><text:span text:style-name="T116">Pull Requests</text:span><text:span text:style-name="T115">. Available at: </text:span><text:a xlink:type="simple" xlink:href="https://github.com/Strivion/Vahlvadell/pulls" text:style-name="Internet_20_link" text:visited-style-name="Visited_20_Internet_20_Link"><text:span text:style-name="T115">https://github.com/Strivion/Vahlvadell/pulls</text:span></text:a><text:span text:style-name="T115"> (Accessed: 20 May 2026).</text:span></text:p>
      <text:p text:style-name="P65"><text:span text:style-name="T122">The </text:span><text:span text:style-name="T112">Shadows of Vahlvadell </text:span><text:span text:style-name="T125">(Aaron Stevens)</text:span><text:span text:style-name="T112"> </text:span><text:span text:style-name="T115">(2026c) </text:span><text:span text:style-name="T116">Project Board</text:span><text:span text:style-name="T115">. Available at: 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115">https://app.mural.co/t/vahlvadell2492/m/vahlvadell2492/1764354812668/d19544649393d65be72b9d83c2dc84425e20fd06</text:span></text:a><text:span text:style-name="T115"> (Accessed: 20 May 2026).</text:span></text:p>
      <text:p text:style-name="P66"><text:span text:style-name="T112">Personal RESTful API (Ryboster)</text:span><text:span text:style-name="T115"> (2026) </text:span><text:span text:style-name="T116">Repository</text:span><text:span text:style-name="T115">. Available at: </text:span><text:a xlink:type="simple" xlink:href="https://github.com/Ryboster/Personal_RESTful_API" text:style-name="Internet_20_link" text:visited-style-name="Visited_20_Internet_20_Link"><text:span text:style-name="T115">https://github.com/Ryboster/Personal_RESTful_API</text:span></text:a><text:span text:style-name="T115"> (Accessed: 22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9:07:49.744865529</dc:date>
    <meta:editing-duration>P1DT22M35S</meta:editing-duration>
    <meta:editing-cycles>332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4" meta:word-count="1218" meta:character-count="8237" meta:non-whitespace-character-count="7082"/>
  </office:meta>
</office:document-meta>
</file>