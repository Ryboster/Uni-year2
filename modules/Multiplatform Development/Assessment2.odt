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460f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3be3f" officeooo:paragraph-rsid="00c3be3f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officeooo:rsid="00c55401"/>
    </style:style>
    <style:style style:name="T66" style:family="text">
      <style:text-properties officeooo:rsid="00c945a8"/>
    </style:style>
    <style:style style:name="T67" style:family="text">
      <style:text-properties officeooo:rsid="00c5460f"/>
    </style:style>
    <style:style style:name="T68" style:family="text">
      <style:text-properties officeooo:rsid="00c3be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Mash It! <text:span text:style-name="T65">(</text:span><text:span text:style-name="T66">Brewing Game</text:span><text:span text:style-name="T65">)</text:span> (2026a) Kanban. Available at: (Accessed: 20 May 2026)</text:p>
      <text:p text:style-name="P50"/>
      <text:p text:style-name="P51"><text:span text:style-name="T67">Mash It! </text:span><text:span text:style-name="T65">(</text:span><text:span text:style-name="T66">Brewing Game</text:span><text:span text:style-name="T65">)</text:span><text:span text:style-name="T67"> (2026b) Pull Requests. Available at: (Accessed: 20 May 2026)</text:span></text:p>
      <text:p text:style-name="P52"/>
      <text:p text:style-name="P53">Shadows of Vahlvadell (Aaron Stevens)</text:p>
      <text:p text:style-name="P54"/>
      <text:p text:style-name="P54"><text:s/></text:p>
      <text:p text:style-name="P49"/>
      <text:p text:style-name="P55">Mash It! Kanban (<text:span text:style-name="T68">2026</text:span>)</text:p>
      <text:p text:style-name="P56">Vahlvadell Kanban (2026)</text:p>
      <text:p text:style-name="P56">Vahlvadell Github (2026)</text:p>
      <text:p text:style-name="P56">Mash It! Github (2026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0:50.930988759</dc:date>
    <meta:editing-duration>PT21H56M59S</meta:editing-duration>
    <meta:editing-cycles>177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6" meta:word-count="721" meta:character-count="6850" meta:non-whitespace-character-count="6196"/>
  </office:meta>
</office:document-meta>
</file>