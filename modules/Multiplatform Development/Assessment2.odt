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b2d3ce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1" style:family="paragraph" style:parent-style-name="Text_20_body">
      <style:text-properties fo:font-size="13pt" fo:font-weight="normal" officeooo:rsid="014652f4" officeooo:paragraph-rsid="014652f4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c55401" style:font-weight-asian="bold" style:font-weight-complex="bold"/>
    </style:style>
    <style:style style:name="T93" style:family="text">
      <style:text-properties fo:font-weight="bold" officeooo:rsid="00c945a8" style:font-weight-asian="bold" style:font-weight-complex="bold"/>
    </style:style>
    <style:style style:name="T94" style:family="text">
      <style:text-properties fo:font-weight="bold" officeooo:rsid="00c5460f" style:font-weight-asian="bold" style:font-weight-complex="bold"/>
    </style:style>
    <style:style style:name="T95" style:family="text">
      <style:text-properties officeooo:rsid="00c5460f"/>
    </style:style>
    <style:style style:name="T96" style:family="text">
      <style:text-properties fo:font-style="italic" officeooo:rsid="00c5460f" style:font-style-asian="italic" style:font-style-complex="italic"/>
    </style:style>
    <style:style style:name="T97" style:family="text">
      <style:text-properties fo:font-weight="bold" officeooo:rsid="00d39f75" style:font-weight-asian="bold" style:font-weight-complex="bold"/>
    </style:style>
    <style:style style:name="T98" style:family="text">
      <style:text-properties fo:font-style="italic" officeooo:rsid="00dcbc28" style:font-style-asian="italic" style:font-style-complex="italic"/>
    </style:style>
    <style:style style:name="T99" style:family="text">
      <style:text-properties fo:font-weight="bold" officeooo:rsid="0128bc99" style:font-weight-asian="bold" style:font-weight-complex="bold"/>
    </style:style>
    <style:style style:name="T100" style:family="text">
      <style:text-properties officeooo:rsid="00cbbf6a"/>
    </style:style>
    <style:style style:name="T101" style:family="text">
      <style:text-properties fo:font-style="italic" officeooo:rsid="00cbbf6a" style:font-style-asian="italic" style:font-style-complex="italic"/>
    </style:style>
    <style:style style:name="T102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 </text:span></text:p>
        </text:list-item>
      </text:list>
      <text:p text:style-name="P44"/>
      <text:p text:style-name="P45"/>
      <text:p text:style-name="P36"/>
      <text:p text:style-name="P46">2. <text:span text:style-name="T90">Personal Website</text:span></text:p>
      <text:p text:style-name="P47">2.1. Overview</text:p>
      <text:p text:style-name="P48">This website is a solo project developed by myself for myself. It is a</text:p>
      <text:p text:style-name="P49"/>
      <text:p text:style-name="P49"/>
      <text:p text:style-name="P49"/>
      <text:p text:style-name="P50">4. Blazejowski.co.uk</text:p>
      <text:p text:style-name="P51"/>
      <text:p text:style-name="P52">mobile-first design,</text:p>
      <text:p text:style-name="P52">security by design,</text:p>
      <text:p text:style-name="P52"/>
      <text:p text:style-name="P52"><text:soft-page-break/></text:p>
      <text:p text:style-name="P53">References:</text:p>
      <text:p text:style-name="P54"/>
      <text:p text:style-name="P55"><text:span text:style-name="T91">Mash It!</text:span><text:span text:style-name="T91"> </text:span><text:span text:style-name="T92">(</text:span><text:span text:style-name="T93">Brewing Game</text:span><text:span text:style-name="T92">)</text:span><text:span text:style-name="T91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4">Mash It! </text:span><text:span text:style-name="T92">(</text:span><text:span text:style-name="T93">Brewing Game</text:span><text:span text:style-name="T92">)</text:span><text:span text:style-name="T95"> (2026b) </text:span><text:span text:style-name="T96">Pull Requests</text:span><text:span text:style-name="T95">. Available at: </text:span><text:a xlink:type="simple" xlink:href="https://github.com/Brewing-Game/brewing-game/pulls" text:style-name="Internet_20_link" text:visited-style-name="Visited_20_Internet_20_Link"><text:span text:style-name="T95">https://github.com/Brewing-Game/brewing-game/pulls</text:span></text:a><text:span text:style-name="T95"> (Accessed: 20 May 2026).</text:span></text:p>
      <text:p text:style-name="P57"><text:span text:style-name="T91">Mash It! </text:span><text:span text:style-name="T97">(Brewing Game)</text:span> (2026c) <text:span text:style-name="T98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99">The </text:span><text:span text:style-name="T91">Shadows of Vahlvadell (Aaron Stevens)</text:span> <text:span text:style-name="T100">(2026a) </text:span><text:span text:style-name="T101">Kanban</text:span><text:span text:style-name="T100">. Available at: </text:span><text:a xlink:type="simple" xlink:href="https://github.com/users/Strivion/projects/2/views/1" text:style-name="Internet_20_link" text:visited-style-name="Visited_20_Internet_20_Link"><text:span text:style-name="T100">https://github.com/users/Strivion/projects/2/views/1</text:span></text:a><text:span text:style-name="T100"> <text:s/>(Accessed: 20 May 2026).</text:span></text:p>
      <text:p text:style-name="P60"><text:span text:style-name="T99">The </text:span><text:span text:style-name="T91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99">The </text:span><text:span text:style-name="T91">Shadows of Vahlvadell </text:span><text:span text:style-name="T102">(Aaron Stevens)</text:span><text:span text:style-name="T91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63"><text:span text:style-name="T91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31:52.349745581</dc:date>
    <meta:editing-duration>PT22H47M3S</meta:editing-duration>
    <meta:editing-cycles>283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8" meta:word-count="926" meta:character-count="6478" meta:non-whitespace-character-count="5606"/>
  </office:meta>
</office:document-meta>
</file>