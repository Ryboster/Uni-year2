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3pt" fo:font-weight="normal" officeooo:rsid="014652f4" officeooo:paragraph-rsid="014652f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4d11ac"/>
    </style:style>
    <style:style style:name="T92" style:family="text">
      <style:text-properties officeooo:rsid="014ddaa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c55401" style:font-weight-asian="bold" style:font-weight-complex="bold"/>
    </style:style>
    <style:style style:name="T95" style:family="text">
      <style:text-properties fo:font-weight="bold" officeooo:rsid="00c945a8" style:font-weight-asian="bold" style:font-weight-complex="bold"/>
    </style:style>
    <style:style style:name="T96" style:family="text">
      <style:text-properties fo:font-weight="bold" officeooo:rsid="00c5460f" style:font-weight-asian="bold" style:font-weight-complex="bold"/>
    </style:style>
    <style:style style:name="T97" style:family="text">
      <style:text-properties officeooo:rsid="00c5460f"/>
    </style:style>
    <style:style style:name="T98" style:family="text">
      <style:text-properties fo:font-style="italic" officeooo:rsid="00c5460f" style:font-style-asian="italic" style:font-style-complex="italic"/>
    </style:style>
    <style:style style:name="T99" style:family="text">
      <style:text-properties fo:font-weight="bold" officeooo:rsid="00d39f75" style:font-weight-asian="bold" style:font-weight-complex="bold"/>
    </style:style>
    <style:style style:name="T100" style:family="text">
      <style:text-properties fo:font-style="italic" officeooo:rsid="00dcbc28" style:font-style-asian="italic" style:font-style-complex="italic"/>
    </style:style>
    <style:style style:name="T101" style:family="text">
      <style:text-properties fo:font-weight="bold" officeooo:rsid="0128bc99" style:font-weight-asian="bold" style:font-weight-complex="bold"/>
    </style:style>
    <style:style style:name="T102" style:family="text">
      <style:text-properties officeooo:rsid="00cbbf6a"/>
    </style:style>
    <style:style style:name="T103" style:family="text">
      <style:text-properties fo:font-style="italic" officeooo:rsid="00cbbf6a" style:font-style-asian="italic" style:font-style-complex="italic"/>
    </style:style>
    <style:style style:name="T104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.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t developed by myself for myself. It is a<text:span text:style-name="T91">n ever-evolving </text:span><text:span text:style-name="T92">project aimed at increasing my understanding and proficiency with web development</text:span></text:p>
      <text:p text:style-name="P46"/>
      <text:p text:style-name="P47">(Personal RESTful API, 2026)</text:p>
      <text:p text:style-name="P48"/>
      <text:p text:style-name="P48"/>
      <text:p text:style-name="P48"/>
      <text:p text:style-name="P49">4. Blazejowski.co.uk</text:p>
      <text:p text:style-name="P50"/>
      <text:p text:style-name="P51">mobile-first design,</text:p>
      <text:p text:style-name="P51">security by design,</text:p>
      <text:p text:style-name="P51"><text:soft-page-break/></text:p>
      <text:p text:style-name="P51"/>
      <text:p text:style-name="P52">References:</text:p>
      <text:p text:style-name="P53"/>
      <text:p text:style-name="P54"><text:span text:style-name="T93">Mash It!</text:span><text:span text:style-name="T93"> </text:span><text:span text:style-name="T94">(</text:span><text:span text:style-name="T95">Brewing Game</text:span><text:span text:style-name="T94">)</text:span><text:span text:style-name="T93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5"><text:span text:style-name="T96">Mash It! </text:span><text:span text:style-name="T94">(</text:span><text:span text:style-name="T95">Brewing Game</text:span><text:span text:style-name="T94">)</text:span><text:span text:style-name="T97"> (2026b) </text:span><text:span text:style-name="T98">Pull Requests</text:span><text:span text:style-name="T97">. Available at: </text:span><text:a xlink:type="simple" xlink:href="https://github.com/Brewing-Game/brewing-game/pulls" text:style-name="Internet_20_link" text:visited-style-name="Visited_20_Internet_20_Link"><text:span text:style-name="T97">https://github.com/Brewing-Game/brewing-game/pulls</text:span></text:a><text:span text:style-name="T97"> (Accessed: 20 May 2026).</text:span></text:p>
      <text:p text:style-name="P56"><text:span text:style-name="T93">Mash It! </text:span><text:span text:style-name="T99">(Brewing Game)</text:span> (2026c) <text:span text:style-name="T100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7"/>
      <text:p text:style-name="P58"><text:span text:style-name="T101">The </text:span><text:span text:style-name="T93">Shadows of Vahlvadell (Aaron Stevens)</text:span> <text:span text:style-name="T102">(2026a) </text:span><text:span text:style-name="T103">Kanban</text:span><text:span text:style-name="T102">. Available at: </text:span><text:a xlink:type="simple" xlink:href="https://github.com/users/Strivion/projects/2/views/1" text:style-name="Internet_20_link" text:visited-style-name="Visited_20_Internet_20_Link"><text:span text:style-name="T102">https://github.com/users/Strivion/projects/2/views/1</text:span></text:a><text:span text:style-name="T102"> <text:s/>(Accessed: 20 May 2026).</text:span></text:p>
      <text:p text:style-name="P59"><text:span text:style-name="T101">The </text:span><text:span text:style-name="T93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0"><text:span text:style-name="T101">The </text:span><text:span text:style-name="T93">Shadows of Vahlvadell </text:span><text:span text:style-name="T104">(Aaron Stevens)</text:span><text:span text:style-name="T93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1"/>
      <text:p text:style-name="P62"><text:span text:style-name="T93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50:47.570235190</dc:date>
    <meta:editing-duration>PT23H5M55S</meta:editing-duration>
    <meta:editing-cycles>288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9" meta:word-count="942" meta:character-count="6603" meta:non-whitespace-character-count="5717"/>
  </office:meta>
</office:document-meta>
</file>