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9a7b88"/>
    </style:style>
    <style:style style:name="T37" style:family="text">
      <style:text-properties officeooo:rsid="009fff75"/>
    </style:style>
    <style:style style:name="T38" style:family="text">
      <style:text-properties officeooo:rsid="009acea7"/>
    </style:style>
    <style:style style:name="T39" style:family="text">
      <style:text-properties officeooo:rsid="009bb78c"/>
    </style:style>
    <style:style style:name="T40" style:family="text">
      <style:text-properties officeooo:rsid="004756e2"/>
    </style:style>
    <style:style style:name="T41" style:family="text">
      <style:text-properties officeooo:rsid="0028b6fb"/>
    </style:style>
    <style:style style:name="T42" style:family="text">
      <style:text-properties officeooo:rsid="00292dc4"/>
    </style:style>
    <style:style style:name="T43" style:family="text">
      <style:text-properties officeooo:rsid="0034b93b"/>
    </style:style>
    <style:style style:name="T44" style:family="text">
      <style:text-properties officeooo:rsid="002ec9e2"/>
    </style:style>
    <style:style style:name="T45" style:family="text">
      <style:text-properties officeooo:rsid="0034bc00"/>
    </style:style>
    <style:style style:name="T46" style:family="text">
      <style:text-properties officeooo:rsid="003f25fd"/>
    </style:style>
    <style:style style:name="T47" style:family="text">
      <style:text-properties officeooo:rsid="002d47dc"/>
    </style:style>
    <style:style style:name="T48" style:family="text">
      <style:text-properties officeooo:rsid="00371c2c"/>
    </style:style>
    <style:style style:name="T49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</text:span></text:p>
        </text:list-item>
        <text:list-item>
          <text:p text:style-name="P28">Coding <text:span text:style-name="T36">b</text:span>est <text:span text:style-name="T36">p</text:span>ractices – <text:span text:style-name="T37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7">https://github.com/Brewing-Game/brewing-game/blob/dev/Documentation/coding_practices.md</text:span></text:a><text:span text:style-name="T37">) ()</text:span></text:p>
        </text:list-item>
        <text:list-item>
          <text:p text:style-name="P28">Directory <text:span text:style-name="T36">s</text:span>tructure <text:span text:style-name="T36">c</text:span>onvention – <text:span text:style-name="T38">This document outlines </text:span><text:span text:style-name="T39">file storage constraints; what goes where. </text:span></text:p>
        </text:list-item>
        <text:list-item>
          <text:p text:style-name="P29">Pull request (PR) documentation. This document outlines the rules </text:p>
        </text:list-item>
        <text:list-item>
          <text:p text:style-name="P29"/>
        </text:list-item>
      </text:list>
      <text:p text:style-name="P13">1.2(f). <text:span text:style-name="T40">Design</text:span></text:p>
      <text:p text:style-name="P30"/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41">G</text:span>ame (RPG) <text:span text:style-name="T41">tit</text:span><text:span text:style-name="T42">le </text:span><text:span text:style-name="T43">lead by</text:span><text:span text:style-name="T42"> Aaron Stevens. </text:span><text:span text:style-name="T44">It is developed in Unreal Engine for </text:span><text:span text:style-name="T43">Windows and Linux. The project follows the Agile methodology. </text:span><text:span text:style-name="T45">During development, I fulfilled the role of a software developer.</text:span></text:p>
      <text:p text:style-name="P33"/>
      <text:p text:style-name="P34">2.2. Involvement</text:p>
      <text:p text:style-name="P35"><text:span text:style-name="T46">2</text:span>.2(a). Inventory System</text:p>
      <text:p text:style-name="P35"><text:span text:style-name="T46">2</text:span>.2(b). Weather System</text:p>
      <text:p text:style-name="P35"><text:span text:style-name="T46">2</text:span>.2(c). Combat System</text:p>
      <text:p text:style-name="P36"/>
      <text:p text:style-name="P31"/>
      <text:p text:style-name="P31">3. MauiScreenTime</text:p>
      <text:p text:style-name="P37"/>
      <text:p text:style-name="P38"><text:span text:style-name="T47">3</text:span>.1. Overview</text:p>
      <text:p text:style-name="P39"><text:soft-page-break/>“MauiScreenTime” is a mobile application for <text:span text:style-name="T48">A</text:span>ndroid and IOS. <text:span text:style-name="T49">It follows the Agile methodology. </text:span><text:span text:style-name="T48">Although my involvement with it was brief, during its development I fulfilled the role of a software developer.</text:span></text:p>
      <text:p text:style-name="P39"/>
      <text:p text:style-name="P34">3.2. Involvement</text:p>
      <text:p text:style-name="P40"/>
      <text:p text:style-name="P41">3.2(a). </text:p>
      <text:p text:style-name="P31"/>
      <text:p text:style-name="P31"/>
      <text:p text:style-name="P31"/>
      <text:p text:style-name="P42">4. Blazejowski.co.uk</text:p>
      <text:p text:style-name="P43">mobile-first design,</text:p>
      <text:p text:style-name="P43">security by design,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3:14:57.777531778</dc:date>
    <meta:editing-duration>PT18H31M25S</meta:editing-duration>
    <meta:editing-cycles>137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1" meta:word-count="575" meta:character-count="4937" meta:non-whitespace-character-count="4417"/>
  </office:meta>
</office:document-meta>
</file>