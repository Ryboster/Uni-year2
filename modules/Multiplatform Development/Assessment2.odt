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6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0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5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officeooo:rsid="00ee2ea4"/>
    </style:style>
    <style:style style:name="T20" style:family="text">
      <style:text-properties fo:font-style="italic" officeooo:rsid="00eaec27" style:font-style-asian="italic" style:font-style-complex="italic"/>
    </style:style>
    <style:style style:name="T21" style:family="text">
      <style:text-properties fo:font-style="italic" officeooo:rsid="00e76afe" style:font-style-asian="italic" style:font-style-complex="italic"/>
    </style:style>
    <style:style style:name="T22" style:family="text">
      <style:text-properties fo:font-style="italic" officeooo:rsid="00e93749" style:font-style-asian="italic" style:font-style-complex="italic"/>
    </style:style>
    <style:style style:name="T23" style:family="text">
      <style:text-properties fo:font-style="italic" officeooo:rsid="00ed30b1" style:font-style-asian="italic" style:font-style-complex="italic"/>
    </style:style>
    <style:style style:name="T24" style:family="text">
      <style:text-properties fo:font-style="italic" officeooo:rsid="00ec9b7b" style:font-style-asian="italic" style:font-style-complex="italic"/>
    </style:style>
    <style:style style:name="T25" style:family="text">
      <style:text-properties officeooo:rsid="00464452"/>
    </style:style>
    <style:style style:name="T26" style:family="text">
      <style:text-properties officeooo:rsid="006c29f7"/>
    </style:style>
    <style:style style:name="T27" style:family="text">
      <style:text-properties fo:font-style="italic" officeooo:rsid="00f19e45" style:font-style-asian="italic" style:font-style-complex="italic"/>
    </style:style>
    <style:style style:name="T28" style:family="text">
      <style:text-properties fo:font-style="italic" officeooo:rsid="00f6a56e" style:font-style-asian="italic" style:font-style-complex="italic"/>
    </style:style>
    <style:style style:name="T29" style:family="text">
      <style:text-properties fo:font-style="italic" officeooo:rsid="0117247f" style:font-style-asian="italic" style:font-style-complex="italic"/>
    </style:style>
    <style:style style:name="T30" style:family="text">
      <style:text-properties fo:font-style="italic" officeooo:rsid="00f83ec6" style:font-style-asian="italic" style:font-style-complex="italic"/>
    </style:style>
    <style:style style:name="T31" style:family="text">
      <style:text-properties officeooo:rsid="0043dd38"/>
    </style:style>
    <style:style style:name="T32" style:family="text">
      <style:text-properties officeooo:rsid="007bf3b9"/>
    </style:style>
    <style:style style:name="T33" style:family="text">
      <style:text-properties fo:font-style="italic" officeooo:rsid="0116d66f" style:font-style-asian="italic" style:font-style-complex="italic"/>
    </style:style>
    <style:style style:name="T34" style:family="text">
      <style:text-properties fo:font-style="italic" officeooo:rsid="00fae425" style:font-style-asian="italic" style:font-style-complex="italic"/>
    </style:style>
    <style:style style:name="T35" style:family="text">
      <style:text-properties fo:font-style="italic" officeooo:rsid="00fcba0b" style:font-style-asian="italic" style:font-style-complex="italic"/>
    </style:style>
    <style:style style:name="T36" style:family="text">
      <style:text-properties officeooo:rsid="00808e5a"/>
    </style:style>
    <style:style style:name="T37" style:family="text">
      <style:text-properties fo:font-style="italic" officeooo:rsid="0115b99d" style:font-style-asian="italic" style:font-style-complex="italic"/>
    </style:style>
    <style:style style:name="T38" style:family="text">
      <style:text-properties fo:font-style="italic" officeooo:rsid="00fe1d36" style:font-style-asian="italic" style:font-style-complex="italic"/>
    </style:style>
    <style:style style:name="T39" style:family="text">
      <style:text-properties fo:font-style="italic" officeooo:rsid="0115b49e" style:font-style-asian="italic" style:font-style-complex="italic"/>
    </style:style>
    <style:style style:name="T40" style:family="text">
      <style:text-properties fo:font-style="italic" officeooo:rsid="010119a6" style:font-style-asian="italic" style:font-style-complex="italic"/>
    </style:style>
    <style:style style:name="T41" style:family="text">
      <style:text-properties fo:font-style="italic" officeooo:rsid="01146057" style:font-style-asian="italic" style:font-style-complex="italic"/>
    </style:style>
    <style:style style:name="T42" style:family="text">
      <style:text-properties fo:font-style="italic" officeooo:rsid="01026bcf" style:font-style-asian="italic" style:font-style-complex="italic"/>
    </style:style>
    <style:style style:name="T43" style:family="text">
      <style:text-properties fo:font-style="italic" officeooo:rsid="0103cb69" style:font-style-asian="italic" style:font-style-complex="italic"/>
    </style:style>
    <style:style style:name="T44" style:family="text">
      <style:text-properties fo:font-style="italic" officeooo:rsid="01070669" style:font-style-asian="italic" style:font-style-complex="italic"/>
    </style:style>
    <style:style style:name="T45" style:family="text">
      <style:text-properties fo:font-style="italic" officeooo:rsid="0107c331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4756e2" style:font-style-asian="italic" style:font-style-complex="italic"/>
    </style:style>
    <style:style style:name="T48" style:family="text">
      <style:text-properties officeooo:rsid="009834f9"/>
    </style:style>
    <style:style style:name="T49" style:family="text">
      <style:text-properties officeooo:rsid="009460b7"/>
    </style:style>
    <style:style style:name="T50" style:family="text">
      <style:text-properties officeooo:rsid="0098c8f8"/>
    </style:style>
    <style:style style:name="T51" style:family="text">
      <style:text-properties officeooo:rsid="009a3d00"/>
    </style:style>
    <style:style style:name="T52" style:family="text">
      <style:text-properties fo:font-style="italic" officeooo:rsid="01133da3" style:font-style-asian="italic" style:font-style-complex="italic"/>
    </style:style>
    <style:style style:name="T53" style:family="text">
      <style:text-properties fo:font-style="italic" officeooo:rsid="010d25e0" style:font-style-asian="italic" style:font-style-complex="italic"/>
    </style:style>
    <style:style style:name="T54" style:family="text">
      <style:text-properties officeooo:rsid="009a7b88"/>
    </style:style>
    <style:style style:name="T55" style:family="text">
      <style:text-properties officeooo:rsid="009fff75"/>
    </style:style>
    <style:style style:name="T56" style:family="text">
      <style:text-properties fo:font-style="italic" officeooo:rsid="01132b80" style:font-style-asian="italic" style:font-style-complex="italic"/>
    </style:style>
    <style:style style:name="T57" style:family="text">
      <style:text-properties fo:font-style="italic" officeooo:rsid="010d5d31" style:font-style-asian="italic" style:font-style-complex="italic"/>
    </style:style>
    <style:style style:name="T58" style:family="text">
      <style:text-properties officeooo:rsid="009acea7"/>
    </style:style>
    <style:style style:name="T59" style:family="text">
      <style:text-properties officeooo:rsid="009bb78c"/>
    </style:style>
    <style:style style:name="T60" style:family="text">
      <style:text-properties fo:font-style="italic" officeooo:rsid="0111d270" style:font-style-asian="italic" style:font-style-complex="italic"/>
    </style:style>
    <style:style style:name="T61" style:family="text">
      <style:text-properties fo:font-style="italic" officeooo:rsid="010ff6a5" style:font-style-asian="italic" style:font-style-complex="italic"/>
    </style:style>
    <style:style style:name="T62" style:family="text">
      <style:text-properties fo:font-style="italic" officeooo:rsid="011174db" style:font-style-asian="italic" style:font-style-complex="italic"/>
    </style:style>
    <style:style style:name="T63" style:family="text">
      <style:text-properties officeooo:rsid="00aca96f"/>
    </style:style>
    <style:style style:name="T64" style:family="text">
      <style:text-properties officeooo:rsid="00a9e1df"/>
    </style:style>
    <style:style style:name="T65" style:family="text">
      <style:text-properties officeooo:rsid="00adf5f8"/>
    </style:style>
    <style:style style:name="T66" style:family="text">
      <style:text-properties officeooo:rsid="00ae3ed0"/>
    </style:style>
    <style:style style:name="T67" style:family="text">
      <style:text-properties officeooo:rsid="00a9ff1a"/>
    </style:style>
    <style:style style:name="T68" style:family="text">
      <style:text-properties officeooo:rsid="00aacec0"/>
    </style:style>
    <style:style style:name="T69" style:family="text">
      <style:text-properties officeooo:rsid="004756e2"/>
    </style:style>
    <style:style style:name="T70" style:family="text">
      <style:text-properties officeooo:rsid="0028b6fb"/>
    </style:style>
    <style:style style:name="T71" style:family="text">
      <style:text-properties officeooo:rsid="00292dc4"/>
    </style:style>
    <style:style style:name="T72" style:family="text">
      <style:text-properties officeooo:rsid="0034b93b"/>
    </style:style>
    <style:style style:name="T73" style:family="text">
      <style:text-properties officeooo:rsid="002ec9e2"/>
    </style:style>
    <style:style style:name="T74" style:family="text">
      <style:text-properties officeooo:rsid="0034bc00"/>
    </style:style>
    <style:style style:name="T75" style:family="text">
      <style:text-properties officeooo:rsid="00bbe00c"/>
    </style:style>
    <style:style style:name="T76" style:family="text">
      <style:text-properties officeooo:rsid="00b77cae"/>
    </style:style>
    <style:style style:name="T77" style:family="text">
      <style:text-properties officeooo:rsid="00b8b638"/>
    </style:style>
    <style:style style:name="T78" style:family="text">
      <style:text-properties officeooo:rsid="00ba36a9"/>
    </style:style>
    <style:style style:name="T79" style:family="text">
      <style:text-properties officeooo:rsid="00c1e35c"/>
    </style:style>
    <style:style style:name="T80" style:family="text">
      <style:text-properties officeooo:rsid="003f25fd"/>
    </style:style>
    <style:style style:name="T81" style:family="text">
      <style:text-properties officeooo:rsid="002d47dc"/>
    </style:style>
    <style:style style:name="T82" style:family="text">
      <style:text-properties officeooo:rsid="00371c2c"/>
    </style:style>
    <style:style style:name="T83" style:family="text">
      <style:text-properties officeooo:rsid="003a16a5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c55401" style:font-weight-asian="bold" style:font-weight-complex="bold"/>
    </style:style>
    <style:style style:name="T86" style:family="text">
      <style:text-properties fo:font-weight="bold" officeooo:rsid="00c945a8" style:font-weight-asian="bold" style:font-weight-complex="bold"/>
    </style:style>
    <style:style style:name="T87" style:family="text">
      <style:text-properties fo:font-weight="bold" officeooo:rsid="00c5460f" style:font-weight-asian="bold" style:font-weight-complex="bold"/>
    </style:style>
    <style:style style:name="T88" style:family="text">
      <style:text-properties officeooo:rsid="00c5460f"/>
    </style:style>
    <style:style style:name="T89" style:family="text">
      <style:text-properties fo:font-style="italic" officeooo:rsid="00c5460f" style:font-style-asian="italic" style:font-style-complex="italic"/>
    </style:style>
    <style:style style:name="T90" style:family="text">
      <style:text-properties fo:font-weight="bold" officeooo:rsid="00d39f75" style:font-weight-asian="bold" style:font-weight-complex="bold"/>
    </style:style>
    <style:style style:name="T91" style:family="text">
      <style:text-properties fo:font-style="italic" officeooo:rsid="00dcbc28" style:font-style-asian="italic" style:font-style-complex="italic"/>
    </style:style>
    <style:style style:name="T92" style:family="text">
      <style:text-properties officeooo:rsid="00cbbf6a"/>
    </style:style>
    <style:style style:name="T93" style:family="text">
      <style:text-properties fo:font-style="italic" officeooo:rsid="00cbbf6a" style:font-style-asian="italic" style:font-style-complex="italic"/>
    </style:style>
    <style:style style:name="T94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T19) (Mash It!, 2026(b), PR27).</text:span></text:p>
        </text:list-item>
        <text:list-item>
          <text:p text:style-name="P11">Development and implement<text:span text:style-name="T19">ed</text:span> of the settings menu <text:span text:style-name="T18">(Mash It!, 2026(</text:span><text:span text:style-name="T20">b</text:span><text:span text:style-name="T18">), </text:span><text:span text:style-name="T20">PR</text:span><text:span text:style-name="T21">67</text:span><text:span text:style-name="T18">) (Mash It!, 2026(</text:span><text:span text:style-name="T20">a</text:span><text:span text:style-name="T18">), T</text:span><text:span text:style-name="T21">51</text:span><text:span text:style-name="T18">) (Mash It!, 2026(</text:span><text:span text:style-name="T20">a</text:span><text:span text:style-name="T18">), </text:span><text:span text:style-name="T20">T</text:span><text:span text:style-name="T22">54</text:span><text:span text:style-name="T18">) (Mash It!, 2026(</text:span><text:span text:style-name="T23">a</text:span><text:span text:style-name="T18">), </text:span><text:span text:style-name="T24">T</text:span><text:span text:style-name="T22">49</text:span><text:span text:style-name="T18">).</text:span></text:p>
        </text:list-item>
      </text:list>
      <text:p text:style-name="P12"/>
      <text:p text:style-name="P13">1.2(b). <text:span text:style-name="T25">Accessibility</text:span></text:p>
      <text:p text:style-name="P14">This game puts emphasis on accessibility. As developers, we wanted the game to be accessible to as many people as possible. Give<text:span text:style-name="T26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7">b</text:span><text:span text:style-name="T18">), </text:span><text:span text:style-name="T27">PR44</text:span><text:span text:style-name="T18">) (Mash It!, 2026(</text:span><text:span text:style-name="T27">a</text:span><text:span text:style-name="T18">), </text:span><text:span text:style-name="T27">T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8">T73</text:span><text:span text:style-name="T18">) (Mash It!, 2026(b), PR</text:span><text:span text:style-name="T28">85</text:span><text:span text:style-name="T18">) (Mash It!, 2026(</text:span><text:span text:style-name="T28">b</text:span><text:span text:style-name="T18">), </text:span><text:span text:style-name="T28">PR89</text:span><text:span text:style-name="T18">) (Mash It!, 2026(</text:span><text:span text:style-name="T28">a</text:span><text:span text:style-name="T18">), </text:span><text:span text:style-name="T28">T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29">#</text:span><text:span text:style-name="T30">63</text:span><text:span text:style-name="T18">) (Mash It!, 2026(b), </text:span><text:span text:style-name="T29">#</text:span><text:span text:style-name="T30">64</text:span><text:span text:style-name="T18">).</text:span> </text:p>
        </text:list-item>
      </text:list>
      <text:p text:style-name="P19"/>
      <text:p text:style-name="P13"><text:soft-page-break/>1.2(c). <text:span text:style-name="T31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2">I patched it. </text:span><text:span text:style-name="T18">(Mash It!, 2026(a), </text:span><text:span text:style-name="T33">#</text:span><text:span text:style-name="T34">91</text:span><text:span text:style-name="T18">) (Mash It!, 2026(b), </text:span><text:span text:style-name="T33">#</text:span><text:span text:style-name="T35">93</text:span><text:span text:style-name="T18">).</text:span></text:p>
          <text:p text:style-name="P22"/>
        </text:list-item>
      </text:list>
      <text:p text:style-name="P13">1.2(d). <text:span text:style-name="T31">U</text:span><text:span text:style-name="T36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7">#</text:span><text:span text:style-name="T38">52</text:span><text:span text:style-name="T18">) (Mash It!, 2026(b), </text:span><text:span text:style-name="T37">#</text:span><text:span text:style-name="T38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39">#</text:span><text:span text:style-name="T40">83</text:span><text:span text:style-name="T18">) <text:s/>(Mash It!, 2026(a), </text:span><text:span text:style-name="T41">#</text:span><text:span text:style-name="T42">82</text:span><text:span text:style-name="T18">) (Mash It!, 2026(b), </text:span><text:span text:style-name="T41">#</text:span><text:span text:style-name="T43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1">#</text:span><text:span text:style-name="T44">51</text:span><text:span text:style-name="T18">) (Mash It!, 2026(b), </text:span><text:span text:style-name="T41">#</text:span><text:span text:style-name="T45">50</text:span><text:span text:style-name="T18">).</text:span> </text:p>
        </text:list-item>
      </text:list>
      <text:p text:style-name="P27"><text:s/></text:p>
      <text:p text:style-name="P28"><text:span text:style-name="T46">1.2(e). </text:span><text:span text:style-name="T47">Documentation</text:span></text:p>
      <text:p text:style-name="P29">Development is not just about writing effective code. A big part of development is definition and effective application of <text:span text:style-name="T48">organisational</text:span> guidelines. <text:span text:style-name="T49">Our team understood it well </text:span><text:span text:style-name="T50">since</text:span><text:span text:style-name="T49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1">this document answers the “what?” and “why?” with respect to the various design choices </text:span><text:span text:style-name="T18">(Mash It!, 2026(a), </text:span><text:span text:style-name="T52">#</text:span><text:span text:style-name="T53">3</text:span><text:span text:style-name="T18">) (Mash It!, 2026(b), </text:span><text:span text:style-name="T52">#</text:span><text:span text:style-name="T53">12</text:span><text:span text:style-name="T18">).</text:span><text:span text:style-name="T51"> </text:span></text:p>
        </text:list-item>
        <text:list-item>
          <text:p text:style-name="P31">Coding <text:span text:style-name="T54">b</text:span>est <text:span text:style-name="T54">p</text:span>ractices – <text:span text:style-name="T55">This document describes the exact syntax to be used when writing code. It takes into consideration casing, units, abbreviations, style, comments, etc. </text:span><text:span text:style-name="T18">(Mash It!, 2026(a), </text:span><text:span text:style-name="T56">#</text:span><text:span text:style-name="T18">1) (Mash It!, 2026(b), </text:span><text:span text:style-name="T56">#</text:span><text:span text:style-name="T57">10</text:span><text:span text:style-name="T18">).</text:span></text:p>
        </text:list-item>
        <text:list-item>
          <text:p text:style-name="P32">Directory <text:span text:style-name="T54">s</text:span>tructure <text:span text:style-name="T54">c</text:span>onvention – <text:span text:style-name="T58">This document outlines </text:span><text:span text:style-name="T59">file storage constraints; what goes where. </text:span><text:span text:style-name="T18">(Mash It!, 2026(a), </text:span><text:span text:style-name="T60">#</text:span><text:span text:style-name="T61">2</text:span><text:span text:style-name="T18">) (Mash It!, 2026(b), </text:span><text:span text:style-name="T60">#</text:span><text:span text:style-name="T62">11</text:span><text:span text:style-name="T18">). </text:span></text:p>
        </text:list-item>
        <text:list-item>
          <text:p text:style-name="P33">Pull request (PR) documentation. This document outlines <text:span text:style-name="T63">the acceptable conduct within the GitHub workflow</text:span><text:span text:style-name="T64">. </text:span><text:span text:style-name="T65">It ensures tha</text:span><text:span text:style-name="T66">t programmers understand </text:span><text:span text:style-name="T64"><text:s/></text:span><text:span text:style-name="T67">(</text:span><text:a xlink:type="simple" xlink:href="https://github.com/Brewing-Game/brewing-game/blob/dev/Documentation/github_workflow.md" text:style-name="Internet_20_link" text:visited-style-name="Visited_20_Internet_20_Link"><text:span text:style-name="T67">https://github.com/Brewing-Game/brewing-game/blob/dev/Documentation/github_workflow.md</text:span></text:a><text:span text:style-name="T67">) </text:span><text:span text:style-name="T68">(</text:span><text:a xlink:type="simple" xlink:href="https://github.com/Brewing-Game/brewing-game/issues/9" text:style-name="Internet_20_link" text:visited-style-name="Visited_20_Internet_20_Link"><text:span text:style-name="T68">https://github.com/Brewing-Game/brewing-game/issues/9</text:span></text:a><text:span text:style-name="T68">)</text:span></text:p>
        </text:list-item>
        <text:list-item>
          <text:p text:style-name="P33"/>
        </text:list-item>
      </text:list>
      <text:p text:style-name="P13">1.2(f). <text:span text:style-name="T69">Design</text:span></text:p>
      <text:p text:style-name="P34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5"><text:soft-page-break/></text:p>
      <text:p text:style-name="P3">2. The Shadows of Vahlvadell</text:p>
      <text:p text:style-name="P36">2.1. Overview</text:p>
      <text:p text:style-name="P37">The Shadows of Vahlvadell is a Role-Playing <text:span text:style-name="T70">G</text:span>ame (RPG) <text:span text:style-name="T70">tit</text:span><text:span text:style-name="T71">le </text:span><text:span text:style-name="T72">lead by</text:span><text:span text:style-name="T71"> Aaron Stevens. </text:span><text:span text:style-name="T73">It is developed in Unreal Engine for </text:span><text:span text:style-name="T72">Windows and Linux. The project follows the Agile methodology. </text:span><text:span text:style-name="T74">During development, I fulfilled the role of a software developer.</text:span></text:p>
      <text:p text:style-name="P37"/>
      <text:p text:style-name="P38">2.2. Involvement</text:p>
      <text:p text:style-name="P39">2.2(a) Systems</text:p>
      <text:list text:style-name="L6">
        <text:list-item>
          <text:p text:style-name="P40">Given my previous experience with developing inventory systems for another project (Scattered Lands), I was assigned to the task of designing and implementing an inventory 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41">Designed <text:span text:style-name="T75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76">(</text:span><text:a xlink:type="simple" xlink:href="https://github.com/Strivion/Vahlvadell/pull/31" text:style-name="Internet_20_link" text:visited-style-name="Visited_20_Internet_20_Link"><text:span text:style-name="T76">https://github.com/Strivion/Vahlvadell/pull/31</text:span></text:a><text:span text:style-name="T76">) </text:span><text:span text:style-name="T77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77">https://app.mural.co/t/vahlvadell2492/m/vahlvadell2492/1764354812668/d19544649393d65be72b9d83c2dc84425e20fd06</text:span></text:a><text:span text:style-name="T77">)</text:span>. <text:span text:style-name="T75">Then, collaborated with Aaron on implementing it</text:span> <text:span text:style-name="T77"><text:s/></text:span><text:span text:style-name="T78">(</text:span><text:a xlink:type="simple" xlink:href="https://github.com/Strivion/Vahlvadell/issues/40" text:style-name="Internet_20_link" text:visited-style-name="Visited_20_Internet_20_Link"><text:span text:style-name="T78">https://github.com/Strivion/Vahlvadell/issues/40</text:span></text:a><text:span text:style-name="T78">) </text:span></text:p>
        </text:list-item>
        <text:list-item>
          <text:p text:style-name="P42">Collaborated on the design <text:span text:style-name="T79">()</text:span> and development of the combat system ()</text:p>
        </text:list-item>
      </text:list>
      <text:p text:style-name="P43"><text:span text:style-name="T80">2</text:span>.2(a). Inventory System</text:p>
      <text:p text:style-name="P39"><text:s/></text:p>
      <text:p text:style-name="P39"/>
      <text:p text:style-name="P43"><text:span text:style-name="T80">2</text:span>.2(b). Weather System</text:p>
      <text:p text:style-name="P43"><text:span text:style-name="T80">2</text:span>.2(c). Combat System</text:p>
      <text:p text:style-name="P44"/>
      <text:p text:style-name="P35"/>
      <text:p text:style-name="P35">3. MauiScreenTime</text:p>
      <text:p text:style-name="P45"/>
      <text:p text:style-name="P46"><text:span text:style-name="T81">3</text:span>.1. Overview</text:p>
      <text:p text:style-name="P47">“MauiScreenTime” is a mobile application for <text:span text:style-name="T82">A</text:span>ndroid and IOS. <text:span text:style-name="T83">It follows the Agile methodology. </text:span><text:span text:style-name="T82">Although my involvement with it was brief, during its development I fulfilled the role of a software developer.</text:span></text:p>
      <text:p text:style-name="P47"/>
      <text:p text:style-name="P38">3.2. Involvement</text:p>
      <text:p text:style-name="P48"><text:soft-page-break/></text:p>
      <text:p text:style-name="P49">3.2(a). </text:p>
      <text:p text:style-name="P35"/>
      <text:p text:style-name="P35"/>
      <text:p text:style-name="P35"/>
      <text:p text:style-name="P50">4. Blazejowski.co.uk</text:p>
      <text:p text:style-name="P51">mobile-first design,</text:p>
      <text:p text:style-name="P51">security by design,</text:p>
      <text:p text:style-name="P51"/>
      <text:p text:style-name="P51"/>
      <text:p text:style-name="P52">References:</text:p>
      <text:p text:style-name="P53"/>
      <text:p text:style-name="P54"><text:span text:style-name="T84">Mash It!</text:span><text:span text:style-name="T84"> </text:span><text:span text:style-name="T85">(</text:span><text:span text:style-name="T86">Brewing Game</text:span><text:span text:style-name="T85">)</text:span><text:span text:style-name="T84"> </text:span>(2026a) <text:span text:style-name="T46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5"><text:span text:style-name="T87">Mash It! </text:span><text:span text:style-name="T85">(</text:span><text:span text:style-name="T86">Brewing Game</text:span><text:span text:style-name="T85">)</text:span><text:span text:style-name="T88"> (2026b) </text:span><text:span text:style-name="T89">Pull Requests</text:span><text:span text:style-name="T88">. Available at: </text:span><text:a xlink:type="simple" xlink:href="https://github.com/Brewing-Game/brewing-game/pulls" text:style-name="Internet_20_link" text:visited-style-name="Visited_20_Internet_20_Link"><text:span text:style-name="T88">https://github.com/Brewing-Game/brewing-game/pulls</text:span></text:a><text:span text:style-name="T88"> (Accessed: 20 May 2026).</text:span></text:p>
      <text:p text:style-name="P56"><text:span text:style-name="T84">Mash It! </text:span><text:span text:style-name="T90">(Brewing Game)</text:span> (2026c) <text:span text:style-name="T91">Project</text:span><text:span text:style-name="T46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7"/>
      <text:p text:style-name="P58"><text:span text:style-name="T84">Shadows of Vahlvadell (Aaron Stevens)</text:span> <text:span text:style-name="T92">(2026a) </text:span><text:span text:style-name="T93">Kanban</text:span><text:span text:style-name="T92">. Available at: </text:span><text:a xlink:type="simple" xlink:href="https://github.com/users/Strivion/projects/2/views/1" text:style-name="Internet_20_link" text:visited-style-name="Visited_20_Internet_20_Link"><text:span text:style-name="T92">https://github.com/users/Strivion/projects/2/views/1</text:span></text:a><text:span text:style-name="T92"> <text:s/>(Accessed: 20 May 2026).</text:span></text:p>
      <text:p text:style-name="P59"><text:span text:style-name="T84">Shadows of Vahlvadell (Aaron Stevens)</text:span> (2026b) <text:span text:style-name="T46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0"><text:span text:style-name="T84">Shadows of Vahlvadell </text:span><text:span text:style-name="T94">(Aaron Stevens)</text:span><text:span text:style-name="T84"> </text:span>(2026c) <text:span text:style-name="T46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1"/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55:51.345894721</dc:date>
    <meta:editing-duration>PT22H11M21S</meta:editing-duration>
    <meta:editing-cycles>248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3" meta:word-count="839" meta:character-count="6456" meta:non-whitespace-character-count="5673"/>
  </office:meta>
</office:document-meta>
</file>