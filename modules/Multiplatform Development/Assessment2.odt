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ac487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25a261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P1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1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3pt" fo:font-weight="bold" officeooo:rsid="00265e63" officeooo:paragraph-rsid="0027a6ff" style:font-size-asian="13pt" style:font-weight-asian="bold" style:font-size-complex="13pt" style:font-weight-complex="bold"/>
    </style:style>
    <style:style style:name="P16" style:family="paragraph" style:parent-style-name="Text_20_body">
      <style:text-properties fo:font-size="12pt" fo:font-weight="normal" officeooo:rsid="0027a6ff" officeooo:paragraph-rsid="00292dc4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19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a9d90"/>
    </style:style>
    <style:style style:name="T7" style:family="text">
      <style:text-properties officeooo:rsid="001ac487"/>
    </style:style>
    <style:style style:name="T8" style:family="text">
      <style:text-properties officeooo:rsid="001fdb95"/>
    </style:style>
    <style:style style:name="T9" style:family="text">
      <style:text-properties officeooo:rsid="00179431"/>
    </style:style>
    <style:style style:name="T10" style:family="text">
      <style:text-properties officeooo:rsid="0022f680"/>
    </style:style>
    <style:style style:name="T11" style:family="text">
      <style:text-properties officeooo:rsid="00182e9a"/>
    </style:style>
    <style:style style:name="T12" style:family="text">
      <style:text-properties officeooo:rsid="00199cd1"/>
    </style:style>
    <style:style style:name="T13" style:family="text">
      <style:text-properties officeooo:rsid="001b02dc"/>
    </style:style>
    <style:style style:name="T14" style:family="text">
      <style:text-properties officeooo:rsid="001b3fbc"/>
    </style:style>
    <style:style style:name="T15" style:family="text">
      <style:text-properties officeooo:rsid="00127f9e"/>
    </style:style>
    <style:style style:name="T16" style:family="text">
      <style:text-properties officeooo:rsid="001be3f0"/>
    </style:style>
    <style:style style:name="T17" style:family="text">
      <style:text-properties officeooo:rsid="0025a261"/>
    </style:style>
    <style:style style:name="T18" style:family="text">
      <style:text-properties officeooo:rsid="0024dfff"/>
    </style:style>
    <style:style style:name="T19" style:family="text">
      <style:text-properties officeooo:rsid="000c3e16"/>
    </style:style>
    <style:style style:name="T20" style:family="text">
      <style:text-properties officeooo:rsid="000e0618"/>
    </style:style>
    <style:style style:name="T21" style:family="text">
      <style:text-properties officeooo:rsid="0028b6fb"/>
    </style:style>
    <style:style style:name="T22" style:family="text">
      <style:text-properties officeooo:rsid="00292d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t </text:span><text:span text:style-name="T7">also </text:span><text:span text:style-name="T6">assumes that developers don’t have complete knowledge and understanding of the requirements </text:span><text:span text:style-name="T7">at the beginning of the project.</text:span></text:p>
      <text:p text:style-name="P7"><text:span text:style-name="T8">Using this methodology</text:span><text:span text:style-name="T9">, developers will typically </text:span><text:span text:style-name="T10">integrate</text:span><text:span text:style-name="T9"> the scrum framework </text:span><text:span text:style-name="T11">in day-to-day development </text:span><text:span text:style-name="T12">to recursively test </text:span><text:span text:style-name="T13">the codebase and ensure successful alignment with the </text:span><text:span text:style-name="T14">set timeline.</text:span></text:p>
      <text:p text:style-name="P6"/>
      <text:p text:style-name="P8">1.1(b). <text:span text:style-name="T15">Waterfall</text:span> </text:p>
      <text:p text:style-name="P9">Waterfall assumes that the requirements must not change during the development of a project. Instead, exact library and versioning requirements are <text:span text:style-name="T16">gathered, </text:span><text:span text:style-name="T6">researched</text:span>, and tested during the planning phase <text:span text:style-name="T17">which </text:span><text:span text:style-name="T18">takes place</text:span><text:span text:style-name="T6"> at the beginning of the project development lifecycle.</text:span></text:p>
      <text:p text:style-name="P4"/>
      <text:p text:style-name="P10"><text:span text:style-name="T19">1</text:span>.2. Personal Experience</text:p>
      <text:p text:style-name="P3"/>
      <text:p text:style-name="P3"/>
      <text:p text:style-name="P3">2. <text:span text:style-name="T1">Business</text:span></text:p>
      <text:p text:style-name="P11">2.<text:span text:style-name="T20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<text:soft-page-break/>12</text:p>
      <text:p text:style-name="P4"/>
      <text:p text:style-name="P3">5. <text:span text:style-name="T1">Technical</text:span></text:p>
      <text:p text:style-name="P4">12</text:p>
      <text:p text:style-name="P4"/>
      <text:p text:style-name="P4"/>
      <text:p text:style-name="P13">1. Mash It!</text:p>
      <text:p text:style-name="P14"/>
      <text:p text:style-name="P14">1.1. Overview</text:p>
      <text:p text:style-name="P14">“Mash It!” is a brewery tycoon video game title commissioned by the staff at UHI. During its development, I fulfilled the role of a software developer.</text:p>
      <text:p text:style-name="P13"/>
      <text:p text:style-name="P13">2. The Shadows of Vahlvadell</text:p>
      <text:p text:style-name="P14">The Shadows of Vahlvadell is a Role-Playing <text:span text:style-name="T21">G</text:span>ame (RPG) <text:span text:style-name="T21">tit</text:span><text:span text:style-name="T22">le belonging to Aaron Stevens.</text:span></text:p>
      <text:p text:style-name="P15"/>
      <text:p text:style-name="P13"/>
      <text:p text:style-name="P13">3. MauiScreenTime</text:p>
      <text:p text:style-name="P16">The Shadows of Vahlvadell is a Role-Playing <text:span text:style-name="T21">G</text:span>ame (RPG) <text:span text:style-name="T21">tit</text:span><text:span text:style-name="T22">le belonging to Aaron Stevens.</text:span></text:p>
      <text:p text:style-name="P17">This is a mobile application used for translating screen time into carbon dioxide (CO2) equivalent </text:p>
      <text:p text:style-name="P13"/>
      <text:p text:style-name="P13"/>
      <text:p text:style-name="P18">4. Blazejowski.co.uk</text:p>
      <text:p text:style-name="P19">mobile-first design,</text:p>
      <text:p text:style-name="P19">security by design,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9:43:51.668043117</dc:date>
    <meta:editing-duration>PT4H55M9S</meta:editing-duration>
    <meta:editing-cycles>36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30" meta:word-count="255" meta:character-count="1704" meta:non-whitespace-character-count="1477"/>
  </office:meta>
</office:document-meta>
</file>