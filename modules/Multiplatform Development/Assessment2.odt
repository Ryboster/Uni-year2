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0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3dba16" officeooo:paragraph-rsid="003dba1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28b6fb"/>
    </style:style>
    <style:style style:name="T5" style:family="text">
      <style:text-properties officeooo:rsid="00292dc4"/>
    </style:style>
    <style:style style:name="T6" style:family="text">
      <style:text-properties officeooo:rsid="0034b93b"/>
    </style:style>
    <style:style style:name="T7" style:family="text">
      <style:text-properties officeooo:rsid="002ec9e2"/>
    </style:style>
    <style:style style:name="T8" style:family="text">
      <style:text-properties officeooo:rsid="0034bc00"/>
    </style:style>
    <style:style style:name="T9" style:family="text">
      <style:text-properties officeooo:rsid="002d47dc"/>
    </style:style>
    <style:style style:name="T10" style:family="text">
      <style:text-properties officeooo:rsid="00371c2c"/>
    </style:style>
    <style:style style:name="T11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</text:p>
      <text:p text:style-name="P6">1.2(b)</text:p>
      <text:p text:style-name="P6">1.2(c)</text:p>
      <text:p text:style-name="P6">1.2(d)</text:p>
      <text:p text:style-name="P6">1.2(e)</text:p>
      <text:p text:style-name="P6">1.2(f)</text:p>
      <text:p text:style-name="P6">1.2(g)</text:p>
      <text:p text:style-name="P6">1.2(h)</text:p>
      <text:p text:style-name="P6">1.2(j)</text:p>
      <text:p text:style-name="P5"/>
      <text:p text:style-name="P3"/>
      <text:p text:style-name="P3">2. The Shadows of Vahlvadell</text:p>
      <text:p text:style-name="P7">2.1. Overview</text:p>
      <text:p text:style-name="P8">The Shadows of Vahlvadell is a Role-Playing <text:span text:style-name="T4">G</text:span>ame (RPG) <text:span text:style-name="T4">tit</text:span><text:span text:style-name="T5">le </text:span><text:span text:style-name="T6">lead by</text:span><text:span text:style-name="T5"> Aaron Stevens. </text:span><text:span text:style-name="T7">It is developed in Unreal Engine for </text:span><text:span text:style-name="T6">Windows and Linux. The project follows the Agile methodology. </text:span><text:span text:style-name="T8">During development, I fulfilled the role of a software developer.</text:span></text:p>
      <text:p text:style-name="P8"/>
      <text:p text:style-name="P5">2.2. Involvement </text:p>
      <text:p text:style-name="P9"/>
      <text:p text:style-name="P3"/>
      <text:p text:style-name="P3"><text:soft-page-break/>3. MauiScreenTime</text:p>
      <text:p text:style-name="P10"/>
      <text:p text:style-name="P11"><text:span text:style-name="T9">3</text:span>.1. Overview</text:p>
      <text:p text:style-name="P12">“MauiScreenTime” is a mobile application for <text:span text:style-name="T10">A</text:span>ndroid and IOS. <text:span text:style-name="T11">It follows the Agile methodology. </text:span><text:span text:style-name="T10">Although my involvement with it was brief, during its development I fulfilled the role of a software developer.</text:span></text:p>
      <text:p text:style-name="P12"/>
      <text:p text:style-name="P5">3.2. Involvement</text:p>
      <text:p text:style-name="P13">3.2(a) Inventory System</text:p>
      <text:p text:style-name="P13">3.2(b) Weather System</text:p>
      <text:p text:style-name="P13">3.2(c) Combat System</text:p>
      <text:p text:style-name="P6">3.2(d)</text:p>
      <text:p text:style-name="P3"/>
      <text:p text:style-name="P3"/>
      <text:p text:style-name="P3"/>
      <text:p text:style-name="P14">4. Blazejowski.co.uk</text:p>
      <text:p text:style-name="P15">mobile-first design,</text:p>
      <text:p text:style-name="P15">security by design,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6:44.299707078</dc:date>
    <meta:editing-duration>PT5H7M53S</meta:editing-duration>
    <meta:editing-cycles>55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9" meta:word-count="156" meta:character-count="1001" meta:non-whitespace-character-count="873"/>
  </office:meta>
</office:document-meta>
</file>