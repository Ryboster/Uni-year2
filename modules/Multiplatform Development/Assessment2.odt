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2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2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</text:list-item>
        <text:list-item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13"><text:soft-page-break/>1.2(e). <text:span text:style-name="T30">Documentation</text:span></text:p>
      <text:p text:style-name="P25"/>
      <text:p text:style-name="P13">1.2(f). <text:span text:style-name="T30">Design</text:span></text:p>
      <text:p text:style-name="P25"/>
      <text:p text:style-name="P26"/>
      <text:p text:style-name="P3">2. The Shadows of Vahlvadell</text:p>
      <text:p text:style-name="P27">2.1. Overview</text:p>
      <text:p text:style-name="P28"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8"/>
      <text:p text:style-name="P29">2.2. Involvement</text:p>
      <text:p text:style-name="P30"><text:span text:style-name="T36">2</text:span>.2(a). Inventory System</text:p>
      <text:p text:style-name="P30"><text:span text:style-name="T36">2</text:span>.2(b). Weather System</text:p>
      <text:p text:style-name="P30"><text:span text:style-name="T36">2</text:span>.2(c). Combat System</text:p>
      <text:p text:style-name="P31"/>
      <text:p text:style-name="P26"/>
      <text:p text:style-name="P26">3. MauiScreenTime</text:p>
      <text:p text:style-name="P32"/>
      <text:p text:style-name="P33"><text:span text:style-name="T37">3</text:span>.1. Overview</text:p>
      <text:p text:style-name="P34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4"/>
      <text:p text:style-name="P29">3.2. Involvement</text:p>
      <text:p text:style-name="P35"/>
      <text:p text:style-name="P36">3.2(a). </text:p>
      <text:p text:style-name="P26"/>
      <text:p text:style-name="P26"/>
      <text:p text:style-name="P26"/>
      <text:p text:style-name="P37">4. Blazejowski.co.uk</text:p>
      <text:p text:style-name="P38">mobile-first design,</text:p>
      <text:p text:style-name="P38"><text:soft-page-break/>security by design,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05:59.134531680</dc:date>
    <meta:editing-duration>PT18H22M37S</meta:editing-duration>
    <meta:editing-cycles>119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45" meta:word-count="457" meta:character-count="4059" meta:non-whitespace-character-count="3651"/>
  </office:meta>
</office:document-meta>
</file>