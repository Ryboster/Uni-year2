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43dd38" officeooo:paragraph-rsid="0092d96e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13"><text:soft-page-break/>1.2(e). <text:span text:style-name="T30">Documentation</text:span></text:p>
      <text:p text:style-name="P25">shop, main menu, settings menu, heads-up display (HUD) design,</text:p>
      <text:p text:style-name="P26">Development is not just about writing effective code. A big part of development is definition and effective application of guidelines.</text:p>
      <text:list text:style-name="L5">
        <text:list-item>
          <text:p text:style-name="P27">Justification of Choices Documentation</text:p>
        </text:list-item>
        <text:list-item>
          <text:p text:style-name="P28">Coding Best Practices</text:p>
        </text:list-item>
        <text:list-item>
          <text:p text:style-name="P28">Directory Structure Convention</text:p>
        </text:list-item>
        <text:list-item>
          <text:p text:style-name="P28"/>
        </text:list-item>
      </text:list>
      <text:p text:style-name="P29"/>
      <text:p text:style-name="P13">1.2(f). <text:span text:style-name="T30">Design</text:span></text:p>
      <text:p text:style-name="P29"/>
      <text:p text:style-name="P30"/>
      <text:p text:style-name="P3">2. The Shadows of Vahlvadell</text:p>
      <text:p text:style-name="P31">2.1. Overview</text:p>
      <text:p text:style-name="P32"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32"/>
      <text:p text:style-name="P33">2.2. Involvement</text:p>
      <text:p text:style-name="P34"><text:span text:style-name="T36">2</text:span>.2(a). Inventory System</text:p>
      <text:p text:style-name="P34"><text:span text:style-name="T36">2</text:span>.2(b). Weather System</text:p>
      <text:p text:style-name="P34"><text:span text:style-name="T36">2</text:span>.2(c). Combat System</text:p>
      <text:p text:style-name="P35"/>
      <text:p text:style-name="P30"/>
      <text:p text:style-name="P30">3. MauiScreenTime</text:p>
      <text:p text:style-name="P36"/>
      <text:p text:style-name="P37"><text:span text:style-name="T37">3</text:span>.1. Overview</text:p>
      <text:p text:style-name="P38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8"/>
      <text:p text:style-name="P33">3.2. Involvement</text:p>
      <text:p text:style-name="P39"/>
      <text:p text:style-name="P40"><text:soft-page-break/>3.2(a). </text:p>
      <text:p text:style-name="P30"/>
      <text:p text:style-name="P30"/>
      <text:p text:style-name="P30"/>
      <text:p text:style-name="P41">4. Blazejowski.co.uk</text:p>
      <text:p text:style-name="P42">mobile-first design,</text:p>
      <text:p text:style-name="P42">security by design,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8:21.484730141</dc:date>
    <meta:editing-duration>PT18H24M56S</meta:editing-duration>
    <meta:editing-cycles>124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00" meta:character-count="4348" meta:non-whitespace-character-count="3906"/>
  </office:meta>
</office:document-meta>
</file>