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1dcee" officeooo:paragraph-rsid="00c1dce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be00c"/>
    </style:style>
    <style:style style:name="T57" style:family="text">
      <style:text-properties officeooo:rsid="00b77cae"/>
    </style:style>
    <style:style style:name="T58" style:family="text">
      <style:text-properties officeooo:rsid="00b8b638"/>
    </style:style>
    <style:style style:name="T59" style:family="text">
      <style:text-properties officeooo:rsid="00ba36a9"/>
    </style:style>
    <style:style style:name="T60" style:family="text">
      <style:text-properties officeooo:rsid="00c1e35c"/>
    </style:style>
    <style:style style:name="T61" style:family="text">
      <style:text-properties officeooo:rsid="003f25fd"/>
    </style:style>
    <style:style style:name="T62" style:family="text">
      <style:text-properties officeooo:rsid="002d47dc"/>
    </style:style>
    <style:style style:name="T63" style:family="text">
      <style:text-properties officeooo:rsid="00371c2c"/>
    </style:style>
    <style:style style:name="T64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 <text:span text:style-name="T56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7">(</text:span><text:a xlink:type="simple" xlink:href="https://github.com/Strivion/Vahlvadell/pull/31" text:style-name="Internet_20_link" text:visited-style-name="Visited_20_Internet_20_Link"><text:span text:style-name="T57">https://github.com/Strivion/Vahlvadell/pull/31</text:span></text:a><text:span text:style-name="T57">) </text:span><text:span text:style-name="T58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8">https://app.mural.co/t/vahlvadell2492/m/vahlvadell2492/1764354812668/d19544649393d65be72b9d83c2dc84425e20fd06</text:span></text:a><text:span text:style-name="T58">)</text:span>. <text:span text:style-name="T56">Then, collaborated with Aaron on implementing it</text:span> <text:span text:style-name="T58"><text:s/></text:span><text:span text:style-name="T59">(</text:span><text:a xlink:type="simple" xlink:href="https://github.com/Strivion/Vahlvadell/issues/40" text:style-name="Internet_20_link" text:visited-style-name="Visited_20_Internet_20_Link"><text:span text:style-name="T59">https://github.com/Strivion/Vahlvadell/issues/40</text:span></text:a><text:span text:style-name="T59">) </text:span></text:p>
        </text:list-item>
        <text:list-item>
          <text:p text:style-name="P38">Collaborated on the design <text:span text:style-name="T60">()</text:span> and development of the combat system ()</text:p>
        </text:list-item>
      </text:list>
      <text:p text:style-name="P39"><text:span text:style-name="T61">2</text:span>.2(a). Inventory System</text:p>
      <text:p text:style-name="P35"><text:s/></text:p>
      <text:p text:style-name="P35"/>
      <text:p text:style-name="P39"><text:span text:style-name="T61">2</text:span>.2(b). Weather System</text:p>
      <text:p text:style-name="P39"><text:span text:style-name="T61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2">3</text:span>.1. Overview</text:p>
      <text:p text:style-name="P43">“MauiScreenTime” is a mobile application for <text:span text:style-name="T63">A</text:span>ndroid and IOS. <text:span text:style-name="T64">It follows the Agile methodology. </text:span><text:span text:style-name="T63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<text:soft-page-break/>References:</text:p>
      <text:p text:style-name="P49"/>
      <text:p text:style-name="P50">Mash It! Kanban ()</text:p>
      <text:p text:style-name="P48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37:46.625424941</dc:date>
    <meta:editing-duration>PT21H53M59S</meta:editing-duration>
    <meta:editing-cycles>168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59" meta:word-count="681" meta:character-count="6577" meta:non-whitespace-character-count="5958"/>
  </office:meta>
</office:document-meta>
</file>