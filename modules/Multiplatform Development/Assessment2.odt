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5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14858c2" officeooo:paragraph-rsid="01632579" style:font-size-asian="10.5pt" style:font-weight-asian="normal" style:font-size-complex="12pt" style:font-weight-complex="normal"/>
    </style:style>
    <style:style style:name="P47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48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49" style:family="paragraph" style:parent-style-name="Text_20_body" style:list-style-name="L7">
      <style:text-properties fo:font-size="12pt" fo:font-weight="normal" officeooo:rsid="015e3739" officeooo:paragraph-rsid="015e3739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3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officeooo:rsid="0153d199"/>
    </style:style>
    <style:style style:name="T92" style:family="text">
      <style:text-properties officeooo:rsid="014d11ac"/>
    </style:style>
    <style:style style:name="T93" style:family="text">
      <style:text-properties officeooo:rsid="01567fbe"/>
    </style:style>
    <style:style style:name="T94" style:family="text">
      <style:text-properties officeooo:rsid="014ddaac"/>
    </style:style>
    <style:style style:name="T95" style:family="text">
      <style:text-properties officeooo:rsid="01632579"/>
    </style:style>
    <style:style style:name="T96" style:family="text">
      <style:text-properties officeooo:rsid="015e3739"/>
    </style:style>
    <style:style style:name="T97" style:family="text">
      <style:text-properties officeooo:rsid="0164e7bf"/>
    </style:style>
    <style:style style:name="T98" style:family="text">
      <style:text-properties officeooo:rsid="0165327b"/>
    </style:style>
    <style:style style:name="T99" style:family="text">
      <style:text-properties officeooo:rsid="015f0486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officeooo:rsid="00c55401" style:font-weight-asian="bold" style:font-weight-complex="bold"/>
    </style:style>
    <style:style style:name="T102" style:family="text">
      <style:text-properties fo:font-weight="bold" officeooo:rsid="00c945a8" style:font-weight-asian="bold" style:font-weight-complex="bold"/>
    </style:style>
    <style:style style:name="T103" style:family="text">
      <style:text-properties fo:font-weight="bold" officeooo:rsid="00c5460f" style:font-weight-asian="bold" style:font-weight-complex="bold"/>
    </style:style>
    <style:style style:name="T104" style:family="text">
      <style:text-properties officeooo:rsid="00c5460f"/>
    </style:style>
    <style:style style:name="T105" style:family="text">
      <style:text-properties fo:font-style="italic" officeooo:rsid="00c5460f" style:font-style-asian="italic" style:font-style-complex="italic"/>
    </style:style>
    <style:style style:name="T106" style:family="text">
      <style:text-properties fo:font-weight="bold" officeooo:rsid="00d39f75" style:font-weight-asian="bold" style:font-weight-complex="bold"/>
    </style:style>
    <style:style style:name="T107" style:family="text">
      <style:text-properties fo:font-style="italic" officeooo:rsid="00dcbc28" style:font-style-asian="italic" style:font-style-complex="italic"/>
    </style:style>
    <style:style style:name="T108" style:family="text">
      <style:text-properties fo:font-weight="bold" officeooo:rsid="0128bc99" style:font-weight-asian="bold" style:font-weight-complex="bold"/>
    </style:style>
    <style:style style:name="T109" style:family="text">
      <style:text-properties officeooo:rsid="00cbbf6a"/>
    </style:style>
    <style:style style:name="T110" style:family="text">
      <style:text-properties fo:font-style="italic" officeooo:rsid="00cbbf6a" style:font-style-asian="italic" style:font-style-complex="italic"/>
    </style:style>
    <style:style style:name="T111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.</text:span></text:p>
        </text:list-item>
      </text:list>
      <text:p text:style-name="P36"/>
      <text:p text:style-name="P44">2. <text:span text:style-name="T90">Personal Website</text:span></text:p>
      <text:p text:style-name="P45">2.1. Overview</text:p>
      <text:p text:style-name="P46">This website is a solo projec<text:span text:style-name="T91">t</text:span>. It is a<text:span text:style-name="T92">n ever-evolving </text:span><text:span text:style-name="T93">website</text:span><text:span text:style-name="T94"> aimed at increasing my understanding and proficiency with web development. </text:span><text:span text:style-name="T95">It is built on Flask in Python, and runs on</text:span><text:span text:style-name="T96"> a raspberry pi computer, within a docker container. It uses a PostgreSQL database which is contained within a separate container for security. </text:span><text:span text:style-name="T97">For additional layer of security, the incoming connections go through an NginX server. </text:span><text:span text:style-name="T98">So far, maintaining this project helped me gain understanding and experience in the following:</text:span></text:p>
      <text:list text:style-name="L7">
        <text:list-item>
          <text:p text:style-name="P47">Mobile-first design</text:p>
        </text:list-item>
        <text:list-item>
          <text:p text:style-name="P47">Security by design</text:p>
        </text:list-item>
        <text:list-item>
          <text:p text:style-name="P48">Containerisation</text:p>
        </text:list-item>
        <text:list-item>
          <text:p text:style-name="P49">RESTful API<text:span text:style-name="T99">s</text:span></text:p>
        </text:list-item>
      </text:list>
      <text:p text:style-name="P50"/>
      <text:p text:style-name="P51">(Personal RESTful API, 2026)</text:p>
      <text:p text:style-name="P52"/>
      <text:p text:style-name="P52"><text:soft-page-break/></text:p>
      <text:p text:style-name="P53"/>
      <text:p text:style-name="P54"/>
      <text:p text:style-name="P54"/>
      <text:p text:style-name="P55">References:</text:p>
      <text:p text:style-name="P56"/>
      <text:p text:style-name="P57"><text:span text:style-name="T100">Mash It!</text:span><text:span text:style-name="T100"> </text:span><text:span text:style-name="T101">(</text:span><text:span text:style-name="T102">Brewing Game</text:span><text:span text:style-name="T101">)</text:span><text:span text:style-name="T100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8"><text:span text:style-name="T103">Mash It! </text:span><text:span text:style-name="T101">(</text:span><text:span text:style-name="T102">Brewing Game</text:span><text:span text:style-name="T101">)</text:span><text:span text:style-name="T104"> (2026b) </text:span><text:span text:style-name="T105">Pull Requests</text:span><text:span text:style-name="T104">. Available at: </text:span><text:a xlink:type="simple" xlink:href="https://github.com/Brewing-Game/brewing-game/pulls" text:style-name="Internet_20_link" text:visited-style-name="Visited_20_Internet_20_Link"><text:span text:style-name="T104">https://github.com/Brewing-Game/brewing-game/pulls</text:span></text:a><text:span text:style-name="T104"> (Accessed: 20 May 2026).</text:span></text:p>
      <text:p text:style-name="P59"><text:span text:style-name="T100">Mash It! </text:span><text:span text:style-name="T106">(Brewing Game)</text:span> (2026c) <text:span text:style-name="T107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60"/>
      <text:p text:style-name="P61"><text:span text:style-name="T108">The </text:span><text:span text:style-name="T100">Shadows of Vahlvadell (Aaron Stevens)</text:span> <text:span text:style-name="T109">(2026a) </text:span><text:span text:style-name="T110">Kanban</text:span><text:span text:style-name="T109">. Available at: </text:span><text:a xlink:type="simple" xlink:href="https://github.com/users/Strivion/projects/2/views/1" text:style-name="Internet_20_link" text:visited-style-name="Visited_20_Internet_20_Link"><text:span text:style-name="T109">https://github.com/users/Strivion/projects/2/views/1</text:span></text:a><text:span text:style-name="T109"> <text:s/>(Accessed: 20 May 2026).</text:span></text:p>
      <text:p text:style-name="P62"><text:span text:style-name="T108">The </text:span><text:span text:style-name="T100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3"><text:span text:style-name="T108">The </text:span><text:span text:style-name="T100">Shadows of Vahlvadell </text:span><text:span text:style-name="T111">(Aaron Stevens)</text:span><text:span text:style-name="T100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4"/>
      <text:p text:style-name="P65"><text:span text:style-name="T100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8:50:58.247166581</dc:date>
    <meta:editing-duration>P1DT5M57S</meta:editing-duration>
    <meta:editing-cycles>303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0" meta:word-count="1001" meta:character-count="6952" meta:non-whitespace-character-count="6012"/>
  </office:meta>
</office:document-meta>
</file>