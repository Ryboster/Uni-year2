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3f25fd"/>
    </style:style>
    <style:style style:name="T57" style:family="text">
      <style:text-properties officeooo:rsid="002d47dc"/>
    </style:style>
    <style:style style:name="T58" style:family="text">
      <style:text-properties officeooo:rsid="00371c2c"/>
    </style:style>
    <style:style style:name="T5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<text:span text:style-name="T56">2</text:span>.2(a). Inventory System</text:p>
      <text:p text:style-name="P35"><text:span text:style-name="T56">2</text:span>.2(b). Weather System</text:p>
      <text:p text:style-name="P35"><text:span text:style-name="T56">2</text:span>.2(c). Combat System</text:p>
      <text:p text:style-name="P36"/>
      <text:p text:style-name="P31"/>
      <text:p text:style-name="P31"><text:soft-page-break/>3. MauiScreenTime</text:p>
      <text:p text:style-name="P37"/>
      <text:p text:style-name="P38"><text:span text:style-name="T57">3</text:span>.1. Overview</text:p>
      <text:p text:style-name="P39">“MauiScreenTime” is a mobile application for <text:span text:style-name="T58">A</text:span>ndroid and IOS. <text:span text:style-name="T59">It follows the Agile methodology. </text:span><text:span text:style-name="T58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9:36.384609932</dc:date>
    <meta:editing-duration>PT18H35M56S</meta:editing-duration>
    <meta:editing-cycles>151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91" meta:character-count="5528" meta:non-whitespace-character-count="4993"/>
  </office:meta>
</office:document-meta>
</file>