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Project Management Environments</text:p>
      <text:p text:style-name="P4">12</text:p>
      <text:p text:style-name="P3"/>
      <text:p text:style-name="P3">2. Business</text:p>
      <text:p text:style-name="P4">12</text:p>
      <text:p text:style-name="P4"/>
      <text:p text:style-name="P3">3. Meta Skills</text:p>
      <text:p text:style-name="P4">12</text:p>
      <text:p text:style-name="P4"/>
      <text:p text:style-name="P3">4. Security</text:p>
      <text:p text:style-name="P4">12</text:p>
      <text:p text:style-name="P4"/>
      <text:p text:style-name="P3">5. Technical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18:56.382625083</dc:date>
    <meta:editing-duration>PT5M19S</meta:editing-duration>
    <meta:editing-cycles>3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1" meta:word-count="20" meta:character-count="104" meta:non-whitespace-character-count="95"/>
  </office:meta>
</office:document-meta>
</file>