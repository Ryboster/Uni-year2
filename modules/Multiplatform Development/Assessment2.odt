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0" style:family="paragraph" style:parent-style-name="Text_20_body" style:list-style-name="L7">
      <style:text-properties fo:font-size="12pt" fo:font-weight="normal" officeooo:rsid="016616f1" officeooo:paragraph-rsid="016616f1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4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5f0486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c55401" style:font-weight-asian="bold" style:font-weight-complex="bold"/>
    </style:style>
    <style:style style:name="T109" style:family="text">
      <style:text-properties fo:font-weight="bold" officeooo:rsid="00c945a8" style:font-weight-asian="bold" style:font-weight-complex="bold"/>
    </style:style>
    <style:style style:name="T110" style:family="text">
      <style:text-properties fo:font-weight="bold" officeooo:rsid="00c5460f" style:font-weight-asian="bold" style:font-weight-complex="bold"/>
    </style:style>
    <style:style style:name="T111" style:family="text">
      <style:text-properties officeooo:rsid="00c5460f"/>
    </style:style>
    <style:style style:name="T112" style:family="text">
      <style:text-properties fo:font-style="italic" officeooo:rsid="00c5460f" style:font-style-asian="italic" style:font-style-complex="italic"/>
    </style:style>
    <style:style style:name="T113" style:family="text">
      <style:text-properties fo:font-weight="bold" officeooo:rsid="00d39f75" style:font-weight-asian="bold" style:font-weight-complex="bold"/>
    </style:style>
    <style:style style:name="T114" style:family="text">
      <style:text-properties fo:font-style="italic" officeooo:rsid="00dcbc28" style:font-style-asian="italic" style:font-style-complex="italic"/>
    </style:style>
    <style:style style:name="T115" style:family="text">
      <style:text-properties fo:font-weight="bold" officeooo:rsid="0128bc99" style:font-weight-asian="bold" style:font-weight-complex="bold"/>
    </style:style>
    <style:style style:name="T116" style:family="text">
      <style:text-properties officeooo:rsid="00cbbf6a"/>
    </style:style>
    <style:style style:name="T117" style:family="text">
      <style:text-properties fo:font-style="italic" officeooo:rsid="00cbbf6a" style:font-style-asian="italic" style:font-style-complex="italic"/>
    </style:style>
    <style:style style:name="T118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36"/>
      <text:p text:style-name="P46">2. <text:span text:style-name="T95">Personal Website</text:span></text:p>
      <text:p text:style-name="P47">2.1. Overview</text:p>
      <text:p text:style-name="P48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49"><text:soft-page-break/>Mobile-first design </text:p>
          <text:list>
            <text:list-item>
              <text:p text:style-name="P50">The website is built with mobile devices in mind. If a given feature doesn’t work on mobile, it is rejected.</text:p>
            </text:list-item>
          </text:list>
        </text:list-item>
        <text:list-item>
          <text:p text:style-name="P49">Security by design</text:p>
          <text:list>
            <text:list-item>
              <text:p text:style-name="P49"/>
            </text:list-item>
          </text:list>
        </text:list-item>
        <text:list-item>
          <text:p text:style-name="P51">Containerisation</text:p>
        </text:list-item>
        <text:list-item>
          <text:p text:style-name="P52">RESTful API<text:span text:style-name="T106">s</text:span></text:p>
        </text:list-item>
      </text:list>
      <text:p text:style-name="P53"/>
      <text:p text:style-name="P54"/>
      <text:p text:style-name="P55"/>
      <text:p text:style-name="P55"/>
      <text:p text:style-name="P56"/>
      <text:p text:style-name="P57"/>
      <text:p text:style-name="P57"/>
      <text:p text:style-name="P58">References:</text:p>
      <text:p text:style-name="P59"/>
      <text:p text:style-name="P60"><text:span text:style-name="T107">Mash It!</text:span><text:span text:style-name="T107"> </text:span><text:span text:style-name="T108">(</text:span><text:span text:style-name="T109">Brewing Game</text:span><text:span text:style-name="T108">)</text:span><text:span text:style-name="T107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1"><text:span text:style-name="T110">Mash It! </text:span><text:span text:style-name="T108">(</text:span><text:span text:style-name="T109">Brewing Game</text:span><text:span text:style-name="T108">)</text:span><text:span text:style-name="T111"> (2026b) </text:span><text:span text:style-name="T112">Pull Requests</text:span><text:span text:style-name="T111">. Available at: </text:span><text:a xlink:type="simple" xlink:href="https://github.com/Brewing-Game/brewing-game/pulls" text:style-name="Internet_20_link" text:visited-style-name="Visited_20_Internet_20_Link"><text:span text:style-name="T111">https://github.com/Brewing-Game/brewing-game/pulls</text:span></text:a><text:span text:style-name="T111"> (Accessed: 20 May 2026).</text:span></text:p>
      <text:p text:style-name="P62"><text:span text:style-name="T107">Mash It! </text:span><text:span text:style-name="T113">(Brewing Game)</text:span> (2026c) <text:span text:style-name="T114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3"/>
      <text:p text:style-name="P64"><text:span text:style-name="T115">The </text:span><text:span text:style-name="T107">Shadows of Vahlvadell (Aaron Stevens)</text:span> <text:span text:style-name="T116">(2026a) </text:span><text:span text:style-name="T117">Kanban</text:span><text:span text:style-name="T116">. Available at: </text:span><text:a xlink:type="simple" xlink:href="https://github.com/users/Strivion/projects/2/views/1" text:style-name="Internet_20_link" text:visited-style-name="Visited_20_Internet_20_Link"><text:span text:style-name="T116">https://github.com/users/Strivion/projects/2/views/1</text:span></text:a><text:span text:style-name="T116"> <text:s/>(Accessed: 20 May 2026).</text:span></text:p>
      <text:p text:style-name="P65"><text:span text:style-name="T115">The </text:span><text:span text:style-name="T107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6"><text:span text:style-name="T115">The </text:span><text:span text:style-name="T107">Shadows of Vahlvadell </text:span><text:span text:style-name="T118">(Aaron Stevens)</text:span><text:span text:style-name="T107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7"/>
      <text:p text:style-name="P68"><text:span text:style-name="T107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58:21.402452197</dc:date>
    <meta:editing-duration>P1DT13M15S</meta:editing-duration>
    <meta:editing-cycles>314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1097" meta:character-count="7501" meta:non-whitespace-character-count="6467"/>
  </office:meta>
</office:document-meta>
</file>