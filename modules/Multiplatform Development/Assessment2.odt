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632579"/>
    </style:style>
    <style:style style:name="T96" style:family="text">
      <style:text-properties officeooo:rsid="015e3739"/>
    </style:style>
    <style:style style:name="T97" style:family="text">
      <style:text-properties officeooo:rsid="0164e7bf"/>
    </style:style>
    <style:style style:name="T98" style:family="text">
      <style:text-properties officeooo:rsid="0165327b"/>
    </style:style>
    <style:style style:name="T99" style:family="text">
      <style:text-properties officeooo:rsid="014a4db4"/>
    </style:style>
    <style:style style:name="T100" style:family="text">
      <style:text-properties officeooo:rsid="015f0486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c55401" style:font-weight-asian="bold" style:font-weight-complex="bold"/>
    </style:style>
    <style:style style:name="T103" style:family="text">
      <style:text-properties fo:font-weight="bold" officeooo:rsid="00c945a8" style:font-weight-asian="bold" style:font-weight-complex="bold"/>
    </style:style>
    <style:style style:name="T104" style:family="text">
      <style:text-properties fo:font-weight="bold" officeooo:rsid="00c5460f" style:font-weight-asian="bold" style:font-weight-complex="bold"/>
    </style:style>
    <style:style style:name="T105" style:family="text">
      <style:text-properties officeooo:rsid="00c5460f"/>
    </style:style>
    <style:style style:name="T106" style:family="text">
      <style:text-properties fo:font-style="italic" officeooo:rsid="00c5460f" style:font-style-asian="italic" style:font-style-complex="italic"/>
    </style:style>
    <style:style style:name="T107" style:family="text">
      <style:text-properties fo:font-weight="bold" officeooo:rsid="00d39f75" style:font-weight-asian="bold" style:font-weight-complex="bold"/>
    </style:style>
    <style:style style:name="T108" style:family="text">
      <style:text-properties fo:font-style="italic" officeooo:rsid="00dcbc28" style:font-style-asian="italic" style:font-style-complex="italic"/>
    </style:style>
    <style:style style:name="T109" style:family="text">
      <style:text-properties fo:font-weight="bold" officeooo:rsid="0128bc99" style:font-weight-asian="bold" style:font-weight-complex="bold"/>
    </style:style>
    <style:style style:name="T110" style:family="text">
      <style:text-properties officeooo:rsid="00cbbf6a"/>
    </style:style>
    <style:style style:name="T111" style:family="text">
      <style:text-properties fo:font-style="italic" officeooo:rsid="00cbbf6a" style:font-style-asian="italic" style:font-style-complex="italic"/>
    </style:style>
    <style:style style:name="T112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It is built on Flask in Python, and runs on</text:span><text:span text:style-name="T96"> a raspberry pi computer, within a docker container. It uses a PostgreSQL database which is contained within a separate container for security. </text:span><text:span text:style-name="T97">For additional layer of security, the incoming connections go through an NginX server. </text:span><text:span text:style-name="T98">So far, maintaining this project helped me gain understanding and experience in the following </text:span><text:span text:style-name="T99">(Personal RESTful API, 2026)</text:span><text:span text:style-name="T98">:</text:span></text:p>
      <text:list text:style-name="L7">
        <text:list-item>
          <text:p text:style-name="P47">Mobile-first design </text:p>
          <text:list>
            <text:list-item>
              <text:p text:style-name="P48">The website is built with mobile devices in mind. If a given feature doesn’t work on mobile, it is rejected.</text:p>
            </text:list-item>
          </text:list>
        </text:list-item>
        <text:list-item>
          <text:p text:style-name="P47">Security by design</text:p>
          <text:list>
            <text:list-item>
              <text:p text:style-name="P47"/>
            </text:list-item>
          </text:list>
        </text:list-item>
        <text:list-item>
          <text:p text:style-name="P49">Containerisation</text:p>
        </text:list-item>
        <text:list-item>
          <text:p text:style-name="P50">RESTful API<text:span text:style-name="T100">s</text:span></text:p>
        </text:list-item>
      </text:list>
      <text:p text:style-name="P51"><text:soft-page-break/></text:p>
      <text:p text:style-name="P52"/>
      <text:p text:style-name="P53"/>
      <text:p text:style-name="P53"/>
      <text:p text:style-name="P54"/>
      <text:p text:style-name="P55"/>
      <text:p text:style-name="P55"/>
      <text:p text:style-name="P56">References:</text:p>
      <text:p text:style-name="P57"/>
      <text:p text:style-name="P58"><text:span text:style-name="T101">Mash It!</text:span><text:span text:style-name="T101"> </text:span><text:span text:style-name="T102">(</text:span><text:span text:style-name="T103">Brewing Game</text:span><text:span text:style-name="T102">)</text:span><text:span text:style-name="T101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9"><text:span text:style-name="T104">Mash It! </text:span><text:span text:style-name="T102">(</text:span><text:span text:style-name="T103">Brewing Game</text:span><text:span text:style-name="T102">)</text:span><text:span text:style-name="T105"> (2026b) </text:span><text:span text:style-name="T106">Pull Requests</text:span><text:span text:style-name="T105">. Available at: </text:span><text:a xlink:type="simple" xlink:href="https://github.com/Brewing-Game/brewing-game/pulls" text:style-name="Internet_20_link" text:visited-style-name="Visited_20_Internet_20_Link"><text:span text:style-name="T105">https://github.com/Brewing-Game/brewing-game/pulls</text:span></text:a><text:span text:style-name="T105"> (Accessed: 20 May 2026).</text:span></text:p>
      <text:p text:style-name="P60"><text:span text:style-name="T101">Mash It! </text:span><text:span text:style-name="T107">(Brewing Game)</text:span> (2026c) <text:span text:style-name="T108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1"/>
      <text:p text:style-name="P62"><text:span text:style-name="T109">The </text:span><text:span text:style-name="T101">Shadows of Vahlvadell (Aaron Stevens)</text:span> <text:span text:style-name="T110">(2026a) </text:span><text:span text:style-name="T111">Kanban</text:span><text:span text:style-name="T110">. Available at: </text:span><text:a xlink:type="simple" xlink:href="https://github.com/users/Strivion/projects/2/views/1" text:style-name="Internet_20_link" text:visited-style-name="Visited_20_Internet_20_Link"><text:span text:style-name="T110">https://github.com/users/Strivion/projects/2/views/1</text:span></text:a><text:span text:style-name="T110"> <text:s/>(Accessed: 20 May 2026).</text:span></text:p>
      <text:p text:style-name="P63"><text:span text:style-name="T109">The </text:span><text:span text:style-name="T101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4"><text:span text:style-name="T109">The </text:span><text:span text:style-name="T101">Shadows of Vahlvadell </text:span><text:span text:style-name="T112">(Aaron Stevens)</text:span><text:span text:style-name="T101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5"/>
      <text:p text:style-name="P66"><text:span text:style-name="T101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1:55.593401857</dc:date>
    <meta:editing-duration>P1DT6M53S</meta:editing-duration>
    <meta:editing-cycles>306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1" meta:word-count="1023" meta:character-count="7064" meta:non-whitespace-character-count="6103"/>
  </office:meta>
</office:document-meta>
</file>