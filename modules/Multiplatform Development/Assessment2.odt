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5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9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0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fo:font-style="italic" officeooo:rsid="00f6a56e" style:font-style-asian="italic" style:font-style-complex="italic"/>
    </style:style>
    <style:style style:name="T29" style:family="text">
      <style:text-properties fo:font-style="italic" officeooo:rsid="00f83ec6" style:font-style-asian="italic" style:font-style-complex="italic"/>
    </style:style>
    <style:style style:name="T30" style:family="text">
      <style:text-properties officeooo:rsid="0043dd38"/>
    </style:style>
    <style:style style:name="T31" style:family="text">
      <style:text-properties officeooo:rsid="007bf3b9"/>
    </style:style>
    <style:style style:name="T32" style:family="text">
      <style:text-properties fo:font-style="italic" officeooo:rsid="00fae425" style:font-style-asian="italic" style:font-style-complex="italic"/>
    </style:style>
    <style:style style:name="T33" style:family="text">
      <style:text-properties fo:font-style="italic" officeooo:rsid="00fcba0b" style:font-style-asian="italic" style:font-style-complex="italic"/>
    </style:style>
    <style:style style:name="T34" style:family="text">
      <style:text-properties officeooo:rsid="00808e5a"/>
    </style:style>
    <style:style style:name="T35" style:family="text">
      <style:text-properties fo:font-style="italic" officeooo:rsid="00fe1d36" style:font-style-asian="italic" style:font-style-complex="italic"/>
    </style:style>
    <style:style style:name="T36" style:family="text">
      <style:text-properties fo:font-style="italic" officeooo:rsid="010119a6" style:font-style-asian="italic" style:font-style-complex="italic"/>
    </style:style>
    <style:style style:name="T37" style:family="text">
      <style:text-properties fo:font-style="italic" officeooo:rsid="01026bcf" style:font-style-asian="italic" style:font-style-complex="italic"/>
    </style:style>
    <style:style style:name="T38" style:family="text">
      <style:text-properties fo:font-style="italic" officeooo:rsid="0103cb69" style:font-style-asian="italic" style:font-style-complex="italic"/>
    </style:style>
    <style:style style:name="T39" style:family="text">
      <style:text-properties fo:font-style="italic" officeooo:rsid="01070669" style:font-style-asian="italic" style:font-style-complex="italic"/>
    </style:style>
    <style:style style:name="T40" style:family="text">
      <style:text-properties fo:font-style="italic" officeooo:rsid="0107c331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756e2" style:font-style-asian="italic" style:font-style-complex="italic"/>
    </style:style>
    <style:style style:name="T43" style:family="text">
      <style:text-properties officeooo:rsid="009834f9"/>
    </style:style>
    <style:style style:name="T44" style:family="text">
      <style:text-properties officeooo:rsid="009460b7"/>
    </style:style>
    <style:style style:name="T45" style:family="text">
      <style:text-properties officeooo:rsid="0098c8f8"/>
    </style:style>
    <style:style style:name="T46" style:family="text">
      <style:text-properties officeooo:rsid="009a3d00"/>
    </style:style>
    <style:style style:name="T47" style:family="text">
      <style:text-properties officeooo:rsid="00a24646"/>
    </style:style>
    <style:style style:name="T48" style:family="text">
      <style:text-properties officeooo:rsid="00a2eaac"/>
    </style:style>
    <style:style style:name="T49" style:family="text">
      <style:text-properties officeooo:rsid="009a7b88"/>
    </style:style>
    <style:style style:name="T50" style:family="text">
      <style:text-properties officeooo:rsid="009fff75"/>
    </style:style>
    <style:style style:name="T51" style:family="text">
      <style:text-properties officeooo:rsid="009acea7"/>
    </style:style>
    <style:style style:name="T52" style:family="text">
      <style:text-properties officeooo:rsid="009bb78c"/>
    </style:style>
    <style:style style:name="T53" style:family="text">
      <style:text-properties officeooo:rsid="00a5a3b9"/>
    </style:style>
    <style:style style:name="T54" style:family="text">
      <style:text-properties officeooo:rsid="00a72f38"/>
    </style:style>
    <style:style style:name="T55" style:family="text">
      <style:text-properties officeooo:rsid="00aca96f"/>
    </style:style>
    <style:style style:name="T56" style:family="text">
      <style:text-properties officeooo:rsid="00a9e1df"/>
    </style:style>
    <style:style style:name="T57" style:family="text">
      <style:text-properties officeooo:rsid="00adf5f8"/>
    </style:style>
    <style:style style:name="T58" style:family="text">
      <style:text-properties officeooo:rsid="00ae3ed0"/>
    </style:style>
    <style:style style:name="T59" style:family="text">
      <style:text-properties officeooo:rsid="00a9ff1a"/>
    </style:style>
    <style:style style:name="T60" style:family="text">
      <style:text-properties officeooo:rsid="00aacec0"/>
    </style:style>
    <style:style style:name="T61" style:family="text">
      <style:text-properties officeooo:rsid="004756e2"/>
    </style:style>
    <style:style style:name="T62" style:family="text">
      <style:text-properties officeooo:rsid="0028b6fb"/>
    </style:style>
    <style:style style:name="T63" style:family="text">
      <style:text-properties officeooo:rsid="00292dc4"/>
    </style:style>
    <style:style style:name="T64" style:family="text">
      <style:text-properties officeooo:rsid="0034b93b"/>
    </style:style>
    <style:style style:name="T65" style:family="text">
      <style:text-properties officeooo:rsid="002ec9e2"/>
    </style:style>
    <style:style style:name="T66" style:family="text">
      <style:text-properties officeooo:rsid="0034bc00"/>
    </style:style>
    <style:style style:name="T67" style:family="text">
      <style:text-properties officeooo:rsid="00bbe00c"/>
    </style:style>
    <style:style style:name="T68" style:family="text">
      <style:text-properties officeooo:rsid="00b77cae"/>
    </style:style>
    <style:style style:name="T69" style:family="text">
      <style:text-properties officeooo:rsid="00b8b638"/>
    </style:style>
    <style:style style:name="T70" style:family="text">
      <style:text-properties officeooo:rsid="00ba36a9"/>
    </style:style>
    <style:style style:name="T71" style:family="text">
      <style:text-properties officeooo:rsid="00c1e35c"/>
    </style:style>
    <style:style style:name="T72" style:family="text">
      <style:text-properties officeooo:rsid="003f25fd"/>
    </style:style>
    <style:style style:name="T73" style:family="text">
      <style:text-properties officeooo:rsid="002d47dc"/>
    </style:style>
    <style:style style:name="T74" style:family="text">
      <style:text-properties officeooo:rsid="00371c2c"/>
    </style:style>
    <style:style style:name="T75" style:family="text">
      <style:text-properties officeooo:rsid="003a16a5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c55401" style:font-weight-asian="bold" style:font-weight-complex="bold"/>
    </style:style>
    <style:style style:name="T78" style:family="text">
      <style:text-properties fo:font-weight="bold" officeooo:rsid="00c945a8" style:font-weight-asian="bold" style:font-weight-complex="bold"/>
    </style:style>
    <style:style style:name="T79" style:family="text">
      <style:text-properties fo:font-weight="bold" officeooo:rsid="00c5460f" style:font-weight-asian="bold" style:font-weight-complex="bold"/>
    </style:style>
    <style:style style:name="T80" style:family="text">
      <style:text-properties officeooo:rsid="00c5460f"/>
    </style:style>
    <style:style style:name="T81" style:family="text">
      <style:text-properties fo:font-style="italic" officeooo:rsid="00c5460f" style:font-style-asian="italic" style:font-style-complex="italic"/>
    </style:style>
    <style:style style:name="T82" style:family="text">
      <style:text-properties fo:font-weight="bold" officeooo:rsid="00d39f75" style:font-weight-asian="bold" style:font-weight-complex="bold"/>
    </style:style>
    <style:style style:name="T83" style:family="text">
      <style:text-properties fo:font-style="italic" officeooo:rsid="00dcbc28" style:font-style-asian="italic" style:font-style-complex="italic"/>
    </style:style>
    <style:style style:name="T84" style:family="text">
      <style:text-properties officeooo:rsid="00cbbf6a"/>
    </style:style>
    <style:style style:name="T85" style:family="text">
      <style:text-properties fo:font-style="italic" officeooo:rsid="00cbbf6a" style:font-style-asian="italic" style:font-style-complex="italic"/>
    </style:style>
    <style:style style:name="T86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8">T73</text:span><text:span text:style-name="T18">) (Mash It!, 2026(b), PR</text:span><text:span text:style-name="T28">85</text:span><text:span text:style-name="T18">) (Mash It!, 2026(</text:span><text:span text:style-name="T28">b</text:span><text:span text:style-name="T18">), </text:span><text:span text:style-name="T28">PR89</text:span><text:span text:style-name="T18">) (Mash It!, 2026(</text:span><text:span text:style-name="T28">a</text:span><text:span text:style-name="T18">), </text:span><text:span text:style-name="T28">T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29">T63</text:span><text:span text:style-name="T18">) (Mash It!, 2026(b), PR</text:span><text:span text:style-name="T29">64</text:span><text:span text:style-name="T18">).</text:span> </text:p>
        </text:list-item>
      </text:list>
      <text:p text:style-name="P19"/>
      <text:p text:style-name="P13"><text:soft-page-break/>1.2(c). <text:span text:style-name="T30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1">I patched it. </text:span><text:span text:style-name="T18">(Mash It!, 2026(a), T</text:span><text:span text:style-name="T32">91</text:span><text:span text:style-name="T18">) (Mash It!, 2026(b), PR</text:span><text:span text:style-name="T33">93</text:span><text:span text:style-name="T18">).</text:span></text:p>
          <text:p text:style-name="P22"/>
        </text:list-item>
      </text:list>
      <text:p text:style-name="P13">1.2(d). <text:span text:style-name="T30">U</text:span><text:span text:style-name="T34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T</text:span><text:span text:style-name="T35">52</text:span><text:span text:style-name="T18">) (Mash It!, 2026(b), PR</text:span><text:span text:style-name="T35">53</text:span><text:span text:style-name="T18">).</text:span> </text:p>
        </text:list-item>
        <text:list-item>
          <text:p text:style-name="P25">Design and development of the in-game store <text:span text:style-name="T18">(Mash It!, 2026(a), T</text:span><text:span text:style-name="T36">83</text:span><text:span text:style-name="T18">) <text:s/>(Mash It!, 2026(a), T</text:span><text:span text:style-name="T37">82</text:span><text:span text:style-name="T18">) (Mash It!, 2026(b), PR</text:span><text:span text:style-name="T38">90</text:span><text:span text:style-name="T18">).</text:span></text:p>
        </text:list-item>
        <text:list-item>
          <text:p text:style-name="P26">Development of the main menu <text:span text:style-name="T18">(Mash It!, 2026(a), T</text:span><text:span text:style-name="T39">51</text:span><text:span text:style-name="T18">) (Mash It!, 2026(b), PR</text:span><text:span text:style-name="T40">50</text:span><text:span text:style-name="T18">).</text:span> </text:p>
        </text:list-item>
      </text:list>
      <text:p text:style-name="P27"><text:s/></text:p>
      <text:p text:style-name="P28"><text:span text:style-name="T41">1.2(e). </text:span><text:span text:style-name="T42">Documentation</text:span></text:p>
      <text:p text:style-name="P29">Development is not just about writing effective code. A big part of development is definition and effective application of <text:span text:style-name="T43">organisational</text:span> guidelines. <text:span text:style-name="T44">Our team understood it well </text:span><text:span text:style-name="T45">since</text:span><text:span text:style-name="T44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46">this document answers the “what?” and “why?” with respect to the various design choices. </text:span><text:span text:style-name="T47">(</text:span><text:a xlink:type="simple" xlink:href="https://github.com/Brewing-Game/brewing-game/blob/dev/Documentation/justification_of_choices.md" text:style-name="Internet_20_link" text:visited-style-name="Visited_20_Internet_20_Link"><text:span text:style-name="T47">https://github.com/Brewing-Game/brewing-game/blob/dev/Documentation/justification_of_choices.md</text:span></text:a><text:span text:style-name="T47">) </text:span><text:span text:style-name="T48">(</text:span><text:a xlink:type="simple" xlink:href="https://github.com/Brewing-Game/brewing-game/issues/3" text:style-name="Internet_20_link" text:visited-style-name="Visited_20_Internet_20_Link"><text:span text:style-name="T48">https://github.com/Brewing-Game/brewing-game/issues/3</text:span></text:a><text:span text:style-name="T48">)</text:span></text:p>
        </text:list-item>
        <text:list-item>
          <text:p text:style-name="P31">Coding <text:span text:style-name="T49">b</text:span>est <text:span text:style-name="T49">p</text:span>ractices – <text:span text:style-name="T50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50">https://github.com/Brewing-Game/brewing-game/blob/dev/Documentation/coding_practices.md</text:span></text:a><text:span text:style-name="T50">) (</text:span><text:a xlink:type="simple" xlink:href="https://github.com/Brewing-Game/brewing-game/issues/1" text:style-name="Internet_20_link" text:visited-style-name="Visited_20_Internet_20_Link"><text:span text:style-name="T50">https://github.com/Brewing-Game/brewing-game/issues/1</text:span></text:a><text:span text:style-name="T50">)</text:span></text:p>
        </text:list-item>
        <text:list-item>
          <text:p text:style-name="P31">Directory <text:span text:style-name="T49">s</text:span>tructure <text:span text:style-name="T49">c</text:span>onvention – <text:span text:style-name="T51">This document outlines </text:span><text:span text:style-name="T52">file storage constraints; what goes where. </text:span><text:span text:style-name="T53">(</text:span><text:a xlink:type="simple" xlink:href="https://github.com/Brewing-Game/brewing-game/blob/dev/Documentation/directory_structure_convention.md" text:style-name="Internet_20_link" text:visited-style-name="Visited_20_Internet_20_Link"><text:span text:style-name="T53">https://github.com/Brewing-Game/brewing-game/blob/dev/Documentation/directory_structure_convention.md</text:span></text:a><text:span text:style-name="T53">) </text:span><text:span text:style-name="T54">(</text:span><text:a xlink:type="simple" xlink:href="https://github.com/Brewing-Game/brewing-game/issues/2" text:style-name="Internet_20_link" text:visited-style-name="Visited_20_Internet_20_Link"><text:span text:style-name="T54">https://github.com/Brewing-Game/brewing-game/issues/2</text:span></text:a><text:span text:style-name="T54">)</text:span></text:p>
        </text:list-item>
        <text:list-item>
          <text:p text:style-name="P32">Pull request (PR) documentation. This document outlines <text:span text:style-name="T55">the acceptable conduct within the GitHub workflow</text:span><text:span text:style-name="T56">. </text:span><text:span text:style-name="T57">It ensures tha</text:span><text:span text:style-name="T58">t programmers understand </text:span><text:span text:style-name="T56"><text:s/></text:span><text:span text:style-name="T59">(</text:span><text:a xlink:type="simple" xlink:href="https://github.com/Brewing-Game/brewing-game/blob/dev/Documentation/github_workflow.md" text:style-name="Internet_20_link" text:visited-style-name="Visited_20_Internet_20_Link"><text:span text:style-name="T59">https://github.com/Brewing-Game/brewing-game/blob/dev/Documentation/github_workflow.md</text:span></text:a><text:span text:style-name="T59">) </text:span><text:span text:style-name="T60">(</text:span><text:a xlink:type="simple" xlink:href="https://github.com/Brewing-Game/brewing-game/issues/9" text:style-name="Internet_20_link" text:visited-style-name="Visited_20_Internet_20_Link"><text:span text:style-name="T60">https://github.com/Brewing-Game/brewing-game/issues/9</text:span></text:a><text:span text:style-name="T60">)</text:span></text:p>
        </text:list-item>
        <text:list-item>
          <text:p text:style-name="P32"/>
        </text:list-item>
      </text:list>
      <text:p text:style-name="P13"><text:soft-page-break/>1.2(f). <text:span text:style-name="T61">Design</text:span></text:p>
      <text:p text:style-name="P33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4"/>
      <text:p text:style-name="P3">2. The Shadows of Vahlvadell</text:p>
      <text:p text:style-name="P35">2.1. Overview</text:p>
      <text:p text:style-name="P36">The Shadows of Vahlvadell is a Role-Playing <text:span text:style-name="T62">G</text:span>ame (RPG) <text:span text:style-name="T62">tit</text:span><text:span text:style-name="T63">le </text:span><text:span text:style-name="T64">lead by</text:span><text:span text:style-name="T63"> Aaron Stevens. </text:span><text:span text:style-name="T65">It is developed in Unreal Engine for </text:span><text:span text:style-name="T64">Windows and Linux. The project follows the Agile methodology. </text:span><text:span text:style-name="T66">During development, I fulfilled the role of a software developer.</text:span></text:p>
      <text:p text:style-name="P36"/>
      <text:p text:style-name="P37">2.2. Involvement</text:p>
      <text:p text:style-name="P38">2.2(a) Systems</text:p>
      <text:list text:style-name="L6">
        <text:list-item>
          <text:p text:style-name="P39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0">Designed <text:span text:style-name="T67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8">(</text:span><text:a xlink:type="simple" xlink:href="https://github.com/Strivion/Vahlvadell/pull/31" text:style-name="Internet_20_link" text:visited-style-name="Visited_20_Internet_20_Link"><text:span text:style-name="T68">https://github.com/Strivion/Vahlvadell/pull/31</text:span></text:a><text:span text:style-name="T68">) </text:span><text:span text:style-name="T69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9">https://app.mural.co/t/vahlvadell2492/m/vahlvadell2492/1764354812668/d19544649393d65be72b9d83c2dc84425e20fd06</text:span></text:a><text:span text:style-name="T69">)</text:span>. <text:span text:style-name="T67">Then, collaborated with Aaron on implementing it</text:span> <text:span text:style-name="T69"><text:s/></text:span><text:span text:style-name="T70">(</text:span><text:a xlink:type="simple" xlink:href="https://github.com/Strivion/Vahlvadell/issues/40" text:style-name="Internet_20_link" text:visited-style-name="Visited_20_Internet_20_Link"><text:span text:style-name="T70">https://github.com/Strivion/Vahlvadell/issues/40</text:span></text:a><text:span text:style-name="T70">) </text:span></text:p>
        </text:list-item>
        <text:list-item>
          <text:p text:style-name="P41">Collaborated on the design <text:span text:style-name="T71">()</text:span> and development of the combat system ()</text:p>
        </text:list-item>
      </text:list>
      <text:p text:style-name="P42"><text:span text:style-name="T72">2</text:span>.2(a). Inventory System</text:p>
      <text:p text:style-name="P38"><text:s/></text:p>
      <text:p text:style-name="P38"/>
      <text:p text:style-name="P42"><text:span text:style-name="T72">2</text:span>.2(b). Weather System</text:p>
      <text:p text:style-name="P42"><text:span text:style-name="T72">2</text:span>.2(c). Combat System</text:p>
      <text:p text:style-name="P43"/>
      <text:p text:style-name="P34"/>
      <text:p text:style-name="P34">3. MauiScreenTime</text:p>
      <text:p text:style-name="P44"/>
      <text:p text:style-name="P45"><text:span text:style-name="T73">3</text:span>.1. Overview</text:p>
      <text:p text:style-name="P46"><text:soft-page-break/>“MauiScreenTime” is a mobile application for <text:span text:style-name="T74">A</text:span>ndroid and IOS. <text:span text:style-name="T75">It follows the Agile methodology. </text:span><text:span text:style-name="T74">Although my involvement with it was brief, during its development I fulfilled the role of a software developer.</text:span></text:p>
      <text:p text:style-name="P46"/>
      <text:p text:style-name="P37">3.2. Involvement</text:p>
      <text:p text:style-name="P47"/>
      <text:p text:style-name="P48">3.2(a). </text:p>
      <text:p text:style-name="P34"/>
      <text:p text:style-name="P34"/>
      <text:p text:style-name="P34"/>
      <text:p text:style-name="P49">4. Blazejowski.co.uk</text:p>
      <text:p text:style-name="P50">mobile-first design,</text:p>
      <text:p text:style-name="P50">security by design,</text:p>
      <text:p text:style-name="P50"/>
      <text:p text:style-name="P50"/>
      <text:p text:style-name="P51">References:</text:p>
      <text:p text:style-name="P52"/>
      <text:p text:style-name="P53"><text:span text:style-name="T76">Mash It!</text:span><text:span text:style-name="T76"> </text:span><text:span text:style-name="T77">(</text:span><text:span text:style-name="T78">Brewing Game</text:span><text:span text:style-name="T77">)</text:span><text:span text:style-name="T76"> </text:span>(2026a) <text:span text:style-name="T41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4"><text:span text:style-name="T79">Mash It! </text:span><text:span text:style-name="T77">(</text:span><text:span text:style-name="T78">Brewing Game</text:span><text:span text:style-name="T77">)</text:span><text:span text:style-name="T80"> (2026b) </text:span><text:span text:style-name="T81">Pull Requests</text:span><text:span text:style-name="T80">. Available at: </text:span><text:a xlink:type="simple" xlink:href="https://github.com/Brewing-Game/brewing-game/pulls" text:style-name="Internet_20_link" text:visited-style-name="Visited_20_Internet_20_Link"><text:span text:style-name="T80">https://github.com/Brewing-Game/brewing-game/pulls</text:span></text:a><text:span text:style-name="T80"> (Accessed: 20 May 2026).</text:span></text:p>
      <text:p text:style-name="P55"><text:span text:style-name="T76">Mash It! </text:span><text:span text:style-name="T82">(Brewing Game)</text:span> (2026c) <text:span text:style-name="T83">Project</text:span><text:span text:style-name="T41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6"/>
      <text:p text:style-name="P57"><text:span text:style-name="T76">Shadows of Vahlvadell (Aaron Stevens)</text:span> <text:span text:style-name="T84">(2026a) </text:span><text:span text:style-name="T85">Kanban</text:span><text:span text:style-name="T84">. Available at: </text:span><text:a xlink:type="simple" xlink:href="https://github.com/users/Strivion/projects/2/views/1" text:style-name="Internet_20_link" text:visited-style-name="Visited_20_Internet_20_Link"><text:span text:style-name="T84">https://github.com/users/Strivion/projects/2/views/1</text:span></text:a><text:span text:style-name="T84"> <text:s/>(Accessed: 20 May 2026).</text:span></text:p>
      <text:p text:style-name="P58"><text:span text:style-name="T76">Shadows of Vahlvadell (Aaron Stevens)</text:span> (2026b) <text:span text:style-name="T41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9"><text:span text:style-name="T76">Shadows of Vahlvadell </text:span><text:span text:style-name="T86">(Aaron Stevens)</text:span><text:span text:style-name="T76"> </text:span>(2026c) <text:span text:style-name="T41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0"/>
      <text:p text:style-name="P5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2:47.178649226</dc:date>
    <meta:editing-duration>PT22H8M24S</meta:editing-duration>
    <meta:editing-cycles>234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3" meta:word-count="821" meta:character-count="6770" meta:non-whitespace-character-count="6007"/>
  </office:meta>
</office:document-meta>
</file>