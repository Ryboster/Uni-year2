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5cc82" officeooo:paragraph-rsid="00b5cc8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3f25fd"/>
    </style:style>
    <style:style style:name="T61" style:family="text">
      <style:text-properties officeooo:rsid="002d47dc"/>
    </style:style>
    <style:style style:name="T62" style:family="text">
      <style:text-properties officeooo:rsid="00371c2c"/>
    </style:style>
    <style:style style:name="T63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/>
        </text:list-item>
      </text:list>
      <text:p text:style-name="P39"><text:span text:style-name="T60">2</text:span>.2(a). Inventory System</text:p>
      <text:p text:style-name="P35"><text:s/></text:p>
      <text:p text:style-name="P35"/>
      <text:p text:style-name="P39"><text:span text:style-name="T60">2</text:span>.2(b). Weather System</text:p>
      <text:p text:style-name="P39"><text:span text:style-name="T60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1">3</text:span>.1. Overview</text:p>
      <text:p text:style-name="P43">“MauiScreenTime” is a mobile application for <text:span text:style-name="T62">A</text:span>ndroid and IOS. <text:span text:style-name="T63">It follows the Agile methodology. </text:span><text:span text:style-name="T62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5:55.820250812</dc:date>
    <meta:editing-duration>PT21H52M10S</meta:editing-duration>
    <meta:editing-cycles>16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7" meta:word-count="664" meta:character-count="6479" meta:non-whitespace-character-count="5874"/>
  </office:meta>
</office:document-meta>
</file>