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2pt" fo:font-style="italic" fo:font-weight="bold" officeooo:rsid="0027a6ff" officeooo:paragraph-rsid="0027a6f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style="italic" fo:font-weight="bold" officeooo:rsid="0038518f" officeooo:paragraph-rsid="0038518f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0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5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d6def"/>
    </style:style>
    <style:style style:name="T25" style:family="text">
      <style:text-properties officeooo:rsid="00737515"/>
    </style:style>
    <style:style style:name="T26" style:family="text">
      <style:text-properties officeooo:rsid="0043dd38"/>
    </style:style>
    <style:style style:name="T27" style:family="text">
      <style:text-properties officeooo:rsid="007bf3b9"/>
    </style:style>
    <style:style style:name="T28" style:family="text">
      <style:text-properties officeooo:rsid="007c2844"/>
    </style:style>
    <style:style style:name="T29" style:family="text">
      <style:text-properties officeooo:rsid="00808e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10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1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2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3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4"/>
      <text:p text:style-name="P14"><text:soft-page-break/></text:p>
      <text:p text:style-name="P14"/>
      <text:p text:style-name="P8">1.2(b). <text:span text:style-name="T20">Accessibility</text:span></text:p>
      <text:p text:style-name="P15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6">Tutorial, TTS, hover highlight scrip</text:p>
      <text:list text:style-name="L2">
        <text:list-item>
          <text:p text:style-name="P17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8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 </text:span><text:span text:style-name="T24">(</text:span><text:a xlink:type="simple" xlink:href="https://github.com/Brewing-Game/brewing-game/issues/72" text:style-name="Internet_20_link" text:visited-style-name="Visited_20_Internet_20_Link"><text:span text:style-name="T24">https://github.com/Brewing-Game/brewing-game/issues/72</text:span></text:a><text:span text:style-name="T24">)</text:span></text:p>
        </text:list-item>
        <text:list-item>
          <text:p text:style-name="P18">Creation and implementation of sound effects <text:span text:style-name="T25">(</text:span><text:a xlink:type="simple" xlink:href="https://github.com/Brewing-Game/brewing-game/issues/63" text:style-name="Internet_20_link" text:visited-style-name="Visited_20_Internet_20_Link"><text:span text:style-name="T25">https://github.com/Brewing-Game/brewing-game/issues/63</text:span></text:a><text:span text:style-name="T25">) (</text:span><text:a xlink:type="simple" xlink:href="https://github.com/Brewing-Game/brewing-game/pull/64" text:style-name="Internet_20_link" text:visited-style-name="Visited_20_Internet_20_Link"><text:span text:style-name="T25">https://github.com/Brewing-Game/brewing-game/pull/64</text:span></text:a><text:span text:style-name="T25">)</text:span></text:p>
          <text:p text:style-name="P18"/>
        </text:list-item>
      </text:list>
      <text:p text:style-name="P8">1.2(c). <text:span text:style-name="T26">Debugging</text:span></text:p>
      <text:p text:style-name="P19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0">Separated mouse interactions between UI and game level. Before this patch, clicking a UI element would also click the underlying scene objects (like our mash tuns). <text:span text:style-name="T27">I patched it. (</text:span><text:a xlink:type="simple" xlink:href="https://github.com/Brewing-Game/brewing-game/issues/91" text:style-name="Internet_20_link" text:visited-style-name="Visited_20_Internet_20_Link"><text:span text:style-name="T27">https://github.com/Brewing-Game/brewing-game/issues/91</text:span></text:a><text:span text:style-name="T27">) </text:span><text:span text:style-name="T28">(</text:span><text:a xlink:type="simple" xlink:href="https://github.com/Brewing-Game/brewing-game/pull/93" text:style-name="Internet_20_link" text:visited-style-name="Visited_20_Internet_20_Link"><text:span text:style-name="T28">https://github.com/Brewing-Game/brewing-game/pull/93</text:span></text:a><text:span text:style-name="T28">)</text:span></text:p>
        </text:list-item>
        <text:list-item>
          <text:p text:style-name="P20"/>
        </text:list-item>
      </text:list>
      <text:p text:style-name="P8">1.2(d). <text:span text:style-name="T26">U</text:span><text:span text:style-name="T29">ser Interface (UI)</text:span></text:p>
      <text:p text:style-name="P21"/>
      <text:p text:style-name="P22">shop, main menu, settings menu, heads-up display (HUD) design, </text:p>
      <text:p text:style-name="P8">1.2(e). <text:span text:style-name="T30">Documentation</text:span></text:p>
      <text:p text:style-name="P21"/>
      <text:p text:style-name="P8">1.2(f). <text:span text:style-name="T30">Design</text:span></text:p>
      <text:p text:style-name="P21"/>
      <text:p text:style-name="P23"/>
      <text:p text:style-name="P23">2. The Shadows of Vahlvadell</text:p>
      <text:p text:style-name="P24">2.1. Overview</text:p>
      <text:p text:style-name="P25"><text:soft-page-break/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5"/>
      <text:p text:style-name="P26">2.2. Involvement</text:p>
      <text:p text:style-name="P27"><text:span text:style-name="T36">2</text:span>.2(a). Inventory System</text:p>
      <text:p text:style-name="P27"><text:span text:style-name="T36">2</text:span>.2(b). Weather System</text:p>
      <text:p text:style-name="P27"><text:span text:style-name="T36">2</text:span>.2(c). Combat System</text:p>
      <text:p text:style-name="P28"/>
      <text:p text:style-name="P23"/>
      <text:p text:style-name="P23">3. MauiScreenTime</text:p>
      <text:p text:style-name="P29"/>
      <text:p text:style-name="P30"><text:span text:style-name="T37">3</text:span>.1. Overview</text:p>
      <text:p text:style-name="P31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1"/>
      <text:p text:style-name="P26">3.2. Involvement</text:p>
      <text:p text:style-name="P32"/>
      <text:p text:style-name="P33">3.2(a). </text:p>
      <text:p text:style-name="P23"/>
      <text:p text:style-name="P23"/>
      <text:p text:style-name="P23"/>
      <text:p text:style-name="P34">4. Blazejowski.co.uk</text:p>
      <text:p text:style-name="P35">mobile-first design,</text:p>
      <text:p text:style-name="P35">security by design,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20:59.783803978</dc:date>
    <meta:editing-duration>PT18H16M1S</meta:editing-duration>
    <meta:editing-cycles>110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4" meta:word-count="428" meta:character-count="3885" meta:non-whitespace-character-count="3506"/>
  </office:meta>
</office:document-meta>
</file>