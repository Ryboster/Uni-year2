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4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9" style:family="paragraph" style:parent-style-name="Text_20_body" style:list-style-name="L1">
      <style:text-properties fo:font-size="12pt" fo:font-weight="normal" officeooo:rsid="00590a9e" officeooo:paragraph-rsid="00590a9e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5c01c9" officeooo:paragraph-rsid="005c01c9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2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2eb126" officeooo:paragraph-rsid="002eb126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24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26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29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30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5ab55a"/>
    </style:style>
    <style:style style:name="T18" style:family="text">
      <style:text-properties officeooo:rsid="0065cfce"/>
    </style:style>
    <style:style style:name="T19" style:family="text">
      <style:text-properties officeooo:rsid="0070c2f8"/>
    </style:style>
    <style:style style:name="T20" style:family="text">
      <style:text-properties officeooo:rsid="00464452"/>
    </style:style>
    <style:style style:name="T21" style:family="text">
      <style:text-properties officeooo:rsid="006c29f7"/>
    </style:style>
    <style:style style:name="T22" style:family="text">
      <style:text-properties officeooo:rsid="0075cb8b"/>
    </style:style>
    <style:style style:name="T23" style:family="text">
      <style:text-properties officeooo:rsid="00702fba"/>
    </style:style>
    <style:style style:name="T24" style:family="text">
      <style:text-properties officeooo:rsid="00737515"/>
    </style:style>
    <style:style style:name="T25" style:family="text">
      <style:text-properties officeooo:rsid="0043dd38"/>
    </style:style>
    <style:style style:name="T26" style:family="text">
      <style:text-properties officeooo:rsid="004756e2"/>
    </style:style>
    <style:style style:name="T27" style:family="text">
      <style:text-properties officeooo:rsid="0028b6fb"/>
    </style:style>
    <style:style style:name="T28" style:family="text">
      <style:text-properties officeooo:rsid="00292dc4"/>
    </style:style>
    <style:style style:name="T29" style:family="text">
      <style:text-properties officeooo:rsid="0034b93b"/>
    </style:style>
    <style:style style:name="T30" style:family="text">
      <style:text-properties officeooo:rsid="002ec9e2"/>
    </style:style>
    <style:style style:name="T31" style:family="text">
      <style:text-properties officeooo:rsid="0034bc00"/>
    </style:style>
    <style:style style:name="T32" style:family="text">
      <style:text-properties officeooo:rsid="003f25fd"/>
    </style:style>
    <style:style style:name="T33" style:family="text">
      <style:text-properties officeooo:rsid="002d47dc"/>
    </style:style>
    <style:style style:name="T34" style:family="text">
      <style:text-properties officeooo:rsid="00371c2c"/>
    </style:style>
    <style:style style:name="T35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4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4"/>
      <text:p text:style-name="P5">1.2. Involvement</text:p>
      <text:p text:style-name="P6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6"/>
      <text:p text:style-name="P7">1.2(a). <text:span text:style-name="T9">Game Level</text:span><text:span text:style-name="T7">s</text:span></text:p>
      <text:p text:style-name="P8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8"><text:s/>My contributions include:</text:p>
      <text:list text:style-name="L1">
        <text:list-item>
          <text:p text:style-name="P9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9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17">(</text:span><text:a xlink:type="simple" xlink:href="https://github.com/Brewing-Game/brewing-game/pull/90" text:style-name="Internet_20_link" text:visited-style-name="Visited_20_Internet_20_Link"><text:span text:style-name="T17">https://github.com/Brewing-Game/brewing-game/pull/90</text:span></text:a><text:span text:style-name="T17">)</text:span></text:p>
        </text:list-item>
        <text:list-item>
          <text:p text:style-name="P10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  <text:list-item>
          <text:p text:style-name="P11"><text:span text:style-name="T18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2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 <text:span text:style-name="T19">(</text:span><text:a xlink:type="simple" xlink:href="https://github.com/Brewing-Game/brewing-game/issues/54" text:style-name="Internet_20_link" text:visited-style-name="Visited_20_Internet_20_Link"><text:span text:style-name="T19">https://github.com/Brewing-Game/brewing-game/issues/54</text:span></text:a><text:span text:style-name="T19">) (</text:span><text:a xlink:type="simple" xlink:href="https://github.com/Brewing-Game/brewing-game/issues/49" text:style-name="Internet_20_link" text:visited-style-name="Visited_20_Internet_20_Link"><text:span text:style-name="T19">https://github.com/Brewing-Game/brewing-game/issues/49</text:span></text:a><text:span text:style-name="T19">)</text:span></text:p>
        </text:list-item>
      </text:list>
      <text:p text:style-name="P13"/>
      <text:p text:style-name="P13"><text:soft-page-break/></text:p>
      <text:p text:style-name="P13"/>
      <text:p text:style-name="P7">1.2(b). <text:span text:style-name="T20">Accessibility</text:span></text:p>
      <text:p text:style-name="P14">This game puts emphasis on accessibility. As developers, we wanted the game to be accessible to as many people as possible. Give<text:span text:style-name="T21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22">(</text:span><text:a xlink:type="simple" xlink:href="https://github.com/Brewing-Game/brewing-game/pull/44" text:style-name="Internet_20_link" text:visited-style-name="Visited_20_Internet_20_Link"><text:span text:style-name="T22">https://github.com/Brewing-Game/brewing-game/pull/44</text:span></text:a><text:span text:style-name="T22">) (</text:span><text:a xlink:type="simple" xlink:href="https://github.com/Brewing-Game/brewing-game/issues/48" text:style-name="Internet_20_link" text:visited-style-name="Visited_20_Internet_20_Link"><text:span text:style-name="T22">https://github.com/Brewing-Game/brewing-game/issues/48</text:span></text:a><text:span text:style-name="T22">)</text:span></text:p>
        </text:list-item>
        <text:list-item>
          <text:p text:style-name="P17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3">(</text:span><text:a xlink:type="simple" xlink:href="https://github.com/Brewing-Game/brewing-game/pull/85" text:style-name="Internet_20_link" text:visited-style-name="Visited_20_Internet_20_Link"><text:span text:style-name="T23">https://github.com/Brewing-Game/brewing-game/pull/85</text:span></text:a><text:span text:style-name="T23">) (</text:span><text:a xlink:type="simple" xlink:href="https://github.com/Brewing-Game/brewing-game/pull/89" text:style-name="Internet_20_link" text:visited-style-name="Visited_20_Internet_20_Link"><text:span text:style-name="T23">https://github.com/Brewing-Game/brewing-game/pull/89</text:span></text:a><text:span text:style-name="T23">)</text:span></text:p>
        </text:list-item>
        <text:list-item>
          <text:p text:style-name="P17">Creation and implementation of sound effects <text:span text:style-name="T24">(</text:span><text:a xlink:type="simple" xlink:href="https://github.com/Brewing-Game/brewing-game/issues/63" text:style-name="Internet_20_link" text:visited-style-name="Visited_20_Internet_20_Link"><text:span text:style-name="T24">https://github.com/Brewing-Game/brewing-game/issues/63</text:span></text:a><text:span text:style-name="T24">) (</text:span><text:a xlink:type="simple" xlink:href="https://github.com/Brewing-Game/brewing-game/pull/64" text:style-name="Internet_20_link" text:visited-style-name="Visited_20_Internet_20_Link"><text:span text:style-name="T24">https://github.com/Brewing-Game/brewing-game/pull/64</text:span></text:a><text:span text:style-name="T24">)</text:span></text:p>
        </text:list-item>
      </text:list>
      <text:p text:style-name="P7">1.2(c). <text:span text:style-name="T25">Debugging</text:span></text:p>
      <text:p text:style-name="P18">To ensure flawless functionality, deliver planned features, and increase customer satisfaction, certain parts of the application were debugged. I took a big part in this debugging process. My contributions include:</text:p>
      <text:p text:style-name="P18"/>
      <text:p text:style-name="P7">1.2(d). <text:span text:style-name="T25">UI</text:span></text:p>
      <text:p text:style-name="P19">shop, main menu, settings menu, heads-up display (HUD) design, </text:p>
      <text:p text:style-name="P7">1.2(e). <text:span text:style-name="T26">Documentation</text:span></text:p>
      <text:p text:style-name="P7"/>
      <text:p text:style-name="P7">1.2(f). <text:span text:style-name="T26">Design</text:span></text:p>
      <text:p text:style-name="P7"/>
      <text:p text:style-name="P3"/>
      <text:p text:style-name="P3">2. The Shadows of Vahlvadell</text:p>
      <text:p text:style-name="P20">2.1. Overview</text:p>
      <text:p text:style-name="P21">The Shadows of Vahlvadell is a Role-Playing <text:span text:style-name="T27">G</text:span>ame (RPG) <text:span text:style-name="T27">tit</text:span><text:span text:style-name="T28">le </text:span><text:span text:style-name="T29">lead by</text:span><text:span text:style-name="T28"> Aaron Stevens. </text:span><text:span text:style-name="T30">It is developed in Unreal Engine for </text:span><text:span text:style-name="T29">Windows and Linux. The project follows the Agile methodology. </text:span><text:span text:style-name="T31">During development, I fulfilled the role of a software developer.</text:span></text:p>
      <text:p text:style-name="P21"/>
      <text:p text:style-name="P5">2.2. Involvement</text:p>
      <text:p text:style-name="P22"><text:span text:style-name="T32">2</text:span>.2(a). Inventory System</text:p>
      <text:p text:style-name="P22"><text:soft-page-break/><text:span text:style-name="T32">2</text:span>.2(b). Weather System</text:p>
      <text:p text:style-name="P22"><text:span text:style-name="T32">2</text:span>.2(c). Combat System</text:p>
      <text:p text:style-name="P23"/>
      <text:p text:style-name="P3"/>
      <text:p text:style-name="P3">3. MauiScreenTime</text:p>
      <text:p text:style-name="P24"/>
      <text:p text:style-name="P25"><text:span text:style-name="T33">3</text:span>.1. Overview</text:p>
      <text:p text:style-name="P26">“MauiScreenTime” is a mobile application for <text:span text:style-name="T34">A</text:span>ndroid and IOS. <text:span text:style-name="T35">It follows the Agile methodology. </text:span><text:span text:style-name="T34">Although my involvement with it was brief, during its development I fulfilled the role of a software developer.</text:span></text:p>
      <text:p text:style-name="P26"/>
      <text:p text:style-name="P5">3.2. Involvement</text:p>
      <text:p text:style-name="P27"/>
      <text:p text:style-name="P28">3.2(a). </text:p>
      <text:p text:style-name="P3"/>
      <text:p text:style-name="P3"/>
      <text:p text:style-name="P3"/>
      <text:p text:style-name="P29">4. Blazejowski.co.uk</text:p>
      <text:p text:style-name="P30">mobile-first design,</text:p>
      <text:p text:style-name="P30">security by design,</text:p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2:09:17.708045360</dc:date>
    <meta:editing-duration>PT18H4M24S</meta:editing-duration>
    <meta:editing-cycles>98</meta:editing-cycles>
    <meta:generator>LibreOffice/25.8.3.2$Linux_X86_64 LibreOffice_project/8ca8d55c161d602844f5428fa4b58097424e324e</meta:generator>
    <meta:document-statistic meta:table-count="0" meta:image-count="0" meta:object-count="0" meta:page-count="3" meta:paragraph-count="41" meta:word-count="391" meta:character-count="3518" meta:non-whitespace-character-count="3172"/>
  </office:meta>
</office:document-meta>
</file>