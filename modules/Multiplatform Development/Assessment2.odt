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8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  <style:style style:name="T21" style:family="text">
      <style:text-properties officeooo:rsid="00303c35"/>
    </style:style>
    <style:style style:name="T22" style:family="text">
      <style:text-properties officeooo:rsid="00324776"/>
    </style:style>
    <style:style style:name="T23" style:family="text">
      <style:text-properties officeooo:rsid="0033908a"/>
    </style:style>
    <style:style style:name="T24" style:family="text">
      <style:text-properties officeooo:rsid="0028b6fb"/>
    </style:style>
    <style:style style:name="T25" style:family="text">
      <style:text-properties officeooo:rsid="00292dc4"/>
    </style:style>
    <style:style style:name="T26" style:family="text">
      <style:text-properties officeooo:rsid="0034b93b"/>
    </style:style>
    <style:style style:name="T27" style:family="text">
      <style:text-properties officeooo:rsid="002ec9e2"/>
    </style:style>
    <style:style style:name="T28" style:family="text">
      <style:text-properties officeooo:rsid="002d47dc"/>
    </style:style>
    <style:style style:name="T29" style:family="text">
      <style:text-properties officeooo:rsid="002b9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4"/>
      <text:p text:style-name="P14">1.1. Overview</text:p>
      <text:p text:style-name="P14">“Mash It!” is a brewery tycoon title commissioned by the staff <text:span text:style-name="T21">of University of Highlands and Islands (UHI)</text:span>. <text:span text:style-name="T22">It is developed in Unity for </text:span><text:span text:style-name="T23">Windows, Linux, and MacOS. The project follows the Agile methodology.</text:span></text:p>
      <text:p text:style-name="P13"/>
      <text:p text:style-name="P13">2. The Shadows of Vahlvadell</text:p>
      <text:p text:style-name="P15">2.1. Overview</text:p>
      <text:p text:style-name="P16">The Shadows of Vahlvadell is a Role-Playing <text:span text:style-name="T24">G</text:span>ame (RPG) <text:span text:style-name="T24">tit</text:span><text:span text:style-name="T25">le </text:span><text:span text:style-name="T26">lead by</text:span><text:span text:style-name="T25"> Aaron Stevens. </text:span><text:span text:style-name="T27">It is developed in Unreal Engine for </text:span><text:span text:style-name="T26">Windows and Linux. The project follows the Agile methodology.</text:span></text:p>
      <text:p text:style-name="P17"/>
      <text:p text:style-name="P13"/>
      <text:p text:style-name="P13">3. MauiScreenTime</text:p>
      <text:p text:style-name="P18"/>
      <text:p text:style-name="P19"><text:span text:style-name="T28">3</text:span>.1. Overview</text:p>
      <text:p text:style-name="P18">This is a mobile application used for translating screen time into carbon dioxide (CO2) equivalent <text:span text:style-name="T29">emission. Its goal is to increase awareness about personal CO2 emission and reduce unhealthy habits.</text:span></text:p>
      <text:p text:style-name="P13"/>
      <text:p text:style-name="P13"/>
      <text:p text:style-name="P20">4. Blazejowski.co.uk</text:p>
      <text:p text:style-name="P21">mobile-first design,</text:p>
      <text:p text:style-name="P21">security by design,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48:40.314893314</dc:date>
    <meta:editing-duration>PT4H59M55S</meta:editing-duration>
    <meta:editing-cycles>45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1" meta:word-count="284" meta:character-count="1892" meta:non-whitespace-character-count="1638"/>
  </office:meta>
</office:document-meta>
</file>