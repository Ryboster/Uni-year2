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67fa4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695f70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6f981a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text-properties fo:font-size="12pt" fo:font-weight="normal" officeooo:rsid="00590a9e" officeooo:paragraph-rsid="008bdd5d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size="12pt" fo:font-weight="normal" officeooo:rsid="00590a9e" officeooo:paragraph-rsid="008c427b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fo:font-size="12pt" fo:font-weight="normal" officeooo:rsid="005c01c9" officeooo:paragraph-rsid="008cb0d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style="normal" fo:font-weight="normal" officeooo:rsid="00910361" officeooo:paragraph-rsid="009103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text-properties fo:font-size="12pt" fo:font-style="normal" fo:font-weight="normal" officeooo:rsid="0092d96e" officeooo:paragraph-rsid="0092d9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3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37" style:family="paragraph" style:parent-style-name="Text_20_body" style:list-style-name="L6">
      <style:text-properties fo:font-size="12pt" fo:font-weight="normal" officeooo:rsid="00b5cc82" officeooo:paragraph-rsid="00bd526c" style:font-size-asian="10.5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48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officeooo:rsid="0070c2f8"/>
    </style:style>
    <style:style style:name="T19" style:family="text">
      <style:text-properties officeooo:rsid="00464452"/>
    </style:style>
    <style:style style:name="T20" style:family="text">
      <style:text-properties officeooo:rsid="006c29f7"/>
    </style:style>
    <style:style style:name="T21" style:family="text">
      <style:text-properties officeooo:rsid="0075cb8b"/>
    </style:style>
    <style:style style:name="T22" style:family="text">
      <style:text-properties officeooo:rsid="00702fba"/>
    </style:style>
    <style:style style:name="T23" style:family="text">
      <style:text-properties officeooo:rsid="007d6def"/>
    </style:style>
    <style:style style:name="T24" style:family="text">
      <style:text-properties officeooo:rsid="00737515"/>
    </style:style>
    <style:style style:name="T25" style:family="text">
      <style:text-properties officeooo:rsid="0043dd38"/>
    </style:style>
    <style:style style:name="T26" style:family="text">
      <style:text-properties officeooo:rsid="007bf3b9"/>
    </style:style>
    <style:style style:name="T27" style:family="text">
      <style:text-properties officeooo:rsid="007c2844"/>
    </style:style>
    <style:style style:name="T28" style:family="text">
      <style:text-properties officeooo:rsid="00808e5a"/>
    </style:style>
    <style:style style:name="T29" style:family="text">
      <style:text-properties officeooo:rsid="005ab5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756e2" style:font-style-asian="italic" style:font-style-complex="italic"/>
    </style:style>
    <style:style style:name="T32" style:family="text">
      <style:text-properties officeooo:rsid="009834f9"/>
    </style:style>
    <style:style style:name="T33" style:family="text">
      <style:text-properties officeooo:rsid="009460b7"/>
    </style:style>
    <style:style style:name="T34" style:family="text">
      <style:text-properties officeooo:rsid="0098c8f8"/>
    </style:style>
    <style:style style:name="T35" style:family="text">
      <style:text-properties officeooo:rsid="009a3d00"/>
    </style:style>
    <style:style style:name="T36" style:family="text">
      <style:text-properties officeooo:rsid="00a24646"/>
    </style:style>
    <style:style style:name="T37" style:family="text">
      <style:text-properties officeooo:rsid="00a2eaac"/>
    </style:style>
    <style:style style:name="T38" style:family="text">
      <style:text-properties officeooo:rsid="009a7b88"/>
    </style:style>
    <style:style style:name="T39" style:family="text">
      <style:text-properties officeooo:rsid="009fff75"/>
    </style:style>
    <style:style style:name="T40" style:family="text">
      <style:text-properties officeooo:rsid="009acea7"/>
    </style:style>
    <style:style style:name="T41" style:family="text">
      <style:text-properties officeooo:rsid="009bb78c"/>
    </style:style>
    <style:style style:name="T42" style:family="text">
      <style:text-properties officeooo:rsid="00a5a3b9"/>
    </style:style>
    <style:style style:name="T43" style:family="text">
      <style:text-properties officeooo:rsid="00a72f38"/>
    </style:style>
    <style:style style:name="T44" style:family="text">
      <style:text-properties officeooo:rsid="00aca96f"/>
    </style:style>
    <style:style style:name="T45" style:family="text">
      <style:text-properties officeooo:rsid="00a9e1df"/>
    </style:style>
    <style:style style:name="T46" style:family="text">
      <style:text-properties officeooo:rsid="00adf5f8"/>
    </style:style>
    <style:style style:name="T47" style:family="text">
      <style:text-properties officeooo:rsid="00ae3ed0"/>
    </style:style>
    <style:style style:name="T48" style:family="text">
      <style:text-properties officeooo:rsid="00a9ff1a"/>
    </style:style>
    <style:style style:name="T49" style:family="text">
      <style:text-properties officeooo:rsid="00aacec0"/>
    </style:style>
    <style:style style:name="T50" style:family="text">
      <style:text-properties officeooo:rsid="004756e2"/>
    </style:style>
    <style:style style:name="T51" style:family="text">
      <style:text-properties officeooo:rsid="0028b6fb"/>
    </style:style>
    <style:style style:name="T52" style:family="text">
      <style:text-properties officeooo:rsid="00292dc4"/>
    </style:style>
    <style:style style:name="T53" style:family="text">
      <style:text-properties officeooo:rsid="0034b93b"/>
    </style:style>
    <style:style style:name="T54" style:family="text">
      <style:text-properties officeooo:rsid="002ec9e2"/>
    </style:style>
    <style:style style:name="T55" style:family="text">
      <style:text-properties officeooo:rsid="0034bc00"/>
    </style:style>
    <style:style style:name="T56" style:family="text">
      <style:text-properties officeooo:rsid="00bbe00c"/>
    </style:style>
    <style:style style:name="T57" style:family="text">
      <style:text-properties officeooo:rsid="00b77cae"/>
    </style:style>
    <style:style style:name="T58" style:family="text">
      <style:text-properties officeooo:rsid="00b8b638"/>
    </style:style>
    <style:style style:name="T59" style:family="text">
      <style:text-properties officeooo:rsid="00ba36a9"/>
    </style:style>
    <style:style style:name="T60" style:family="text">
      <style:text-properties officeooo:rsid="003f25fd"/>
    </style:style>
    <style:style style:name="T61" style:family="text">
      <style:text-properties officeooo:rsid="002d47dc"/>
    </style:style>
    <style:style style:name="T62" style:family="text">
      <style:text-properties officeooo:rsid="00371c2c"/>
    </style:style>
    <style:style style:name="T63" style:family="text">
      <style:text-properties officeooo:rsid="003a16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(<text:a xlink:type="simple" xlink:href="https://github.com/Brewing-Game/brewing-game/issues/19" text:style-name="Internet_20_link" text:visited-style-name="Visited_20_Internet_20_Link">https://github.com/Brewing-Game/brewing-game/issues/19</text:a>) (<text:a xlink:type="simple" xlink:href="https://github.com/Brewing-Game/brewing-game/pull/27" text:style-name="Internet_20_link" text:visited-style-name="Visited_20_Internet_20_Link">https://github.com/Brewing-Game/brewing-game/pull/27</text:a>)</text:p>
        </text:list-item>
        <text:list-item>
          <text:p text:style-name="P11">Development and implementation of the settings menu (<text:a xlink:type="simple" xlink:href="https://github.com/Brewing-Game/brewing-game/pull/67" text:style-name="Internet_20_link" text:visited-style-name="Visited_20_Internet_20_Link">https://github.com/Brewing-Game/brewing-game/pull/67</text:a>) (<text:a xlink:type="simple" xlink:href="https://github.com/Brewing-Game/brewing-game/issues/51" text:style-name="Internet_20_link" text:visited-style-name="Visited_20_Internet_20_Link">https://github.com/Brewing-Game/brewing-game/issues/51</text:a>) <text:span text:style-name="T18">(</text:span><text:a xlink:type="simple" xlink:href="https://github.com/Brewing-Game/brewing-game/issues/54" text:style-name="Internet_20_link" text:visited-style-name="Visited_20_Internet_20_Link"><text:span text:style-name="T18">https://github.com/Brewing-Game/brewing-game/issues/54</text:span></text:a><text:span text:style-name="T18">) (</text:span><text:a xlink:type="simple" xlink:href="https://github.com/Brewing-Game/brewing-game/issues/49" text:style-name="Internet_20_link" text:visited-style-name="Visited_20_Internet_20_Link"><text:span text:style-name="T18">https://github.com/Brewing-Game/brewing-game/issues/49</text:span></text:a><text:span text:style-name="T18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.2(b). <text:span text:style-name="T19">Accessibility</text:span></text:p>
      <text:p text:style-name="P14">This game puts emphasis on accessibility. As developers, we wanted the game to be accessible to as many people as possible. Give<text:span text:style-name="T20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21">(</text:span><text:a xlink:type="simple" xlink:href="https://github.com/Brewing-Game/brewing-game/pull/44" text:style-name="Internet_20_link" text:visited-style-name="Visited_20_Internet_20_Link"><text:span text:style-name="T21">https://github.com/Brewing-Game/brewing-game/pull/44</text:span></text:a><text:span text:style-name="T21">) (</text:span><text:a xlink:type="simple" xlink:href="https://github.com/Brewing-Game/brewing-game/issues/48" text:style-name="Internet_20_link" text:visited-style-name="Visited_20_Internet_20_Link"><text:span text:style-name="T21">https://github.com/Brewing-Game/brewing-game/issues/48</text:span></text:a><text:span text:style-name="T21">)</text:span></text:p>
        </text:list-item>
        <text:list-item>
          <text:p text:style-name="P17">Development of the in-game tutorial complete with text-to-speech (<text:a xlink:type="simple" xlink:href="https://github.com/Brewing-Game/brewing-game/issues/73" text:style-name="Internet_20_link" text:visited-style-name="Visited_20_Internet_20_Link">https://github.com/Brewing-Game/brewing-game/issues/73</text:a>) <text:span text:style-name="T22">(</text:span><text:a xlink:type="simple" xlink:href="https://github.com/Brewing-Game/brewing-game/pull/85" text:style-name="Internet_20_link" text:visited-style-name="Visited_20_Internet_20_Link"><text:span text:style-name="T22">https://github.com/Brewing-Game/brewing-game/pull/85</text:span></text:a><text:span text:style-name="T22">) (</text:span><text:a xlink:type="simple" xlink:href="https://github.com/Brewing-Game/brewing-game/pull/89" text:style-name="Internet_20_link" text:visited-style-name="Visited_20_Internet_20_Link"><text:span text:style-name="T22">https://github.com/Brewing-Game/brewing-game/pull/89</text:span></text:a><text:span text:style-name="T22">) </text:span><text:span text:style-name="T23">(</text:span><text:a xlink:type="simple" xlink:href="https://github.com/Brewing-Game/brewing-game/issues/72" text:style-name="Internet_20_link" text:visited-style-name="Visited_20_Internet_20_Link"><text:span text:style-name="T23">https://github.com/Brewing-Game/brewing-game/issues/72</text:span></text:a><text:span text:style-name="T23">)</text:span></text:p>
        </text:list-item>
        <text:list-item>
          <text:p text:style-name="P17">Creation and implementation of sound effects <text:span text:style-name="T24">(</text:span><text:a xlink:type="simple" xlink:href="https://github.com/Brewing-Game/brewing-game/issues/63" text:style-name="Internet_20_link" text:visited-style-name="Visited_20_Internet_20_Link"><text:span text:style-name="T24">https://github.com/Brewing-Game/brewing-game/issues/63</text:span></text:a><text:span text:style-name="T24">) (</text:span><text:a xlink:type="simple" xlink:href="https://github.com/Brewing-Game/brewing-game/pull/64" text:style-name="Internet_20_link" text:visited-style-name="Visited_20_Internet_20_Link"><text:span text:style-name="T24">https://github.com/Brewing-Game/brewing-game/pull/64</text:span></text:a><text:span text:style-name="T24">)</text:span></text:p>
          <text:p text:style-name="P17"/>
        </text:list-item>
      </text:list>
      <text:p text:style-name="P13">1.2(c). <text:span text:style-name="T25">Debugging</text:span></text:p>
      <text:p text:style-name="P18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19">Separated mouse interactions between UI and game level. Before this patch, clicking a UI element would also click the underlying scene objects (like our mash tuns). <text:span text:style-name="T26">I patched it. (</text:span><text:a xlink:type="simple" xlink:href="https://github.com/Brewing-Game/brewing-game/issues/91" text:style-name="Internet_20_link" text:visited-style-name="Visited_20_Internet_20_Link"><text:span text:style-name="T26">https://github.com/Brewing-Game/brewing-game/issues/91</text:span></text:a><text:span text:style-name="T26">) </text:span><text:span text:style-name="T27">(</text:span><text:a xlink:type="simple" xlink:href="https://github.com/Brewing-Game/brewing-game/pull/93" text:style-name="Internet_20_link" text:visited-style-name="Visited_20_Internet_20_Link"><text:span text:style-name="T27">https://github.com/Brewing-Game/brewing-game/pull/93</text:span></text:a><text:span text:style-name="T27">)</text:span></text:p>
          <text:p text:style-name="P19"/>
        </text:list-item>
      </text:list>
      <text:p text:style-name="P13">1.2(d). <text:span text:style-name="T25">U</text:span><text:span text:style-name="T28">ser Interface (UI)</text:span></text:p>
      <text:p text:style-name="P20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1">Development of the pause menu (<text:a xlink:type="simple" xlink:href="https://github.com/Brewing-Game/brewing-game/issues/52" text:style-name="Internet_20_link" text:visited-style-name="Visited_20_Internet_20_Link">https://github.com/Brewing-Game/brewing-game/issues/52</text:a>) (<text:a xlink:type="simple" xlink:href="https://github.com/Brewing-Game/brewing-game/pull/53" text:style-name="Internet_20_link" text:visited-style-name="Visited_20_Internet_20_Link">https://github.com/Brewing-Game/brewing-game/pull/53</text:a>)</text:p>
        </text:list-item>
        <text:list-item>
          <text:p text:style-name="P22">Design and development of the in-game store (<text:a xlink:type="simple" xlink:href="https://github.com/Brewing-Game/brewing-game/issues/83" text:style-name="Internet_20_link" text:visited-style-name="Visited_20_Internet_20_Link">https://github.com/Brewing-Game/brewing-game/issues/83</text:a>) (<text:a xlink:type="simple" xlink:href="https://github.com/Brewing-Game/brewing-game/issues/82" text:style-name="Internet_20_link" text:visited-style-name="Visited_20_Internet_20_Link">https://github.com/Brewing-Game/brewing-game/issues/82</text:a>) <text:span text:style-name="T29">(</text:span><text:a xlink:type="simple" xlink:href="https://github.com/Brewing-Game/brewing-game/pull/90" text:style-name="Internet_20_link" text:visited-style-name="Visited_20_Internet_20_Link"><text:span text:style-name="T29">https://github.com/Brewing-Game/brewing-game/pull/90</text:span></text:a><text:span text:style-name="T29">)</text:span></text:p>
        </text:list-item>
        <text:list-item>
          <text:p text:style-name="P23">Development of the main menu (<text:a xlink:type="simple" xlink:href="https://github.com/Brewing-Game/brewing-game/issues/51" text:style-name="Internet_20_link" text:visited-style-name="Visited_20_Internet_20_Link">https://github.com/Brewing-Game/brewing-game/issues/51</text:a>) (<text:a xlink:type="simple" xlink:href="https://github.com/Brewing-Game/brewing-game/pull/50" text:style-name="Internet_20_link" text:visited-style-name="Visited_20_Internet_20_Link">https://github.com/Brewing-Game/brewing-game/pull/50</text:a>)</text:p>
        </text:list-item>
      </text:list>
      <text:p text:style-name="P20"/>
      <text:p text:style-name="P24">shop, main menu, settings menu, heads-up display (HUD) design, </text:p>
      <text:p text:style-name="P25"><text:soft-page-break/><text:span text:style-name="T30">1.2(e). </text:span><text:span text:style-name="T31">Documentation</text:span></text:p>
      <text:p text:style-name="P26">Development is not just about writing effective code. A big part of development is definition and effective application of <text:span text:style-name="T32">organisational</text:span> guidelines. <text:span text:style-name="T33">Our team understood it well </text:span><text:span text:style-name="T34">since</text:span><text:span text:style-name="T33"> the beginning of the project, and given my previous experience with this, I was tasked with creating the following documentation:</text:span></text:p>
      <text:list text:style-name="L5">
        <text:list-item>
          <text:p text:style-name="P27">Justification of Choices Documentation; <text:span text:style-name="T35">this document answers the “what?” and “why?” with respect to the various design choices. </text:span><text:span text:style-name="T36">(</text:span><text:a xlink:type="simple" xlink:href="https://github.com/Brewing-Game/brewing-game/blob/dev/Documentation/justification_of_choices.md" text:style-name="Internet_20_link" text:visited-style-name="Visited_20_Internet_20_Link"><text:span text:style-name="T36">https://github.com/Brewing-Game/brewing-game/blob/dev/Documentation/justification_of_choices.md</text:span></text:a><text:span text:style-name="T36">) </text:span><text:span text:style-name="T37">(</text:span><text:a xlink:type="simple" xlink:href="https://github.com/Brewing-Game/brewing-game/issues/3" text:style-name="Internet_20_link" text:visited-style-name="Visited_20_Internet_20_Link"><text:span text:style-name="T37">https://github.com/Brewing-Game/brewing-game/issues/3</text:span></text:a><text:span text:style-name="T37">)</text:span></text:p>
        </text:list-item>
        <text:list-item>
          <text:p text:style-name="P28">Coding <text:span text:style-name="T38">b</text:span>est <text:span text:style-name="T38">p</text:span>ractices – <text:span text:style-name="T39">This document describes the exact syntax to be used when writing code. It takes into consideration casing, units, abbreviations, style, comments, etc. (</text:span><text:a xlink:type="simple" xlink:href="https://github.com/Brewing-Game/brewing-game/blob/dev/Documentation/coding_practices.md" text:style-name="Internet_20_link" text:visited-style-name="Visited_20_Internet_20_Link"><text:span text:style-name="T39">https://github.com/Brewing-Game/brewing-game/blob/dev/Documentation/coding_practices.md</text:span></text:a><text:span text:style-name="T39">) (</text:span><text:a xlink:type="simple" xlink:href="https://github.com/Brewing-Game/brewing-game/issues/1" text:style-name="Internet_20_link" text:visited-style-name="Visited_20_Internet_20_Link"><text:span text:style-name="T39">https://github.com/Brewing-Game/brewing-game/issues/1</text:span></text:a><text:span text:style-name="T39">)</text:span></text:p>
        </text:list-item>
        <text:list-item>
          <text:p text:style-name="P28">Directory <text:span text:style-name="T38">s</text:span>tructure <text:span text:style-name="T38">c</text:span>onvention – <text:span text:style-name="T40">This document outlines </text:span><text:span text:style-name="T41">file storage constraints; what goes where. </text:span><text:span text:style-name="T42">(</text:span><text:a xlink:type="simple" xlink:href="https://github.com/Brewing-Game/brewing-game/blob/dev/Documentation/directory_structure_convention.md" text:style-name="Internet_20_link" text:visited-style-name="Visited_20_Internet_20_Link"><text:span text:style-name="T42">https://github.com/Brewing-Game/brewing-game/blob/dev/Documentation/directory_structure_convention.md</text:span></text:a><text:span text:style-name="T42">) </text:span><text:span text:style-name="T43">(</text:span><text:a xlink:type="simple" xlink:href="https://github.com/Brewing-Game/brewing-game/issues/2" text:style-name="Internet_20_link" text:visited-style-name="Visited_20_Internet_20_Link"><text:span text:style-name="T43">https://github.com/Brewing-Game/brewing-game/issues/2</text:span></text:a><text:span text:style-name="T43">)</text:span></text:p>
        </text:list-item>
        <text:list-item>
          <text:p text:style-name="P29">Pull request (PR) documentation. This document outlines <text:span text:style-name="T44">the acceptable conduct within the GitHub workflow</text:span><text:span text:style-name="T45">. </text:span><text:span text:style-name="T46">It ensures tha</text:span><text:span text:style-name="T47">t programmers understand </text:span><text:span text:style-name="T45"><text:s/></text:span><text:span text:style-name="T48">(</text:span><text:a xlink:type="simple" xlink:href="https://github.com/Brewing-Game/brewing-game/blob/dev/Documentation/github_workflow.md" text:style-name="Internet_20_link" text:visited-style-name="Visited_20_Internet_20_Link"><text:span text:style-name="T48">https://github.com/Brewing-Game/brewing-game/blob/dev/Documentation/github_workflow.md</text:span></text:a><text:span text:style-name="T48">) </text:span><text:span text:style-name="T49">(</text:span><text:a xlink:type="simple" xlink:href="https://github.com/Brewing-Game/brewing-game/issues/9" text:style-name="Internet_20_link" text:visited-style-name="Visited_20_Internet_20_Link"><text:span text:style-name="T49">https://github.com/Brewing-Game/brewing-game/issues/9</text:span></text:a><text:span text:style-name="T49">)</text:span></text:p>
        </text:list-item>
        <text:list-item>
          <text:p text:style-name="P29"/>
        </text:list-item>
      </text:list>
      <text:p text:style-name="P13">1.2(f). <text:span text:style-name="T50">Design</text:span></text:p>
      <text:p text:style-name="P30">During the development, design decisions were made together as a team. Results of our discussions were recorded on mural (<text:a xlink:type="simple" xlink:href="https://app.mural.co/t/farmingsimulator9293/m/farmingsimulator9293/1762074910299/66ec2841ac6d7c3ddc9a248ef1a43dd3283119ff?sender=ue18174cdbfba13587a755085" text:style-name="Internet_20_link" text:visited-style-name="Visited_20_Internet_20_Link">https://app.mural.co/t/farmingsimulator9293/m/farmingsimulator9293/1762074910299/66ec2841ac6d7c3ddc9a248ef1a43dd3283119ff?sender=ue18174cdbfba13587a755085</text:a>) for posterity. </text:p>
      <text:p text:style-name="P31"/>
      <text:p text:style-name="P3">2. The Shadows of Vahlvadell</text:p>
      <text:p text:style-name="P32">2.1. Overview</text:p>
      <text:p text:style-name="P33">The Shadows of Vahlvadell is a Role-Playing <text:span text:style-name="T51">G</text:span>ame (RPG) <text:span text:style-name="T51">tit</text:span><text:span text:style-name="T52">le </text:span><text:span text:style-name="T53">lead by</text:span><text:span text:style-name="T52"> Aaron Stevens. </text:span><text:span text:style-name="T54">It is developed in Unreal Engine for </text:span><text:span text:style-name="T53">Windows and Linux. The project follows the Agile methodology. </text:span><text:span text:style-name="T55">During development, I fulfilled the role of a software developer.</text:span></text:p>
      <text:p text:style-name="P33"/>
      <text:p text:style-name="P34">2.2. Involvement</text:p>
      <text:p text:style-name="P35">2.2(a) Systems</text:p>
      <text:list text:style-name="L6">
        <text:list-item>
          <text:p text:style-name="P36">Given my previous experience with developing inventory systems for another project (Scattered Lands), I was assigned to the task of designing and implementing an inventory <text:soft-page-break/>system (<text:a xlink:type="simple" xlink:href="https://github.com/Strivion/Vahlvadell/issues/54" text:style-name="Internet_20_link" text:visited-style-name="Visited_20_Internet_20_Link">https://github.com/Strivion/Vahlvadell/issues/54</text:a>) (<text:a xlink:type="simple" xlink:href="https://github.com/Strivion/Vahlvadell/pull/61" text:style-name="Internet_20_link" text:visited-style-name="Visited_20_Internet_20_Link">https://github.com/Strivion/Vahlvadell/pull/61</text:a>).</text:p>
        </text:list-item>
        <text:list-item>
          <text:p text:style-name="P37">Designed <text:span text:style-name="T56">and</text:span> developed a dynamic weather system (<text:a xlink:type="simple" xlink:href="https://github.com/Strivion/Vahlvadell/issues/3" text:style-name="Internet_20_link" text:visited-style-name="Visited_20_Internet_20_Link">https://github.com/Strivion/Vahlvadell/issues/3</text:a>) <text:span text:style-name="T57">(</text:span><text:a xlink:type="simple" xlink:href="https://github.com/Strivion/Vahlvadell/pull/31" text:style-name="Internet_20_link" text:visited-style-name="Visited_20_Internet_20_Link"><text:span text:style-name="T57">https://github.com/Strivion/Vahlvadell/pull/31</text:span></text:a><text:span text:style-name="T57">) </text:span><text:span text:style-name="T58">(</text:span><text:a xlink:type="simple" xlink:href="https://app.mural.co/t/vahlvadell2492/m/vahlvadell2492/1764354812668/d19544649393d65be72b9d83c2dc84425e20fd06" text:style-name="Internet_20_link" text:visited-style-name="Visited_20_Internet_20_Link"><text:span text:style-name="T58">https://app.mural.co/t/vahlvadell2492/m/vahlvadell2492/1764354812668/d19544649393d65be72b9d83c2dc84425e20fd06</text:span></text:a><text:span text:style-name="T58">)</text:span>. <text:span text:style-name="T56">Then, collaborated with Aaron on implementing it</text:span> <text:span text:style-name="T58"><text:s/></text:span><text:span text:style-name="T59">(</text:span><text:a xlink:type="simple" xlink:href="https://github.com/Strivion/Vahlvadell/issues/40" text:style-name="Internet_20_link" text:visited-style-name="Visited_20_Internet_20_Link"><text:span text:style-name="T59">https://github.com/Strivion/Vahlvadell/issues/40</text:span></text:a><text:span text:style-name="T59">) </text:span></text:p>
        </text:list-item>
        <text:list-item>
          <text:p text:style-name="P38">Collaborated on the design and development of the combat system ()</text:p>
        </text:list-item>
      </text:list>
      <text:p text:style-name="P39"><text:span text:style-name="T60">2</text:span>.2(a). Inventory System</text:p>
      <text:p text:style-name="P35"><text:s/></text:p>
      <text:p text:style-name="P35"/>
      <text:p text:style-name="P39"><text:span text:style-name="T60">2</text:span>.2(b). Weather System</text:p>
      <text:p text:style-name="P39"><text:span text:style-name="T60">2</text:span>.2(c). Combat System</text:p>
      <text:p text:style-name="P40"/>
      <text:p text:style-name="P31"/>
      <text:p text:style-name="P31">3. MauiScreenTime</text:p>
      <text:p text:style-name="P41"/>
      <text:p text:style-name="P42"><text:span text:style-name="T61">3</text:span>.1. Overview</text:p>
      <text:p text:style-name="P43">“MauiScreenTime” is a mobile application for <text:span text:style-name="T62">A</text:span>ndroid and IOS. <text:span text:style-name="T63">It follows the Agile methodology. </text:span><text:span text:style-name="T62">Although my involvement with it was brief, during its development I fulfilled the role of a software developer.</text:span></text:p>
      <text:p text:style-name="P43"/>
      <text:p text:style-name="P34">3.2. Involvement</text:p>
      <text:p text:style-name="P44"/>
      <text:p text:style-name="P45">3.2(a). </text:p>
      <text:p text:style-name="P31"/>
      <text:p text:style-name="P31"/>
      <text:p text:style-name="P31"/>
      <text:p text:style-name="P46">4. Blazejowski.co.uk</text:p>
      <text:p text:style-name="P47">mobile-first design,</text:p>
      <text:p text:style-name="P47">security by design,</text:p>
      <text:p text:style-name="P47"/>
      <text:p text:style-name="P47"/>
      <text:p text:style-name="P48"><text:soft-page-break/>References:</text:p>
      <text:p text:style-name="P48"/>
      <text:p text:style-name="P48"/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6:36:44.517154104</dc:date>
    <meta:editing-duration>PT21H52M57S</meta:editing-duration>
    <meta:editing-cycles>166</meta:editing-cycles>
    <meta:generator>LibreOffice/25.8.3.2$Linux_X86_64 LibreOffice_project/8ca8d55c161d602844f5428fa4b58097424e324e</meta:generator>
    <meta:document-statistic meta:table-count="0" meta:image-count="0" meta:object-count="0" meta:page-count="5" meta:paragraph-count="58" meta:word-count="676" meta:character-count="6556" meta:non-whitespace-character-count="5941"/>
  </office:meta>
</office:document-meta>
</file>