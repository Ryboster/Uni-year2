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5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46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50" style:family="paragraph" style:parent-style-name="Text_20_body">
      <style:text-properties fo:font-size="13pt" fo:font-weight="normal" officeooo:rsid="014652f4" officeooo:paragraph-rsid="014652f4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fo:font-style="italic" officeooo:rsid="012b38bd" style:font-style-asian="italic" style:font-style-complex="italic"/>
    </style:style>
    <style:style style:name="T79" style:family="text">
      <style:text-properties fo:font-style="italic" officeooo:rsid="013f3b91" style:font-style-asian="italic" style:font-style-complex="italic"/>
    </style:style>
    <style:style style:name="T80" style:family="text">
      <style:text-properties fo:font-style="italic" officeooo:rsid="012c5674" style:font-style-asian="italic" style:font-style-complex="italic"/>
    </style:style>
    <style:style style:name="T81" style:family="text">
      <style:text-properties officeooo:rsid="00bbe00c"/>
    </style:style>
    <style:style style:name="T82" style:family="text">
      <style:text-properties fo:font-style="italic" officeooo:rsid="01314900" style:font-style-asian="italic" style:font-style-complex="italic"/>
    </style:style>
    <style:style style:name="T83" style:family="text">
      <style:text-properties fo:font-style="italic" officeooo:rsid="01321924" style:font-style-asian="italic" style:font-style-complex="italic"/>
    </style:style>
    <style:style style:name="T84" style:family="text">
      <style:text-properties fo:font-style="italic" officeooo:rsid="0133a86a" style:font-style-asian="italic" style:font-style-complex="italic"/>
    </style:style>
    <style:style style:name="T85" style:family="text">
      <style:text-properties fo:font-style="italic" officeooo:rsid="01353272" style:font-style-asian="italic" style:font-style-complex="italic"/>
    </style:style>
    <style:style style:name="T86" style:family="text">
      <style:text-properties fo:font-style="italic" officeooo:rsid="013c8976" style:font-style-asian="italic" style:font-style-complex="italic"/>
    </style:style>
    <style:style style:name="T87" style:family="text">
      <style:text-properties fo:font-style="italic" officeooo:rsid="013f28b8" style:font-style-asian="italic" style:font-style-complex="italic"/>
    </style:style>
    <style:style style:name="T88" style:family="text">
      <style:text-properties fo:font-style="italic" officeooo:rsid="013fb12b" style:font-style-asian="italic" style:font-style-complex="italic"/>
    </style:style>
    <style:style style:name="T89" style:family="text">
      <style:text-properties fo:font-style="italic" officeooo:rsid="013ff355" style:font-style-asian="italic" style:font-style-complex="italic"/>
    </style:style>
    <style:style style:name="T90" style:family="text">
      <style:text-properties officeooo:rsid="01473ff3"/>
    </style:style>
    <style:style style:name="T91" style:family="text">
      <style:text-properties officeooo:rsid="0153d199"/>
    </style:style>
    <style:style style:name="T92" style:family="text">
      <style:text-properties officeooo:rsid="014d11ac"/>
    </style:style>
    <style:style style:name="T93" style:family="text">
      <style:text-properties officeooo:rsid="01567fbe"/>
    </style:style>
    <style:style style:name="T94" style:family="text">
      <style:text-properties officeooo:rsid="014ddaac"/>
    </style:style>
    <style:style style:name="T95" style:family="text">
      <style:text-properties officeooo:rsid="01563f40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officeooo:rsid="00c55401" style:font-weight-asian="bold" style:font-weight-complex="bold"/>
    </style:style>
    <style:style style:name="T98" style:family="text">
      <style:text-properties fo:font-weight="bold" officeooo:rsid="00c945a8" style:font-weight-asian="bold" style:font-weight-complex="bold"/>
    </style:style>
    <style:style style:name="T99" style:family="text">
      <style:text-properties fo:font-weight="bold" officeooo:rsid="00c5460f" style:font-weight-asian="bold" style:font-weight-complex="bold"/>
    </style:style>
    <style:style style:name="T100" style:family="text">
      <style:text-properties officeooo:rsid="00c5460f"/>
    </style:style>
    <style:style style:name="T101" style:family="text">
      <style:text-properties fo:font-style="italic" officeooo:rsid="00c5460f" style:font-style-asian="italic" style:font-style-complex="italic"/>
    </style:style>
    <style:style style:name="T102" style:family="text">
      <style:text-properties fo:font-weight="bold" officeooo:rsid="00d39f75" style:font-weight-asian="bold" style:font-weight-complex="bold"/>
    </style:style>
    <style:style style:name="T103" style:family="text">
      <style:text-properties fo:font-style="italic" officeooo:rsid="00dcbc28" style:font-style-asian="italic" style:font-style-complex="italic"/>
    </style:style>
    <style:style style:name="T104" style:family="text">
      <style:text-properties fo:font-weight="bold" officeooo:rsid="0128bc99" style:font-weight-asian="bold" style:font-weight-complex="bold"/>
    </style:style>
    <style:style style:name="T105" style:family="text">
      <style:text-properties officeooo:rsid="00cbbf6a"/>
    </style:style>
    <style:style style:name="T106" style:family="text">
      <style:text-properties fo:font-style="italic" officeooo:rsid="00cbbf6a" style:font-style-asian="italic" style:font-style-complex="italic"/>
    </style:style>
    <style:style style:name="T107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6"/>
      <text:p text:style-name="P3"><text:soft-page-break/>2. The Shadows of Vahlvadell</text:p>
      <text:p text:style-name="P37"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<text:span text:style-name="T78">(The Shadows of Vahlvadell, 2026(a), #54) (The Shadows of Vahlvadell, 2026(a), #4</text:span><text:span text:style-name="T79">0</text:span><text:span text:style-name="T78">) (The Shadows of Vahlvadell, 2026(</text:span><text:span text:style-name="T80">b</text:span><text:span text:style-name="T78">), #61).</text:span></text:p>
        </text:list-item>
        <text:list-item>
          <text:p text:style-name="P42">Designed <text:span text:style-name="T81">and</text:span> developed a dynamic weather system <text:span text:style-name="T78">(The Shadows of Vahlvadell, 2026(a), #</text:span><text:span text:style-name="T82">3</text:span><text:span text:style-name="T78">) (The Shadows of Vahlvadell, 2026(</text:span><text:span text:style-name="T80">b</text:span><text:span text:style-name="T78">), #</text:span><text:span text:style-name="T83">31</text:span><text:span text:style-name="T78">) </text:span><text:span text:style-name="T84">(The Shadows of Vahlvadell, 2026(c)). </text:span><text:s/><text:span text:style-name="T81">Then, collaborated with Aaron on implementing it</text:span> <text:span text:style-name="T78">(The Shadows of Vahlvadell, 2026(a), #</text:span><text:span text:style-name="T85">40</text:span><text:span text:style-name="T78">).</text:span></text:p>
        </text:list-item>
        <text:list-item>
          <text:p text:style-name="P43">Collaborated on the design<text:span text:style-name="T48"> </text:span><text:span text:style-name="T86">(The Shadows of Vahlvadell, 2026(c))</text:span><text:span text:style-name="T48"> </text:span>and development of the combat system <text:span text:style-name="T87">(</text:span><text:span text:style-name="T78">The Shadows of Vahlvadell, 2026(a), #</text:span><text:span text:style-name="T87">45</text:span><text:span text:style-name="T78">) </text:span><text:span text:style-name="T87">(</text:span><text:span text:style-name="T78">The Shadows of Vahlvadell, 2026(a), #</text:span><text:span text:style-name="T87">27</text:span><text:span text:style-name="T78">) </text:span><text:span text:style-name="T87">(</text:span><text:span text:style-name="T78">The Shadows of Vahlvadell, 2026(a), #</text:span><text:span text:style-name="T87">16</text:span><text:span text:style-name="T78">) </text:span><text:span text:style-name="T87">(</text:span><text:span text:style-name="T78">The Shadows of Vahlvadell, 2026(a), #</text:span><text:span text:style-name="T87">26</text:span><text:span text:style-name="T78">) <text:s/>(The Shadows of Vahlvadell, 2026(a), #54) (The Shadows of Vahlvadell, 2026(</text:span><text:span text:style-name="T88">b</text:span><text:span text:style-name="T78">), #</text:span><text:span text:style-name="T88">46</text:span><text:span text:style-name="T78">) (The Shadows of Vahlvadell, 2026(</text:span><text:span text:style-name="T88">b</text:span><text:span text:style-name="T78">), #</text:span><text:span text:style-name="T88">47</text:span><text:span text:style-name="T78">) (The Shadows of Vahlvadell, 2026(</text:span><text:span text:style-name="T88">b</text:span><text:span text:style-name="T78">), #</text:span><text:span text:style-name="T88">48</text:span><text:span text:style-name="T78">) (The Shadows of Vahlvadell, 2026(</text:span><text:span text:style-name="T88">b</text:span><text:span text:style-name="T78">), #</text:span><text:span text:style-name="T89">49</text:span><text:span text:style-name="T78">).</text:span></text:p>
        </text:list-item>
      </text:list>
      <text:p text:style-name="P36"/>
      <text:p text:style-name="P44">2. <text:span text:style-name="T90">Personal Website</text:span></text:p>
      <text:p text:style-name="P45">2.1. Overview</text:p>
      <text:p text:style-name="P46">This website is a solo projec<text:span text:style-name="T91">t</text:span>. It is a<text:span text:style-name="T92">n ever-evolving </text:span><text:span text:style-name="T93">website</text:span><text:span text:style-name="T94"> aimed at increasing my understanding and proficiency with web development. </text:span><text:span text:style-name="T95">Currently, the </text:span></text:p>
      <text:p text:style-name="P46"/>
      <text:p text:style-name="P47">(Personal RESTful API, 2026)</text:p>
      <text:p text:style-name="P48"/>
      <text:p text:style-name="P48"/>
      <text:p text:style-name="P48"/>
      <text:p text:style-name="P49">4. Blazejowski.co.uk</text:p>
      <text:p text:style-name="P50"/>
      <text:p text:style-name="P51">mobile-first design,</text:p>
      <text:p text:style-name="P51">security by design,</text:p>
      <text:p text:style-name="P51"><text:soft-page-break/></text:p>
      <text:p text:style-name="P51"/>
      <text:p text:style-name="P52">References:</text:p>
      <text:p text:style-name="P53"/>
      <text:p text:style-name="P54"><text:span text:style-name="T96">Mash It!</text:span><text:span text:style-name="T96"> </text:span><text:span text:style-name="T97">(</text:span><text:span text:style-name="T98">Brewing Game</text:span><text:span text:style-name="T97">)</text:span><text:span text:style-name="T96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5"><text:span text:style-name="T99">Mash It! </text:span><text:span text:style-name="T97">(</text:span><text:span text:style-name="T98">Brewing Game</text:span><text:span text:style-name="T97">)</text:span><text:span text:style-name="T100"> (2026b) </text:span><text:span text:style-name="T101">Pull Requests</text:span><text:span text:style-name="T100">. Available at: </text:span><text:a xlink:type="simple" xlink:href="https://github.com/Brewing-Game/brewing-game/pulls" text:style-name="Internet_20_link" text:visited-style-name="Visited_20_Internet_20_Link"><text:span text:style-name="T100">https://github.com/Brewing-Game/brewing-game/pulls</text:span></text:a><text:span text:style-name="T100"> (Accessed: 20 May 2026).</text:span></text:p>
      <text:p text:style-name="P56"><text:span text:style-name="T96">Mash It! </text:span><text:span text:style-name="T102">(Brewing Game)</text:span> (2026c) <text:span text:style-name="T103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7"/>
      <text:p text:style-name="P58"><text:span text:style-name="T104">The </text:span><text:span text:style-name="T96">Shadows of Vahlvadell (Aaron Stevens)</text:span> <text:span text:style-name="T105">(2026a) </text:span><text:span text:style-name="T106">Kanban</text:span><text:span text:style-name="T105">. Available at: </text:span><text:a xlink:type="simple" xlink:href="https://github.com/users/Strivion/projects/2/views/1" text:style-name="Internet_20_link" text:visited-style-name="Visited_20_Internet_20_Link"><text:span text:style-name="T105">https://github.com/users/Strivion/projects/2/views/1</text:span></text:a><text:span text:style-name="T105"> <text:s/>(Accessed: 20 May 2026).</text:span></text:p>
      <text:p text:style-name="P59"><text:span text:style-name="T104">The </text:span><text:span text:style-name="T96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0"><text:span text:style-name="T104">The </text:span><text:span text:style-name="T96">Shadows of Vahlvadell </text:span><text:span text:style-name="T107">(Aaron Stevens)</text:span><text:span text:style-name="T96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1"/>
      <text:p text:style-name="P62"><text:span text:style-name="T96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7:51:53.328345813</dc:date>
    <meta:editing-duration>PT23H6M57S</meta:editing-duration>
    <meta:editing-cycles>293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59" meta:word-count="939" meta:character-count="6589" meta:non-whitespace-character-count="5705"/>
  </office:meta>
</office:document-meta>
</file>