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9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6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6616f1" officeooo:paragraph-rsid="016616f1" style:font-size-asian="10.5pt" style:font-weight-asian="normal" style:font-size-complex="12pt" style:font-weight-complex="normal"/>
    </style:style>
    <style:style style:name="P50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7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028b6fb"/>
    </style:style>
    <style:style style:name="T75" style:family="text">
      <style:text-properties officeooo:rsid="00292dc4"/>
    </style:style>
    <style:style style:name="T76" style:family="text">
      <style:text-properties officeooo:rsid="0034b93b"/>
    </style:style>
    <style:style style:name="T77" style:family="text">
      <style:text-properties officeooo:rsid="002ec9e2"/>
    </style:style>
    <style:style style:name="T78" style:family="text">
      <style:text-properties officeooo:rsid="0034bc00"/>
    </style:style>
    <style:style style:name="T79" style:family="text">
      <style:text-properties fo:font-style="italic" officeooo:rsid="012b38bd" style:font-style-asian="italic" style:font-style-complex="italic"/>
    </style:style>
    <style:style style:name="T80" style:family="text">
      <style:text-properties fo:font-style="italic" officeooo:rsid="013f3b91" style:font-style-asian="italic" style:font-style-complex="italic"/>
    </style:style>
    <style:style style:name="T81" style:family="text">
      <style:text-properties fo:font-style="italic" officeooo:rsid="012c5674" style:font-style-asian="italic" style:font-style-complex="italic"/>
    </style:style>
    <style:style style:name="T82" style:family="text">
      <style:text-properties officeooo:rsid="00bbe00c"/>
    </style:style>
    <style:style style:name="T83" style:family="text">
      <style:text-properties fo:font-style="italic" officeooo:rsid="01314900" style:font-style-asian="italic" style:font-style-complex="italic"/>
    </style:style>
    <style:style style:name="T84" style:family="text">
      <style:text-properties fo:font-style="italic" officeooo:rsid="01321924" style:font-style-asian="italic" style:font-style-complex="italic"/>
    </style:style>
    <style:style style:name="T85" style:family="text">
      <style:text-properties fo:font-style="italic" officeooo:rsid="0133a86a" style:font-style-asian="italic" style:font-style-complex="italic"/>
    </style:style>
    <style:style style:name="T86" style:family="text">
      <style:text-properties fo:font-style="italic" officeooo:rsid="01353272" style:font-style-asian="italic" style:font-style-complex="italic"/>
    </style:style>
    <style:style style:name="T87" style:family="text">
      <style:text-properties fo:font-style="italic" officeooo:rsid="013c8976" style:font-style-asian="italic" style:font-style-complex="italic"/>
    </style:style>
    <style:style style:name="T88" style:family="text">
      <style:text-properties fo:font-style="italic" officeooo:rsid="013f28b8" style:font-style-asian="italic" style:font-style-complex="italic"/>
    </style:style>
    <style:style style:name="T89" style:family="text">
      <style:text-properties fo:font-style="italic" officeooo:rsid="013fb12b" style:font-style-asian="italic" style:font-style-complex="italic"/>
    </style:style>
    <style:style style:name="T90" style:family="text">
      <style:text-properties fo:font-style="italic" officeooo:rsid="013ff355" style:font-style-asian="italic" style:font-style-complex="italic"/>
    </style:style>
    <style:style style:name="T91" style:family="text">
      <style:text-properties officeooo:rsid="01473ff3"/>
    </style:style>
    <style:style style:name="T92" style:family="text">
      <style:text-properties officeooo:rsid="0153d199"/>
    </style:style>
    <style:style style:name="T93" style:family="text">
      <style:text-properties officeooo:rsid="014d11ac"/>
    </style:style>
    <style:style style:name="T94" style:family="text">
      <style:text-properties officeooo:rsid="01567fbe"/>
    </style:style>
    <style:style style:name="T95" style:family="text">
      <style:text-properties officeooo:rsid="014ddaac"/>
    </style:style>
    <style:style style:name="T96" style:family="text">
      <style:text-properties officeooo:rsid="01632579"/>
    </style:style>
    <style:style style:name="T97" style:family="text">
      <style:text-properties officeooo:rsid="015e3739"/>
    </style:style>
    <style:style style:name="T98" style:family="text">
      <style:text-properties officeooo:rsid="016a33e6"/>
    </style:style>
    <style:style style:name="T99" style:family="text">
      <style:text-properties officeooo:rsid="0164e7bf"/>
    </style:style>
    <style:style style:name="T100" style:family="text">
      <style:text-properties officeooo:rsid="0165327b"/>
    </style:style>
    <style:style style:name="T101" style:family="text">
      <style:text-properties officeooo:rsid="014a4db4"/>
    </style:style>
    <style:style style:name="T102" style:family="text">
      <style:text-properties officeooo:rsid="015f0486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c55401" style:font-weight-asian="bold" style:font-weight-complex="bold"/>
    </style:style>
    <style:style style:name="T105" style:family="text">
      <style:text-properties fo:font-weight="bold" officeooo:rsid="00c945a8" style:font-weight-asian="bold" style:font-weight-complex="bold"/>
    </style:style>
    <style:style style:name="T106" style:family="text">
      <style:text-properties fo:font-weight="bold" officeooo:rsid="00c5460f" style:font-weight-asian="bold" style:font-weight-complex="bold"/>
    </style:style>
    <style:style style:name="T107" style:family="text">
      <style:text-properties officeooo:rsid="00c5460f"/>
    </style:style>
    <style:style style:name="T108" style:family="text">
      <style:text-properties fo:font-style="italic" officeooo:rsid="00c5460f" style:font-style-asian="italic" style:font-style-complex="italic"/>
    </style:style>
    <style:style style:name="T109" style:family="text">
      <style:text-properties fo:font-weight="bold" officeooo:rsid="00d39f75" style:font-weight-asian="bold" style:font-weight-complex="bold"/>
    </style:style>
    <style:style style:name="T110" style:family="text">
      <style:text-properties fo:font-style="italic" officeooo:rsid="00dcbc28" style:font-style-asian="italic" style:font-style-complex="italic"/>
    </style:style>
    <style:style style:name="T111" style:family="text">
      <style:text-properties fo:font-weight="bold" officeooo:rsid="0128bc99" style:font-weight-asian="bold" style:font-weight-complex="bold"/>
    </style:style>
    <style:style style:name="T112" style:family="text">
      <style:text-properties officeooo:rsid="00cbbf6a"/>
    </style:style>
    <style:style style:name="T113" style:family="text">
      <style:text-properties fo:font-style="italic" officeooo:rsid="00cbbf6a" style:font-style-asian="italic" style:font-style-complex="italic"/>
    </style:style>
    <style:style style:name="T114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<text:soft-page-break/>1.2(<text:span text:style-name="T73">g</text:span>). <text:span text:style-name="T73">Workflow</text:span></text:p>
      <text:p text:style-name="P37"/>
      <text:p text:style-name="P37"/>
      <text:p text:style-name="P36"/>
      <text:p text:style-name="P3">2. The Shadows of Vahlvadell</text:p>
      <text:p text:style-name="P38">2.1. Overview</text:p>
      <text:p text:style-name="P39">The Shadows of Vahlvadell is a Role-Playing <text:span text:style-name="T74">G</text:span>ame (RPG) <text:span text:style-name="T74">tit</text:span><text:span text:style-name="T75">le </text:span><text:span text:style-name="T76">lead by</text:span><text:span text:style-name="T75"> Aaron Stevens. </text:span><text:span text:style-name="T77">It is developed in Unreal Engine for </text:span><text:span text:style-name="T76">Windows and Linux. The project follows the Agile methodology. </text:span><text:span text:style-name="T78">During development, I fulfilled the role of a software developer.</text:span></text:p>
      <text:p text:style-name="P39"/>
      <text:p text:style-name="P40">2.2. Involvement</text:p>
      <text:p text:style-name="P41">2.2(a) Systems</text:p>
      <text:list text:style-name="L6">
        <text:list-item>
          <text:p text:style-name="P42">Given my previous experience with developing inventory systems for another project (Scattered Lands), I was assigned to the task of designing and implementing an inventory system <text:span text:style-name="T79">(The Shadows of Vahlvadell, 2026(a), #54) (The Shadows of Vahlvadell, 2026(a), #4</text:span><text:span text:style-name="T80">0</text:span><text:span text:style-name="T79">) (The Shadows of Vahlvadell, 2026(</text:span><text:span text:style-name="T81">b</text:span><text:span text:style-name="T79">), #61).</text:span></text:p>
        </text:list-item>
        <text:list-item>
          <text:p text:style-name="P43">Designed <text:span text:style-name="T82">and</text:span> developed a dynamic weather system <text:span text:style-name="T79">(The Shadows of Vahlvadell, 2026(a), #</text:span><text:span text:style-name="T83">3</text:span><text:span text:style-name="T79">) (The Shadows of Vahlvadell, 2026(</text:span><text:span text:style-name="T81">b</text:span><text:span text:style-name="T79">), #</text:span><text:span text:style-name="T84">31</text:span><text:span text:style-name="T79">) </text:span><text:span text:style-name="T85">(The Shadows of Vahlvadell, 2026(c)). </text:span><text:s/><text:span text:style-name="T82">Then, collaborated with Aaron on implementing it</text:span> <text:span text:style-name="T79">(The Shadows of Vahlvadell, 2026(a), #</text:span><text:span text:style-name="T86">40</text:span><text:span text:style-name="T79">).</text:span></text:p>
        </text:list-item>
        <text:list-item>
          <text:p text:style-name="P44">Collaborated on the design<text:span text:style-name="T48"> </text:span><text:span text:style-name="T87">(The Shadows of Vahlvadell, 2026(c))</text:span><text:span text:style-name="T48"> </text:span>and development of the combat system <text:span text:style-name="T88">(</text:span><text:span text:style-name="T79">The Shadows of Vahlvadell, 2026(a), #</text:span><text:span text:style-name="T88">45</text:span><text:span text:style-name="T79">) </text:span><text:span text:style-name="T88">(</text:span><text:span text:style-name="T79">The Shadows of Vahlvadell, 2026(a), #</text:span><text:span text:style-name="T88">27</text:span><text:span text:style-name="T79">) </text:span><text:span text:style-name="T88">(</text:span><text:span text:style-name="T79">The Shadows of Vahlvadell, 2026(a), #</text:span><text:span text:style-name="T88">16</text:span><text:span text:style-name="T79">) </text:span><text:span text:style-name="T88">(</text:span><text:span text:style-name="T79">The Shadows of Vahlvadell, 2026(a), #</text:span><text:span text:style-name="T88">26</text:span><text:span text:style-name="T79">) <text:s/>(The Shadows of Vahlvadell, 2026(a), #54) (The Shadows of Vahlvadell, 2026(</text:span><text:span text:style-name="T89">b</text:span><text:span text:style-name="T79">), #</text:span><text:span text:style-name="T89">46</text:span><text:span text:style-name="T79">) (The Shadows of Vahlvadell, 2026(</text:span><text:span text:style-name="T89">b</text:span><text:span text:style-name="T79">), #</text:span><text:span text:style-name="T89">47</text:span><text:span text:style-name="T79">) (The Shadows of Vahlvadell, 2026(</text:span><text:span text:style-name="T89">b</text:span><text:span text:style-name="T79">), #</text:span><text:span text:style-name="T89">48</text:span><text:span text:style-name="T79">) (The Shadows of Vahlvadell, 2026(</text:span><text:span text:style-name="T89">b</text:span><text:span text:style-name="T79">), #</text:span><text:span text:style-name="T90">49</text:span><text:span text:style-name="T79">).</text:span></text:p>
        </text:list-item>
      </text:list>
      <text:p text:style-name="P36"/>
      <text:p text:style-name="P45">2. <text:span text:style-name="T91">Personal Website</text:span></text:p>
      <text:p text:style-name="P46">2.1. Overview</text:p>
      <text:p text:style-name="P47">This website is a solo projec<text:span text:style-name="T92">t</text:span>. It is a<text:span text:style-name="T93">n ever-evolving </text:span><text:span text:style-name="T94">website</text:span><text:span text:style-name="T95"> aimed at increasing my understanding and proficiency with web development. </text:span><text:span text:style-name="T96">It is built on Flask in Python, and runs on</text:span><text:span text:style-name="T97"> a raspberry pi computer, within a docker container. It uses a PostgreSQL database which is contained within a separate </text:span><text:span text:style-name="T98">docker container</text:span><text:span text:style-name="T97"> for security. </text:span><text:span text:style-name="T99">For additional layer of security, the incoming connections go through an NginX server. </text:span><text:span text:style-name="T100">So far, maintaining this project helped me gain understanding and experience in the following </text:span><text:span text:style-name="T101">(Personal RESTful API, 2026)</text:span><text:span text:style-name="T100">:</text:span></text:p>
      <text:list text:style-name="L7">
        <text:list-item>
          <text:p text:style-name="P48">Mobile-first design </text:p>
          <text:list>
            <text:list-item>
              <text:p text:style-name="P49">The website is built with mobile devices in mind. If a given feature doesn’t work on mobile, it is rejected.</text:p>
            </text:list-item>
          </text:list>
        </text:list-item>
        <text:list-item>
          <text:p text:style-name="P48"><text:soft-page-break/>Security by design</text:p>
          <text:list>
            <text:list-item>
              <text:p text:style-name="P48"/>
            </text:list-item>
          </text:list>
        </text:list-item>
        <text:list-item>
          <text:p text:style-name="P50">Containerisation</text:p>
        </text:list-item>
        <text:list-item>
          <text:p text:style-name="P51">RESTful API<text:span text:style-name="T102">s</text:span></text:p>
        </text:list-item>
      </text:list>
      <text:p text:style-name="P52"/>
      <text:p text:style-name="P53"/>
      <text:p text:style-name="P54"/>
      <text:p text:style-name="P54"/>
      <text:p text:style-name="P55"/>
      <text:p text:style-name="P56"/>
      <text:p text:style-name="P56"/>
      <text:p text:style-name="P57">References:</text:p>
      <text:p text:style-name="P58"/>
      <text:p text:style-name="P59"><text:span text:style-name="T103">Mash It!</text:span><text:span text:style-name="T103"> </text:span><text:span text:style-name="T104">(</text:span><text:span text:style-name="T105">Brewing Game</text:span><text:span text:style-name="T104">)</text:span><text:span text:style-name="T103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60"><text:span text:style-name="T106">Mash It! </text:span><text:span text:style-name="T104">(</text:span><text:span text:style-name="T105">Brewing Game</text:span><text:span text:style-name="T104">)</text:span><text:span text:style-name="T107"> (2026b) </text:span><text:span text:style-name="T108">Pull Requests</text:span><text:span text:style-name="T107">. Available at: </text:span><text:a xlink:type="simple" xlink:href="https://github.com/Brewing-Game/brewing-game/pulls" text:style-name="Internet_20_link" text:visited-style-name="Visited_20_Internet_20_Link"><text:span text:style-name="T107">https://github.com/Brewing-Game/brewing-game/pulls</text:span></text:a><text:span text:style-name="T107"> (Accessed: 20 May 2026).</text:span></text:p>
      <text:p text:style-name="P61"><text:span text:style-name="T103">Mash It! </text:span><text:span text:style-name="T109">(Brewing Game)</text:span> (2026c) <text:span text:style-name="T110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2"/>
      <text:p text:style-name="P63"><text:span text:style-name="T111">The </text:span><text:span text:style-name="T103">Shadows of Vahlvadell (Aaron Stevens)</text:span> <text:span text:style-name="T112">(2026a) </text:span><text:span text:style-name="T113">Kanban</text:span><text:span text:style-name="T112">. Available at: </text:span><text:a xlink:type="simple" xlink:href="https://github.com/users/Strivion/projects/2/views/1" text:style-name="Internet_20_link" text:visited-style-name="Visited_20_Internet_20_Link"><text:span text:style-name="T112">https://github.com/users/Strivion/projects/2/views/1</text:span></text:a><text:span text:style-name="T112"> <text:s/>(Accessed: 20 May 2026).</text:span></text:p>
      <text:p text:style-name="P64"><text:span text:style-name="T111">The </text:span><text:span text:style-name="T103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5"><text:span text:style-name="T111">The </text:span><text:span text:style-name="T103">Shadows of Vahlvadell </text:span><text:span text:style-name="T114">(Aaron Stevens)</text:span><text:span text:style-name="T103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6"/>
      <text:p text:style-name="P67"><text:span text:style-name="T103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4:26.327035921</dc:date>
    <meta:editing-duration>P1DT9M22S</meta:editing-duration>
    <meta:editing-cycles>310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2" meta:word-count="1026" meta:character-count="7087" meta:non-whitespace-character-count="6124"/>
  </office:meta>
</office:document-meta>
</file>