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5cc82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77cae"/>
    </style:style>
    <style:style style:name="T57" style:family="text">
      <style:text-properties officeooo:rsid="00b8b638"/>
    </style:style>
    <style:style style:name="T58" style:family="text">
      <style:text-properties officeooo:rsid="00ba36a9"/>
    </style:style>
    <style:style style:name="T59" style:family="text">
      <style:text-properties officeooo:rsid="003f25fd"/>
    </style:style>
    <style:style style:name="T60" style:family="text">
      <style:text-properties officeooo:rsid="002d47dc"/>
    </style:style>
    <style:style style:name="T61" style:family="text">
      <style:text-properties officeooo:rsid="00371c2c"/>
    </style:style>
    <style:style style:name="T62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, developed, and implement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6">(</text:span><text:a xlink:type="simple" xlink:href="https://github.com/Strivion/Vahlvadell/pull/31" text:style-name="Internet_20_link" text:visited-style-name="Visited_20_Internet_20_Link"><text:span text:style-name="T56">https://github.com/Strivion/Vahlvadell/pull/31</text:span></text:a><text:span text:style-name="T56">) </text:span><text:span text:style-name="T57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7">https://app.mural.co/t/vahlvadell2492/m/vahlvadell2492/1764354812668/d19544649393d65be72b9d83c2dc84425e20fd06</text:span></text:a><text:span text:style-name="T57">) </text:span><text:span text:style-name="T58">(</text:span><text:a xlink:type="simple" xlink:href="https://github.com/Strivion/Vahlvadell/issues/40" text:style-name="Internet_20_link" text:visited-style-name="Visited_20_Internet_20_Link"><text:span text:style-name="T58">https://github.com/Strivion/Vahlvadell/issues/40</text:span></text:a><text:span text:style-name="T58">) </text:span></text:p>
        </text:list-item>
        <text:list-item>
          <text:p text:style-name="P37"/>
        </text:list-item>
      </text:list>
      <text:p text:style-name="P38"><text:span text:style-name="T59">2</text:span>.2(a). Inventory System</text:p>
      <text:p text:style-name="P35"><text:s/></text:p>
      <text:p text:style-name="P35"/>
      <text:p text:style-name="P38"><text:span text:style-name="T59">2</text:span>.2(b). Weather System</text:p>
      <text:p text:style-name="P38"><text:span text:style-name="T59">2</text:span>.2(c). Combat System</text:p>
      <text:p text:style-name="P39"/>
      <text:p text:style-name="P31"/>
      <text:p text:style-name="P31">3. MauiScreenTime</text:p>
      <text:p text:style-name="P40"/>
      <text:p text:style-name="P41"><text:span text:style-name="T60">3</text:span>.1. Overview</text:p>
      <text:p text:style-name="P42">“MauiScreenTime” is a mobile application for <text:span text:style-name="T61">A</text:span>ndroid and IOS. <text:span text:style-name="T62">It follows the Agile methodology. </text:span><text:span text:style-name="T61">Although my involvement with it was brief, during its development I fulfilled the role of a software developer.</text:span></text:p>
      <text:p text:style-name="P42"/>
      <text:p text:style-name="P34">3.2. Involvement</text:p>
      <text:p text:style-name="P43"/>
      <text:p text:style-name="P44">3.2(a). </text:p>
      <text:p text:style-name="P31"/>
      <text:p text:style-name="P31"/>
      <text:p text:style-name="P31"/>
      <text:p text:style-name="P45">4. Blazejowski.co.uk</text:p>
      <text:p text:style-name="P46">mobile-first design,</text:p>
      <text:p text:style-name="P46">security by design,</text:p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34:19.539892319</dc:date>
    <meta:editing-duration>PT21H50M34S</meta:editing-duration>
    <meta:editing-cycles>160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7" meta:word-count="658" meta:character-count="6442" meta:non-whitespace-character-count="5844"/>
  </office:meta>
</office:document-meta>
</file>