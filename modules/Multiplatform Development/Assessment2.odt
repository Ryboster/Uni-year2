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514dc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0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7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2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4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7" style:family="paragraph" style:parent-style-name="Text_20_body" style:list-style-name="L6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8" style:family="paragraph" style:parent-style-name="Text_20_body" style:list-style-name="L6">
      <style:text-properties fo:font-size="12pt" fo:font-weight="normal" officeooo:rsid="00b5cc82" officeooo:paragraph-rsid="00bd526c" style:font-size-asian="10.5pt" style:font-weight-asian="normal" style:font-size-complex="12pt" style:font-weight-complex="normal"/>
    </style:style>
    <style:style style:name="P39" style:family="paragraph" style:parent-style-name="Text_20_body" style:list-style-name="L6">
      <style:text-properties fo:font-size="12pt" fo:font-weight="normal" officeooo:rsid="00be4142" officeooo:paragraph-rsid="00be4142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2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7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8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49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0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1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2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officeooo:rsid="00ee2ea4"/>
    </style:style>
    <style:style style:name="T20" style:family="text">
      <style:text-properties fo:font-style="italic" officeooo:rsid="00eaec27" style:font-style-asian="italic" style:font-style-complex="italic"/>
    </style:style>
    <style:style style:name="T21" style:family="text">
      <style:text-properties fo:font-style="italic" officeooo:rsid="00e76afe" style:font-style-asian="italic" style:font-style-complex="italic"/>
    </style:style>
    <style:style style:name="T22" style:family="text">
      <style:text-properties fo:font-style="italic" officeooo:rsid="00e93749" style:font-style-asian="italic" style:font-style-complex="italic"/>
    </style:style>
    <style:style style:name="T23" style:family="text">
      <style:text-properties fo:font-style="italic" officeooo:rsid="00ed30b1" style:font-style-asian="italic" style:font-style-complex="italic"/>
    </style:style>
    <style:style style:name="T24" style:family="text">
      <style:text-properties fo:font-style="italic" officeooo:rsid="00ec9b7b" style:font-style-asian="italic" style:font-style-complex="italic"/>
    </style:style>
    <style:style style:name="T25" style:family="text">
      <style:text-properties officeooo:rsid="00464452"/>
    </style:style>
    <style:style style:name="T26" style:family="text">
      <style:text-properties officeooo:rsid="006c29f7"/>
    </style:style>
    <style:style style:name="T27" style:family="text">
      <style:text-properties fo:font-style="italic" officeooo:rsid="00f19e45" style:font-style-asian="italic" style:font-style-complex="italic"/>
    </style:style>
    <style:style style:name="T28" style:family="text">
      <style:text-properties officeooo:rsid="00702fba"/>
    </style:style>
    <style:style style:name="T29" style:family="text">
      <style:text-properties officeooo:rsid="007d6def"/>
    </style:style>
    <style:style style:name="T30" style:family="text">
      <style:text-properties officeooo:rsid="00737515"/>
    </style:style>
    <style:style style:name="T31" style:family="text">
      <style:text-properties officeooo:rsid="0043dd38"/>
    </style:style>
    <style:style style:name="T32" style:family="text">
      <style:text-properties officeooo:rsid="007bf3b9"/>
    </style:style>
    <style:style style:name="T33" style:family="text">
      <style:text-properties officeooo:rsid="007c2844"/>
    </style:style>
    <style:style style:name="T34" style:family="text">
      <style:text-properties officeooo:rsid="00808e5a"/>
    </style:style>
    <style:style style:name="T35" style:family="text">
      <style:text-properties officeooo:rsid="005ab55a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4756e2" style:font-style-asian="italic" style:font-style-complex="italic"/>
    </style:style>
    <style:style style:name="T38" style:family="text">
      <style:text-properties officeooo:rsid="009834f9"/>
    </style:style>
    <style:style style:name="T39" style:family="text">
      <style:text-properties officeooo:rsid="009460b7"/>
    </style:style>
    <style:style style:name="T40" style:family="text">
      <style:text-properties officeooo:rsid="0098c8f8"/>
    </style:style>
    <style:style style:name="T41" style:family="text">
      <style:text-properties officeooo:rsid="009a3d00"/>
    </style:style>
    <style:style style:name="T42" style:family="text">
      <style:text-properties officeooo:rsid="00a24646"/>
    </style:style>
    <style:style style:name="T43" style:family="text">
      <style:text-properties officeooo:rsid="00a2eaac"/>
    </style:style>
    <style:style style:name="T44" style:family="text">
      <style:text-properties officeooo:rsid="009a7b88"/>
    </style:style>
    <style:style style:name="T45" style:family="text">
      <style:text-properties officeooo:rsid="009fff75"/>
    </style:style>
    <style:style style:name="T46" style:family="text">
      <style:text-properties officeooo:rsid="009acea7"/>
    </style:style>
    <style:style style:name="T47" style:family="text">
      <style:text-properties officeooo:rsid="009bb78c"/>
    </style:style>
    <style:style style:name="T48" style:family="text">
      <style:text-properties officeooo:rsid="00a5a3b9"/>
    </style:style>
    <style:style style:name="T49" style:family="text">
      <style:text-properties officeooo:rsid="00a72f38"/>
    </style:style>
    <style:style style:name="T50" style:family="text">
      <style:text-properties officeooo:rsid="00aca96f"/>
    </style:style>
    <style:style style:name="T51" style:family="text">
      <style:text-properties officeooo:rsid="00a9e1df"/>
    </style:style>
    <style:style style:name="T52" style:family="text">
      <style:text-properties officeooo:rsid="00adf5f8"/>
    </style:style>
    <style:style style:name="T53" style:family="text">
      <style:text-properties officeooo:rsid="00ae3ed0"/>
    </style:style>
    <style:style style:name="T54" style:family="text">
      <style:text-properties officeooo:rsid="00a9ff1a"/>
    </style:style>
    <style:style style:name="T55" style:family="text">
      <style:text-properties officeooo:rsid="00aacec0"/>
    </style:style>
    <style:style style:name="T56" style:family="text">
      <style:text-properties officeooo:rsid="004756e2"/>
    </style:style>
    <style:style style:name="T57" style:family="text">
      <style:text-properties officeooo:rsid="0028b6fb"/>
    </style:style>
    <style:style style:name="T58" style:family="text">
      <style:text-properties officeooo:rsid="00292dc4"/>
    </style:style>
    <style:style style:name="T59" style:family="text">
      <style:text-properties officeooo:rsid="0034b93b"/>
    </style:style>
    <style:style style:name="T60" style:family="text">
      <style:text-properties officeooo:rsid="002ec9e2"/>
    </style:style>
    <style:style style:name="T61" style:family="text">
      <style:text-properties officeooo:rsid="0034bc00"/>
    </style:style>
    <style:style style:name="T62" style:family="text">
      <style:text-properties officeooo:rsid="00bbe00c"/>
    </style:style>
    <style:style style:name="T63" style:family="text">
      <style:text-properties officeooo:rsid="00b77cae"/>
    </style:style>
    <style:style style:name="T64" style:family="text">
      <style:text-properties officeooo:rsid="00b8b638"/>
    </style:style>
    <style:style style:name="T65" style:family="text">
      <style:text-properties officeooo:rsid="00ba36a9"/>
    </style:style>
    <style:style style:name="T66" style:family="text">
      <style:text-properties officeooo:rsid="00c1e35c"/>
    </style:style>
    <style:style style:name="T67" style:family="text">
      <style:text-properties officeooo:rsid="003f25fd"/>
    </style:style>
    <style:style style:name="T68" style:family="text">
      <style:text-properties officeooo:rsid="002d47dc"/>
    </style:style>
    <style:style style:name="T69" style:family="text">
      <style:text-properties officeooo:rsid="00371c2c"/>
    </style:style>
    <style:style style:name="T70" style:family="text">
      <style:text-properties officeooo:rsid="003a16a5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c55401" style:font-weight-asian="bold" style:font-weight-complex="bold"/>
    </style:style>
    <style:style style:name="T73" style:family="text">
      <style:text-properties fo:font-weight="bold" officeooo:rsid="00c945a8" style:font-weight-asian="bold" style:font-weight-complex="bold"/>
    </style:style>
    <style:style style:name="T74" style:family="text">
      <style:text-properties fo:font-weight="bold" officeooo:rsid="00c5460f" style:font-weight-asian="bold" style:font-weight-complex="bold"/>
    </style:style>
    <style:style style:name="T75" style:family="text">
      <style:text-properties officeooo:rsid="00c5460f"/>
    </style:style>
    <style:style style:name="T76" style:family="text">
      <style:text-properties fo:font-style="italic" officeooo:rsid="00c5460f" style:font-style-asian="italic" style:font-style-complex="italic"/>
    </style:style>
    <style:style style:name="T77" style:family="text">
      <style:text-properties fo:font-weight="bold" officeooo:rsid="00d39f75" style:font-weight-asian="bold" style:font-weight-complex="bold"/>
    </style:style>
    <style:style style:name="T78" style:family="text">
      <style:text-properties fo:font-style="italic" officeooo:rsid="00dcbc28" style:font-style-asian="italic" style:font-style-complex="italic"/>
    </style:style>
    <style:style style:name="T79" style:family="text">
      <style:text-properties officeooo:rsid="00cbbf6a"/>
    </style:style>
    <style:style style:name="T80" style:family="text">
      <style:text-properties fo:font-style="italic" officeooo:rsid="00cbbf6a" style:font-style-asian="italic" style:font-style-complex="italic"/>
    </style:style>
    <style:style style:name="T81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T19) (Mash It!, 2026(b), PR27).</text:span></text:p>
        </text:list-item>
        <text:list-item>
          <text:p text:style-name="P11">Development and implement<text:span text:style-name="T19">ed</text:span> of the settings menu <text:span text:style-name="T18">(Mash It!, 2026(</text:span><text:span text:style-name="T20">b</text:span><text:span text:style-name="T18">), </text:span><text:span text:style-name="T20">PR</text:span><text:span text:style-name="T21">67</text:span><text:span text:style-name="T18">) (Mash It!, 2026(</text:span><text:span text:style-name="T20">a</text:span><text:span text:style-name="T18">), T</text:span><text:span text:style-name="T21">51</text:span><text:span text:style-name="T18">) (Mash It!, 2026(</text:span><text:span text:style-name="T20">a</text:span><text:span text:style-name="T18">), </text:span><text:span text:style-name="T20">T</text:span><text:span text:style-name="T22">54</text:span><text:span text:style-name="T18">) (Mash It!, 2026(</text:span><text:span text:style-name="T23">a</text:span><text:span text:style-name="T18">), </text:span><text:span text:style-name="T24">T</text:span><text:span text:style-name="T22">49</text:span><text:span text:style-name="T18">).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1.2(b). <text:span text:style-name="T25">Accessibility</text:span></text:p>
      <text:p text:style-name="P14">This game puts emphasis on accessibility. As developers, we wanted the game to be accessible to as many people as possible. Give<text:span text:style-name="T26">n its educational purpose, the game needed to run smoothly on relatively low-end hardware, and be possible to run on a wide variety of desktop operating systems.</text:span></text:p>
      <text:p text:style-name="P15"><text:soft-page-break/>Tutorial, TTS, hover highlight scrip</text:p>
      <text:list text:style-name="L2">
        <text:list-item>
          <text:p text:style-name="P16">Implementation of hover highlight <text:span text:style-name="T18">(Mash It!, 2026(</text:span><text:span text:style-name="T27">b</text:span><text:span text:style-name="T18">), </text:span><text:span text:style-name="T27">PR44</text:span><text:span text:style-name="T18">) (Mash It!, 2026(</text:span><text:span text:style-name="T27">a</text:span><text:span text:style-name="T18">), </text:span><text:span text:style-name="T27">T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T19) (Mash It!, 2026(b), PR27).</text:span>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8">(</text:span><text:a xlink:type="simple" xlink:href="https://github.com/Brewing-Game/brewing-game/pull/85" text:style-name="Internet_20_link" text:visited-style-name="Visited_20_Internet_20_Link"><text:span text:style-name="T28">https://github.com/Brewing-Game/brewing-game/pull/85</text:span></text:a><text:span text:style-name="T28">) (</text:span><text:a xlink:type="simple" xlink:href="https://github.com/Brewing-Game/brewing-game/pull/89" text:style-name="Internet_20_link" text:visited-style-name="Visited_20_Internet_20_Link"><text:span text:style-name="T28">https://github.com/Brewing-Game/brewing-game/pull/89</text:span></text:a><text:span text:style-name="T28">) </text:span><text:span text:style-name="T29">(</text:span><text:a xlink:type="simple" xlink:href="https://github.com/Brewing-Game/brewing-game/issues/72" text:style-name="Internet_20_link" text:visited-style-name="Visited_20_Internet_20_Link"><text:span text:style-name="T29">https://github.com/Brewing-Game/brewing-game/issues/72</text:span></text:a><text:span text:style-name="T29">)</text:span></text:p>
        </text:list-item>
        <text:list-item>
          <text:p text:style-name="P18">Creation and implementation of sound effects <text:span text:style-name="T30">(</text:span><text:a xlink:type="simple" xlink:href="https://github.com/Brewing-Game/brewing-game/issues/63" text:style-name="Internet_20_link" text:visited-style-name="Visited_20_Internet_20_Link"><text:span text:style-name="T30">https://github.com/Brewing-Game/brewing-game/issues/63</text:span></text:a><text:span text:style-name="T30">) (</text:span><text:a xlink:type="simple" xlink:href="https://github.com/Brewing-Game/brewing-game/pull/64" text:style-name="Internet_20_link" text:visited-style-name="Visited_20_Internet_20_Link"><text:span text:style-name="T30">https://github.com/Brewing-Game/brewing-game/pull/64</text:span></text:a><text:span text:style-name="T30">)</text:span></text:p>
          <text:p text:style-name="P18"/>
        </text:list-item>
      </text:list>
      <text:p text:style-name="P13">1.2(c). <text:span text:style-name="T31">Debugging</text:span></text:p>
      <text:p text:style-name="P19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0">Separated mouse interactions between UI and game level. Before this patch, clicking a UI element would also click the underlying scene objects (like our mash tuns). <text:span text:style-name="T32">I patched it. (</text:span><text:a xlink:type="simple" xlink:href="https://github.com/Brewing-Game/brewing-game/issues/91" text:style-name="Internet_20_link" text:visited-style-name="Visited_20_Internet_20_Link"><text:span text:style-name="T32">https://github.com/Brewing-Game/brewing-game/issues/91</text:span></text:a><text:span text:style-name="T32">) </text:span><text:span text:style-name="T33">(</text:span><text:a xlink:type="simple" xlink:href="https://github.com/Brewing-Game/brewing-game/pull/93" text:style-name="Internet_20_link" text:visited-style-name="Visited_20_Internet_20_Link"><text:span text:style-name="T33">https://github.com/Brewing-Game/brewing-game/pull/93</text:span></text:a><text:span text:style-name="T33">)</text:span></text:p>
          <text:p text:style-name="P20"/>
        </text:list-item>
      </text:list>
      <text:p text:style-name="P13">1.2(d). <text:span text:style-name="T31">U</text:span><text:span text:style-name="T34">ser Interface (UI)</text:span></text:p>
      <text:p text:style-name="P21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2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3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35">(</text:span><text:a xlink:type="simple" xlink:href="https://github.com/Brewing-Game/brewing-game/pull/90" text:style-name="Internet_20_link" text:visited-style-name="Visited_20_Internet_20_Link"><text:span text:style-name="T35">https://github.com/Brewing-Game/brewing-game/pull/90</text:span></text:a><text:span text:style-name="T35">)</text:span></text:p>
        </text:list-item>
        <text:list-item>
          <text:p text:style-name="P24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1"/>
      <text:p text:style-name="P25">shop, main menu, settings menu, heads-up display (HUD) design, </text:p>
      <text:p text:style-name="P26"><text:span text:style-name="T36">1.2(e). </text:span><text:span text:style-name="T37">Documentation</text:span></text:p>
      <text:p text:style-name="P27">Development is not just about writing effective code. A big part of development is definition and effective application of <text:span text:style-name="T38">organisational</text:span> guidelines. <text:span text:style-name="T39">Our team understood it well </text:span><text:span text:style-name="T40">since</text:span><text:span text:style-name="T39"> the beginning of the project, and given my previous experience with this, I was tasked with creating the following documentation:</text:span></text:p>
      <text:list text:style-name="L5">
        <text:list-item>
          <text:p text:style-name="P28"><text:soft-page-break/>Justification of Choices Documentation; <text:span text:style-name="T41">this document answers the “what?” and “why?” with respect to the various design choices. </text:span><text:span text:style-name="T42">(</text:span><text:a xlink:type="simple" xlink:href="https://github.com/Brewing-Game/brewing-game/blob/dev/Documentation/justification_of_choices.md" text:style-name="Internet_20_link" text:visited-style-name="Visited_20_Internet_20_Link"><text:span text:style-name="T42">https://github.com/Brewing-Game/brewing-game/blob/dev/Documentation/justification_of_choices.md</text:span></text:a><text:span text:style-name="T42">) </text:span><text:span text:style-name="T43">(</text:span><text:a xlink:type="simple" xlink:href="https://github.com/Brewing-Game/brewing-game/issues/3" text:style-name="Internet_20_link" text:visited-style-name="Visited_20_Internet_20_Link"><text:span text:style-name="T43">https://github.com/Brewing-Game/brewing-game/issues/3</text:span></text:a><text:span text:style-name="T43">)</text:span></text:p>
        </text:list-item>
        <text:list-item>
          <text:p text:style-name="P29">Coding <text:span text:style-name="T44">b</text:span>est <text:span text:style-name="T44">p</text:span>ractices – <text:span text:style-name="T45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45">https://github.com/Brewing-Game/brewing-game/blob/dev/Documentation/coding_practices.md</text:span></text:a><text:span text:style-name="T45">) (</text:span><text:a xlink:type="simple" xlink:href="https://github.com/Brewing-Game/brewing-game/issues/1" text:style-name="Internet_20_link" text:visited-style-name="Visited_20_Internet_20_Link"><text:span text:style-name="T45">https://github.com/Brewing-Game/brewing-game/issues/1</text:span></text:a><text:span text:style-name="T45">)</text:span></text:p>
        </text:list-item>
        <text:list-item>
          <text:p text:style-name="P29">Directory <text:span text:style-name="T44">s</text:span>tructure <text:span text:style-name="T44">c</text:span>onvention – <text:span text:style-name="T46">This document outlines </text:span><text:span text:style-name="T47">file storage constraints; what goes where. </text:span><text:span text:style-name="T48">(</text:span><text:a xlink:type="simple" xlink:href="https://github.com/Brewing-Game/brewing-game/blob/dev/Documentation/directory_structure_convention.md" text:style-name="Internet_20_link" text:visited-style-name="Visited_20_Internet_20_Link"><text:span text:style-name="T48">https://github.com/Brewing-Game/brewing-game/blob/dev/Documentation/directory_structure_convention.md</text:span></text:a><text:span text:style-name="T48">) </text:span><text:span text:style-name="T49">(</text:span><text:a xlink:type="simple" xlink:href="https://github.com/Brewing-Game/brewing-game/issues/2" text:style-name="Internet_20_link" text:visited-style-name="Visited_20_Internet_20_Link"><text:span text:style-name="T49">https://github.com/Brewing-Game/brewing-game/issues/2</text:span></text:a><text:span text:style-name="T49">)</text:span></text:p>
        </text:list-item>
        <text:list-item>
          <text:p text:style-name="P30">Pull request (PR) documentation. This document outlines <text:span text:style-name="T50">the acceptable conduct within the GitHub workflow</text:span><text:span text:style-name="T51">. </text:span><text:span text:style-name="T52">It ensures tha</text:span><text:span text:style-name="T53">t programmers understand </text:span><text:span text:style-name="T51"><text:s/></text:span><text:span text:style-name="T54">(</text:span><text:a xlink:type="simple" xlink:href="https://github.com/Brewing-Game/brewing-game/blob/dev/Documentation/github_workflow.md" text:style-name="Internet_20_link" text:visited-style-name="Visited_20_Internet_20_Link"><text:span text:style-name="T54">https://github.com/Brewing-Game/brewing-game/blob/dev/Documentation/github_workflow.md</text:span></text:a><text:span text:style-name="T54">) </text:span><text:span text:style-name="T55">(</text:span><text:a xlink:type="simple" xlink:href="https://github.com/Brewing-Game/brewing-game/issues/9" text:style-name="Internet_20_link" text:visited-style-name="Visited_20_Internet_20_Link"><text:span text:style-name="T55">https://github.com/Brewing-Game/brewing-game/issues/9</text:span></text:a><text:span text:style-name="T55">)</text:span></text:p>
        </text:list-item>
        <text:list-item>
          <text:p text:style-name="P30"/>
        </text:list-item>
      </text:list>
      <text:p text:style-name="P13">1.2(f). <text:span text:style-name="T56">Design</text:span></text:p>
      <text:p text:style-name="P31">During the development, design decisions were made together as a team. Results of our discussions were recorded on mural (<text:a xlink:type="simple" xlink:href="https://app.mural.co/t/farmingsimulator9293/m/farmingsimulator9293/1762074910299/66ec2841ac6d7c3ddc9a248ef1a43dd3283119ff?sender=ue18174cdbfba13587a755085" text:style-name="Internet_20_link" text:visited-style-name="Visited_20_Internet_20_Link">https://app.mural.co/t/farmingsimulator9293/m/farmingsimulator9293/1762074910299/66ec2841ac6d7c3ddc9a248ef1a43dd3283119ff?sender=ue18174cdbfba13587a755085</text:a>) for posterity. </text:p>
      <text:p text:style-name="P32"/>
      <text:p text:style-name="P3">2. The Shadows of Vahlvadell</text:p>
      <text:p text:style-name="P33">2.1. Overview</text:p>
      <text:p text:style-name="P34">The Shadows of Vahlvadell is a Role-Playing <text:span text:style-name="T57">G</text:span>ame (RPG) <text:span text:style-name="T57">tit</text:span><text:span text:style-name="T58">le </text:span><text:span text:style-name="T59">lead by</text:span><text:span text:style-name="T58"> Aaron Stevens. </text:span><text:span text:style-name="T60">It is developed in Unreal Engine for </text:span><text:span text:style-name="T59">Windows and Linux. The project follows the Agile methodology. </text:span><text:span text:style-name="T61">During development, I fulfilled the role of a software developer.</text:span></text:p>
      <text:p text:style-name="P34"/>
      <text:p text:style-name="P35">2.2. Involvement</text:p>
      <text:p text:style-name="P36">2.2(a) Systems</text:p>
      <text:list text:style-name="L6">
        <text:list-item>
          <text:p text:style-name="P37">Given my previous experience with developing inventory systems for another project (Scattered Lands), I was assigned to the task of designing and implementing an inventory system (<text:a xlink:type="simple" xlink:href="https://github.com/Strivion/Vahlvadell/issues/54" text:style-name="Internet_20_link" text:visited-style-name="Visited_20_Internet_20_Link">https://github.com/Strivion/Vahlvadell/issues/54</text:a>) (<text:a xlink:type="simple" xlink:href="https://github.com/Strivion/Vahlvadell/pull/61" text:style-name="Internet_20_link" text:visited-style-name="Visited_20_Internet_20_Link">https://github.com/Strivion/Vahlvadell/pull/61</text:a>).</text:p>
        </text:list-item>
        <text:list-item>
          <text:p text:style-name="P38">Designed <text:span text:style-name="T62">and</text:span> developed a dynamic weather system (<text:a xlink:type="simple" xlink:href="https://github.com/Strivion/Vahlvadell/issues/3" text:style-name="Internet_20_link" text:visited-style-name="Visited_20_Internet_20_Link">https://github.com/Strivion/Vahlvadell/issues/3</text:a>) <text:span text:style-name="T63">(</text:span><text:a xlink:type="simple" xlink:href="https://github.com/Strivion/Vahlvadell/pull/31" text:style-name="Internet_20_link" text:visited-style-name="Visited_20_Internet_20_Link"><text:span text:style-name="T63">https://github.com/Strivion/Vahlvadell/pull/31</text:span></text:a><text:span text:style-name="T63">) </text:span><text:span text:style-name="T64">(</text:span><text:a xlink:type="simple" xlink:href="https://app.mural.co/t/vahlvadell2492/m/vahlvadell2492/1764354812668/d19544649393d65be72b9d83c2dc84425e20fd06" text:style-name="Internet_20_link" text:visited-style-name="Visited_20_Internet_20_Link"><text:span text:style-name="T64">https://app.mural.co/t/vahlvadell2492/m/vahlvadell2492/1764354812668/</text:span><text:soft-page-break/><text:span text:style-name="T64">d19544649393d65be72b9d83c2dc84425e20fd06</text:span></text:a><text:span text:style-name="T64">)</text:span>. <text:span text:style-name="T62">Then, collaborated with Aaron on implementing it</text:span> <text:span text:style-name="T64"><text:s/></text:span><text:span text:style-name="T65">(</text:span><text:a xlink:type="simple" xlink:href="https://github.com/Strivion/Vahlvadell/issues/40" text:style-name="Internet_20_link" text:visited-style-name="Visited_20_Internet_20_Link"><text:span text:style-name="T65">https://github.com/Strivion/Vahlvadell/issues/40</text:span></text:a><text:span text:style-name="T65">) </text:span></text:p>
        </text:list-item>
        <text:list-item>
          <text:p text:style-name="P39">Collaborated on the design <text:span text:style-name="T66">()</text:span> and development of the combat system ()</text:p>
        </text:list-item>
      </text:list>
      <text:p text:style-name="P40"><text:span text:style-name="T67">2</text:span>.2(a). Inventory System</text:p>
      <text:p text:style-name="P36"><text:s/></text:p>
      <text:p text:style-name="P36"/>
      <text:p text:style-name="P40"><text:span text:style-name="T67">2</text:span>.2(b). Weather System</text:p>
      <text:p text:style-name="P40"><text:span text:style-name="T67">2</text:span>.2(c). Combat System</text:p>
      <text:p text:style-name="P41"/>
      <text:p text:style-name="P32"/>
      <text:p text:style-name="P32">3. MauiScreenTime</text:p>
      <text:p text:style-name="P42"/>
      <text:p text:style-name="P43"><text:span text:style-name="T68">3</text:span>.1. Overview</text:p>
      <text:p text:style-name="P44">“MauiScreenTime” is a mobile application for <text:span text:style-name="T69">A</text:span>ndroid and IOS. <text:span text:style-name="T70">It follows the Agile methodology. </text:span><text:span text:style-name="T69">Although my involvement with it was brief, during its development I fulfilled the role of a software developer.</text:span></text:p>
      <text:p text:style-name="P44"/>
      <text:p text:style-name="P35">3.2. Involvement</text:p>
      <text:p text:style-name="P45"/>
      <text:p text:style-name="P46">3.2(a). </text:p>
      <text:p text:style-name="P32"/>
      <text:p text:style-name="P32"/>
      <text:p text:style-name="P32"/>
      <text:p text:style-name="P47">4. Blazejowski.co.uk</text:p>
      <text:p text:style-name="P48">mobile-first design,</text:p>
      <text:p text:style-name="P48">security by design,</text:p>
      <text:p text:style-name="P48"/>
      <text:p text:style-name="P48"/>
      <text:p text:style-name="P49">References:</text:p>
      <text:p text:style-name="P50"/>
      <text:p text:style-name="P51"><text:span text:style-name="T71">Mash It!</text:span><text:span text:style-name="T71"> </text:span><text:span text:style-name="T72">(</text:span><text:span text:style-name="T73">Brewing Game</text:span><text:span text:style-name="T72">)</text:span><text:span text:style-name="T71"> </text:span>(2026a) <text:span text:style-name="T36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2"><text:soft-page-break/><text:span text:style-name="T74">Mash It! </text:span><text:span text:style-name="T72">(</text:span><text:span text:style-name="T73">Brewing Game</text:span><text:span text:style-name="T72">)</text:span><text:span text:style-name="T75"> (2026b) </text:span><text:span text:style-name="T76">Pull Requests</text:span><text:span text:style-name="T75">. Available at: </text:span><text:a xlink:type="simple" xlink:href="https://github.com/Brewing-Game/brewing-game/pulls" text:style-name="Internet_20_link" text:visited-style-name="Visited_20_Internet_20_Link"><text:span text:style-name="T75">https://github.com/Brewing-Game/brewing-game/pulls</text:span></text:a><text:span text:style-name="T75"> (Accessed: 20 May 2026).</text:span></text:p>
      <text:p text:style-name="P53"><text:span text:style-name="T71">Mash It! </text:span><text:span text:style-name="T77">(Brewing Game)</text:span> (2026c) <text:span text:style-name="T78">Project</text:span><text:span text:style-name="T36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4"/>
      <text:p text:style-name="P55"><text:span text:style-name="T71">Shadows of Vahlvadell (Aaron Stevens)</text:span> <text:span text:style-name="T79">(2026a) </text:span><text:span text:style-name="T80">Kanban</text:span><text:span text:style-name="T79">. Available at: </text:span><text:a xlink:type="simple" xlink:href="https://github.com/users/Strivion/projects/2/views/1" text:style-name="Internet_20_link" text:visited-style-name="Visited_20_Internet_20_Link"><text:span text:style-name="T79">https://github.com/users/Strivion/projects/2/views/1</text:span></text:a><text:span text:style-name="T79"> <text:s/>(Accessed: 20 May 2026).</text:span></text:p>
      <text:p text:style-name="P56"><text:span text:style-name="T71">Shadows of Vahlvadell (Aaron Stevens)</text:span> (2026b) <text:span text:style-name="T36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57"><text:span text:style-name="T71">Shadows of Vahlvadell </text:span><text:span text:style-name="T81">(Aaron Stevens)</text:span><text:span text:style-name="T71"> </text:span>(2026c) <text:span text:style-name="T36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58"/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49:28.299393073</dc:date>
    <meta:editing-duration>PT22H5M17S</meta:editing-duration>
    <meta:editing-cycles>213</meta:editing-cycles>
    <meta:generator>LibreOffice/25.8.3.2$Linux_X86_64 LibreOffice_project/8ca8d55c161d602844f5428fa4b58097424e324e</meta:generator>
    <meta:document-statistic meta:table-count="0" meta:image-count="0" meta:object-count="0" meta:page-count="5" meta:paragraph-count="64" meta:word-count="794" meta:character-count="7333" meta:non-whitespace-character-count="6604"/>
  </office:meta>
</office:document-meta>
</file>