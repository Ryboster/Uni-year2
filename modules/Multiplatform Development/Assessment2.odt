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><text:soft-page-break/></text:p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33:03.800569293</dc:date>
    <meta:editing-duration>PT4H44M25S</meta:editing-duration>
    <meta:editing-cycles>30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19" meta:word-count="167" meta:character-count="1150" meta:non-whitespace-character-count="1001"/>
  </office:meta>
</office:document-meta>
</file>