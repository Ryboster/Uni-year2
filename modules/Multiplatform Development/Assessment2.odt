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e9033b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f19e45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f6a56e" style:font-size-asian="10.5pt" style:font-weight-asian="normal" style:font-size-complex="12pt" style:font-weight-complex="normal"/>
    </style:style>
    <style:style style:name="P18" style:family="paragraph" style:parent-style-name="Text_20_body" style:list-style-name="L2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21" style:family="paragraph" style:parent-style-name="Text_20_body" style:list-style-name="L3">
      <style:text-properties fo:font-size="12pt" fo:font-weight="normal" officeooo:rsid="007a9c53" officeooo:paragraph-rsid="00f99c77" style:font-size-asian="10.5pt" style:font-weight-asian="normal" style:font-size-complex="12pt" style:font-weight-complex="normal"/>
    </style:style>
    <style:style style:name="P22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4" style:family="paragraph" style:parent-style-name="Text_20_body" style:list-style-name="L4">
      <style:text-properties fo:font-size="12pt" fo:font-weight="normal" officeooo:rsid="00590a9e" officeooo:paragraph-rsid="00fe0fd3" style:font-size-asian="10.5pt" style:font-weight-asian="normal" style:font-size-complex="12pt" style:font-weight-complex="normal"/>
    </style:style>
    <style:style style:name="P25" style:family="paragraph" style:parent-style-name="Text_20_body" style:list-style-name="L4">
      <style:text-properties fo:font-size="12pt" fo:font-weight="normal" officeooo:rsid="00590a9e" officeooo:paragraph-rsid="01026bcf" style:font-size-asian="10.5pt" style:font-weight-asian="normal" style:font-size-complex="12pt" style:font-weight-complex="normal"/>
    </style:style>
    <style:style style:name="P26" style:family="paragraph" style:parent-style-name="Text_20_body" style:list-style-name="L4">
      <style:text-properties fo:font-size="12pt" fo:font-weight="normal" officeooo:rsid="005c01c9" officeooo:paragraph-rsid="010420d6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9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30" style:family="paragraph" style:parent-style-name="Text_20_body" style:list-style-name="L5">
      <style:text-properties fo:font-size="12pt" fo:font-style="normal" fo:font-weight="normal" officeooo:rsid="00910361" officeooo:paragraph-rsid="010d25e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 style:list-style-name="L5">
      <style:text-properties fo:font-size="12pt" fo:font-style="normal" fo:font-weight="normal" officeooo:rsid="0092d96e" officeooo:paragraph-rsid="010d5d31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 style:list-style-name="L5">
      <style:text-properties fo:font-size="12pt" fo:font-style="normal" fo:font-weight="normal" officeooo:rsid="0092d96e" officeooo:paragraph-rsid="010ff6a5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 style:list-style-name="L5">
      <style:text-properties fo:font-size="12pt" fo:font-style="normal" fo:font-weight="normal" officeooo:rsid="009834f9" officeooo:paragraph-rsid="011caabd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text-properties fo:font-size="12pt" fo:font-weight="normal" officeooo:rsid="00b094de" officeooo:paragraph-rsid="00b094de" style:font-size-asian="10.5pt" style:font-weight-asian="normal" style:font-size-complex="12pt" style:font-weight-complex="normal"/>
    </style:style>
    <style:style style:name="P36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7" style:family="paragraph" style:parent-style-name="Text_20_body">
      <style:text-properties fo:font-size="12pt" fo:font-style="italic" fo:font-weight="bold" officeooo:rsid="003ef905" officeooo:paragraph-rsid="016b6168" style:font-size-asian="10.5pt" style:font-style-asian="italic" style:font-weight-asian="bold" style:font-size-complex="12pt" style:font-style-complex="italic" style:font-weight-complex="bold"/>
    </style:style>
    <style:style style:name="P38" style:family="paragraph" style:parent-style-name="Text_20_body">
      <style:text-properties fo:font-size="12pt" fo:font-style="normal" fo:font-weight="normal" officeooo:rsid="016fae42" officeooo:paragraph-rsid="01725339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40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41" style:family="paragraph" style:parent-style-name="Text_20_body">
      <style:text-properties fo:font-size="12pt" fo:font-weight="bold" officeooo:rsid="0038518f" officeooo:paragraph-rsid="0038518f" style:font-size-asian="10.5pt" style:font-weight-asian="bold" style:font-size-complex="12pt" style:font-weight-complex="bold"/>
    </style:style>
    <style:style style:name="P42" style:family="paragraph" style:parent-style-name="Text_20_body">
      <style:text-properties fo:font-size="12pt" fo:font-weight="bold" officeooo:rsid="00b2d3ce" officeooo:paragraph-rsid="00b2d3ce" style:font-size-asian="10.5pt" style:font-weight-asian="bold" style:font-size-complex="12pt" style:font-weight-complex="bold"/>
    </style:style>
    <style:style style:name="P43" style:family="paragraph" style:parent-style-name="Text_20_body" style:list-style-name="L6">
      <style:text-properties fo:font-size="12pt" fo:font-weight="normal" officeooo:rsid="00b2d3ce" officeooo:paragraph-rsid="013f3b91" style:font-size-asian="10.5pt" style:font-weight-asian="normal" style:font-size-complex="12pt" style:font-weight-complex="normal"/>
    </style:style>
    <style:style style:name="P44" style:family="paragraph" style:parent-style-name="Text_20_body" style:list-style-name="L6">
      <style:text-properties fo:font-size="12pt" fo:font-weight="normal" officeooo:rsid="00b5cc82" officeooo:paragraph-rsid="01353272" style:font-size-asian="10.5pt" style:font-weight-asian="normal" style:font-size-complex="12pt" style:font-weight-complex="normal"/>
    </style:style>
    <style:style style:name="P45" style:family="paragraph" style:parent-style-name="Text_20_body" style:list-style-name="L6">
      <style:text-properties fo:font-size="12pt" fo:font-weight="normal" officeooo:rsid="00be4142" officeooo:paragraph-rsid="013fb12b" style:font-size-asian="10.5pt" style:font-weight-asian="normal" style:font-size-complex="12pt" style:font-weight-complex="normal"/>
    </style:style>
    <style:style style:name="P46" style:family="paragraph" style:parent-style-name="Text_20_body">
      <style:text-properties fo:font-size="12pt" fo:font-style="normal" fo:font-weight="normal" officeooo:rsid="01783f98" officeooo:paragraph-rsid="00265e63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Text_20_body">
      <style:text-properties fo:font-size="12pt" fo:font-style="italic" fo:font-weight="bold" officeooo:rsid="003ef905" officeooo:paragraph-rsid="01757824" style:font-size-asian="10.5pt" style:font-style-asian="italic" style:font-weight-asian="bold" style:font-size-complex="12pt" style:font-style-complex="italic" style:font-weight-complex="bold"/>
    </style:style>
    <style:style style:name="P48" style:family="paragraph" style:parent-style-name="Text_20_body">
      <style:text-properties fo:font-size="14pt" fo:font-weight="bold" officeooo:rsid="00265e63" officeooo:paragraph-rsid="014652f4" style:font-size-asian="14pt" style:font-weight-asian="bold" style:font-size-complex="14pt" style:font-weight-complex="bold"/>
    </style:style>
    <style:style style:name="P49" style:family="paragraph" style:parent-style-name="Text_20_body">
      <style:text-properties fo:font-size="13pt" fo:font-weight="bold" officeooo:rsid="002eb126" officeooo:paragraph-rsid="014652f4" style:font-size-asian="13pt" style:font-weight-asian="bold" style:font-size-complex="13pt" style:font-weight-complex="bold"/>
    </style:style>
    <style:style style:name="P50" style:family="paragraph" style:parent-style-name="Text_20_body">
      <style:text-properties fo:font-size="12pt" fo:font-weight="normal" officeooo:rsid="014858c2" officeooo:paragraph-rsid="0169feed" style:font-size-asian="10.5pt" style:font-weight-asian="normal" style:font-size-complex="12pt" style:font-weight-complex="normal"/>
    </style:style>
    <style:style style:name="P51" style:family="paragraph" style:parent-style-name="Text_20_body" style:list-style-name="L7">
      <style:text-properties fo:font-size="12pt" fo:font-weight="normal" officeooo:rsid="015bf5a1" officeooo:paragraph-rsid="015bf5a1" style:font-size-asian="10.5pt" style:font-weight-asian="normal" style:font-size-complex="12pt" style:font-weight-complex="normal"/>
    </style:style>
    <style:style style:name="P52" style:family="paragraph" style:parent-style-name="Text_20_body" style:list-style-name="L7">
      <style:text-properties fo:font-size="12pt" fo:font-weight="normal" officeooo:rsid="016616f1" officeooo:paragraph-rsid="016616f1" style:font-size-asian="10.5pt" style:font-weight-asian="normal" style:font-size-complex="12pt" style:font-weight-complex="normal"/>
    </style:style>
    <style:style style:name="P53" style:family="paragraph" style:parent-style-name="Text_20_body" style:list-style-name="L7">
      <style:text-properties fo:font-size="12pt" fo:font-weight="normal" officeooo:rsid="015dac2c" officeooo:paragraph-rsid="015dac2c" style:font-size-asian="10.5pt" style:font-weight-asian="normal" style:font-size-complex="12pt" style:font-weight-complex="normal"/>
    </style:style>
    <style:style style:name="P54" style:family="paragraph" style:parent-style-name="Text_20_body" style:list-style-name="L7">
      <style:text-properties fo:font-size="12pt" fo:font-weight="normal" officeooo:rsid="015e3739" officeooo:paragraph-rsid="015e3739" style:font-size-asian="10.5pt" style:font-weight-asian="normal" style:font-size-complex="12pt" style:font-weight-complex="normal"/>
    </style:style>
    <style:style style:name="P55" style:family="paragraph" style:parent-style-name="Text_20_body">
      <style:text-properties fo:font-size="12pt" fo:font-weight="normal" officeooo:rsid="014858c2" officeooo:paragraph-rsid="014858c2" style:font-size-asian="10.5pt" style:font-weight-asian="normal" style:font-size-complex="12pt" style:font-weight-complex="normal"/>
    </style:style>
    <style:style style:name="P56" style:family="paragraph" style:parent-style-name="Text_20_body">
      <style:text-properties fo:font-size="12pt" fo:font-style="italic" fo:font-weight="bold" officeooo:rsid="0178ff44" officeooo:paragraph-rsid="0178ff44" style:font-size-asian="10.5pt" style:font-style-asian="italic" style:font-weight-asian="bold" style:font-size-complex="12pt" style:font-style-complex="italic" style:font-weight-complex="bold"/>
    </style:style>
    <style:style style:name="P57" style:family="paragraph" style:parent-style-name="Text_20_body">
      <style:text-properties fo:font-size="12pt" fo:font-style="normal" fo:font-weight="normal" officeooo:rsid="0178ff44" officeooo:paragraph-rsid="0178ff44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Text_20_body">
      <style:text-properties fo:font-size="12pt" fo:font-weight="normal" officeooo:rsid="014a4db4" officeooo:paragraph-rsid="014a4db4" style:font-size-asian="10.5pt" style:font-weight-asian="normal" style:font-size-complex="12pt" style:font-weight-complex="normal"/>
    </style:style>
    <style:style style:name="P59" style:family="paragraph" style:parent-style-name="Text_20_body">
      <style:text-properties fo:font-size="12pt" fo:font-weight="normal" officeooo:rsid="0027a6ff" officeooo:paragraph-rsid="0146bee2" style:font-size-asian="10.5pt" style:font-weight-asian="normal" style:font-size-complex="12pt" style:font-weight-complex="normal"/>
    </style:style>
    <style:style style:name="P60" style:family="paragraph" style:parent-style-name="Text_20_body">
      <style:text-properties fo:font-size="13pt" fo:font-weight="normal" officeooo:rsid="00266b26" officeooo:paragraph-rsid="0146bee2" style:font-size-asian="13pt" style:font-weight-asian="normal" style:font-size-complex="13pt" style:font-weight-complex="normal"/>
    </style:style>
    <style:style style:name="P61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P62" style:family="paragraph" style:parent-style-name="Text_20_body">
      <style:text-properties fo:font-size="13pt" fo:font-weight="normal" officeooo:rsid="00bf0c97" officeooo:paragraph-rsid="00bf0c97" style:font-size-asian="13pt" style:font-weight-asian="normal" style:font-size-complex="13pt" style:font-weight-complex="normal"/>
    </style:style>
    <style:style style:name="P63" style:family="paragraph" style:parent-style-name="Text_20_body">
      <style:text-properties fo:font-size="13pt" fo:font-weight="normal" officeooo:rsid="00c1dcee" officeooo:paragraph-rsid="00bf0c97" style:font-size-asian="13pt" style:font-weight-asian="normal" style:font-size-complex="13pt" style:font-weight-complex="normal"/>
    </style:style>
    <style:style style:name="P64" style:family="paragraph" style:parent-style-name="Text_20_body">
      <style:text-properties fo:font-size="13pt" fo:font-weight="normal" officeooo:rsid="00c53164" officeooo:paragraph-rsid="00c53164" style:font-size-asian="13pt" style:font-weight-asian="normal" style:font-size-complex="13pt" style:font-weight-complex="normal"/>
    </style:style>
    <style:style style:name="P65" style:family="paragraph" style:parent-style-name="Text_20_body">
      <style:text-properties fo:font-size="13pt" fo:font-weight="normal" officeooo:rsid="00c53164" officeooo:paragraph-rsid="00ca0ce5" style:font-size-asian="13pt" style:font-weight-asian="normal" style:font-size-complex="13pt" style:font-weight-complex="normal"/>
    </style:style>
    <style:style style:name="P66" style:family="paragraph" style:parent-style-name="Text_20_body">
      <style:text-properties fo:font-size="13pt" fo:font-weight="normal" officeooo:rsid="00ce4ff7" officeooo:paragraph-rsid="00ce4ff7" style:font-size-asian="13pt" style:font-weight-asian="normal" style:font-size-complex="13pt" style:font-weight-complex="normal"/>
    </style:style>
    <style:style style:name="P67" style:family="paragraph" style:parent-style-name="Text_20_body">
      <style:text-properties fo:font-size="13pt" fo:font-weight="normal" officeooo:rsid="00c53164" officeooo:paragraph-rsid="00c55401" style:font-size-asian="13pt" style:font-weight-asian="normal" style:font-size-complex="13pt" style:font-weight-complex="normal"/>
    </style:style>
    <style:style style:name="P68" style:family="paragraph" style:parent-style-name="Text_20_body">
      <style:text-properties fo:font-size="13pt" fo:font-weight="normal" officeooo:rsid="00c7b1fb" officeooo:paragraph-rsid="00c7b1fb" style:font-size-asian="13pt" style:font-weight-asian="normal" style:font-size-complex="13pt" style:font-weight-complex="normal"/>
    </style:style>
    <style:style style:name="P69" style:family="paragraph" style:parent-style-name="Text_20_body">
      <style:text-properties fo:font-size="13pt" fo:font-weight="normal" officeooo:rsid="00cbbf6a" officeooo:paragraph-rsid="00cbbf6a" style:font-size-asian="13pt" style:font-weight-asian="normal" style:font-size-complex="13pt" style:font-weight-complex="normal"/>
    </style:style>
    <style:style style:name="P70" style:family="paragraph" style:parent-style-name="Text_20_body">
      <style:text-properties fo:font-size="13pt" fo:font-weight="normal" officeooo:rsid="00cf614d" officeooo:paragraph-rsid="00cf614d" style:font-size-asian="13pt" style:font-weight-asian="normal" style:font-size-complex="13pt" style:font-weight-complex="normal"/>
    </style:style>
    <style:style style:name="P71" style:family="paragraph" style:parent-style-name="Text_20_body">
      <style:text-properties fo:font-size="13pt" fo:font-weight="normal" officeooo:rsid="00bf0c97" officeooo:paragraph-rsid="00cbbf6a" style:font-size-asian="13pt" style:font-weight-asian="normal" style:font-size-complex="13pt" style:font-weight-complex="normal"/>
    </style:style>
    <style:style style:name="P72" style:family="paragraph" style:parent-style-name="Text_20_body">
      <style:text-properties fo:font-size="13pt" fo:font-weight="normal" officeooo:rsid="0142900e" officeooo:paragraph-rsid="0142900e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fo:font-style="italic" officeooo:rsid="00e521bd" style:font-style-asian="italic" style:font-style-complex="italic"/>
    </style:style>
    <style:style style:name="T19" style:family="text">
      <style:text-properties fo:font-style="italic" officeooo:rsid="011bb3f5" style:font-style-asian="italic" style:font-style-complex="italic"/>
    </style:style>
    <style:style style:name="T20" style:family="text">
      <style:text-properties officeooo:rsid="00ee2ea4"/>
    </style:style>
    <style:style style:name="T21" style:family="text">
      <style:text-properties fo:font-style="italic" officeooo:rsid="00eaec27" style:font-style-asian="italic" style:font-style-complex="italic"/>
    </style:style>
    <style:style style:name="T22" style:family="text">
      <style:text-properties fo:font-style="italic" officeooo:rsid="011aa17f" style:font-style-asian="italic" style:font-style-complex="italic"/>
    </style:style>
    <style:style style:name="T23" style:family="text">
      <style:text-properties fo:font-style="italic" officeooo:rsid="00e76afe" style:font-style-asian="italic" style:font-style-complex="italic"/>
    </style:style>
    <style:style style:name="T24" style:family="text">
      <style:text-properties fo:font-style="italic" officeooo:rsid="00e93749" style:font-style-asian="italic" style:font-style-complex="italic"/>
    </style:style>
    <style:style style:name="T25" style:family="text">
      <style:text-properties fo:font-style="italic" officeooo:rsid="00ed30b1" style:font-style-asian="italic" style:font-style-complex="italic"/>
    </style:style>
    <style:style style:name="T26" style:family="text">
      <style:text-properties officeooo:rsid="00464452"/>
    </style:style>
    <style:style style:name="T27" style:family="text">
      <style:text-properties officeooo:rsid="006c29f7"/>
    </style:style>
    <style:style style:name="T28" style:family="text">
      <style:text-properties fo:font-style="italic" officeooo:rsid="00f19e45" style:font-style-asian="italic" style:font-style-complex="italic"/>
    </style:style>
    <style:style style:name="T29" style:family="text">
      <style:text-properties fo:font-style="italic" officeooo:rsid="01180270" style:font-style-asian="italic" style:font-style-complex="italic"/>
    </style:style>
    <style:style style:name="T30" style:family="text">
      <style:text-properties fo:font-style="italic" officeooo:rsid="00f6a56e" style:font-style-asian="italic" style:font-style-complex="italic"/>
    </style:style>
    <style:style style:name="T31" style:family="text">
      <style:text-properties fo:font-style="italic" officeooo:rsid="0117247f" style:font-style-asian="italic" style:font-style-complex="italic"/>
    </style:style>
    <style:style style:name="T32" style:family="text">
      <style:text-properties fo:font-style="italic" officeooo:rsid="00f83ec6" style:font-style-asian="italic" style:font-style-complex="italic"/>
    </style:style>
    <style:style style:name="T33" style:family="text">
      <style:text-properties officeooo:rsid="0043dd38"/>
    </style:style>
    <style:style style:name="T34" style:family="text">
      <style:text-properties officeooo:rsid="007bf3b9"/>
    </style:style>
    <style:style style:name="T35" style:family="text">
      <style:text-properties fo:font-style="italic" officeooo:rsid="0116d66f" style:font-style-asian="italic" style:font-style-complex="italic"/>
    </style:style>
    <style:style style:name="T36" style:family="text">
      <style:text-properties fo:font-style="italic" officeooo:rsid="00fae425" style:font-style-asian="italic" style:font-style-complex="italic"/>
    </style:style>
    <style:style style:name="T37" style:family="text">
      <style:text-properties fo:font-style="italic" officeooo:rsid="00fcba0b" style:font-style-asian="italic" style:font-style-complex="italic"/>
    </style:style>
    <style:style style:name="T38" style:family="text">
      <style:text-properties officeooo:rsid="00808e5a"/>
    </style:style>
    <style:style style:name="T39" style:family="text">
      <style:text-properties fo:font-style="italic" officeooo:rsid="0115b99d" style:font-style-asian="italic" style:font-style-complex="italic"/>
    </style:style>
    <style:style style:name="T40" style:family="text">
      <style:text-properties fo:font-style="italic" officeooo:rsid="00fe1d36" style:font-style-asian="italic" style:font-style-complex="italic"/>
    </style:style>
    <style:style style:name="T41" style:family="text">
      <style:text-properties fo:font-style="italic" officeooo:rsid="0115b49e" style:font-style-asian="italic" style:font-style-complex="italic"/>
    </style:style>
    <style:style style:name="T42" style:family="text">
      <style:text-properties fo:font-style="italic" officeooo:rsid="010119a6" style:font-style-asian="italic" style:font-style-complex="italic"/>
    </style:style>
    <style:style style:name="T43" style:family="text">
      <style:text-properties fo:font-style="italic" officeooo:rsid="01146057" style:font-style-asian="italic" style:font-style-complex="italic"/>
    </style:style>
    <style:style style:name="T44" style:family="text">
      <style:text-properties fo:font-style="italic" officeooo:rsid="01026bcf" style:font-style-asian="italic" style:font-style-complex="italic"/>
    </style:style>
    <style:style style:name="T45" style:family="text">
      <style:text-properties fo:font-style="italic" officeooo:rsid="0103cb69" style:font-style-asian="italic" style:font-style-complex="italic"/>
    </style:style>
    <style:style style:name="T46" style:family="text">
      <style:text-properties fo:font-style="italic" officeooo:rsid="01070669" style:font-style-asian="italic" style:font-style-complex="italic"/>
    </style:style>
    <style:style style:name="T47" style:family="text">
      <style:text-properties fo:font-style="italic" officeooo:rsid="0107c331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4756e2" style:font-style-asian="italic" style:font-style-complex="italic"/>
    </style:style>
    <style:style style:name="T50" style:family="text">
      <style:text-properties officeooo:rsid="009834f9"/>
    </style:style>
    <style:style style:name="T51" style:family="text">
      <style:text-properties officeooo:rsid="009460b7"/>
    </style:style>
    <style:style style:name="T52" style:family="text">
      <style:text-properties officeooo:rsid="0098c8f8"/>
    </style:style>
    <style:style style:name="T53" style:family="text">
      <style:text-properties officeooo:rsid="009a3d00"/>
    </style:style>
    <style:style style:name="T54" style:family="text">
      <style:text-properties fo:font-style="italic" officeooo:rsid="01133da3" style:font-style-asian="italic" style:font-style-complex="italic"/>
    </style:style>
    <style:style style:name="T55" style:family="text">
      <style:text-properties fo:font-style="italic" officeooo:rsid="010d25e0" style:font-style-asian="italic" style:font-style-complex="italic"/>
    </style:style>
    <style:style style:name="T56" style:family="text">
      <style:text-properties officeooo:rsid="009a7b88"/>
    </style:style>
    <style:style style:name="T57" style:family="text">
      <style:text-properties officeooo:rsid="009fff75"/>
    </style:style>
    <style:style style:name="T58" style:family="text">
      <style:text-properties fo:font-style="italic" officeooo:rsid="01132b80" style:font-style-asian="italic" style:font-style-complex="italic"/>
    </style:style>
    <style:style style:name="T59" style:family="text">
      <style:text-properties fo:font-style="italic" officeooo:rsid="010d5d31" style:font-style-asian="italic" style:font-style-complex="italic"/>
    </style:style>
    <style:style style:name="T60" style:family="text">
      <style:text-properties officeooo:rsid="009acea7"/>
    </style:style>
    <style:style style:name="T61" style:family="text">
      <style:text-properties officeooo:rsid="009bb78c"/>
    </style:style>
    <style:style style:name="T62" style:family="text">
      <style:text-properties fo:font-style="italic" officeooo:rsid="0111d270" style:font-style-asian="italic" style:font-style-complex="italic"/>
    </style:style>
    <style:style style:name="T63" style:family="text">
      <style:text-properties fo:font-style="italic" officeooo:rsid="010ff6a5" style:font-style-asian="italic" style:font-style-complex="italic"/>
    </style:style>
    <style:style style:name="T64" style:family="text">
      <style:text-properties fo:font-style="italic" officeooo:rsid="011174db" style:font-style-asian="italic" style:font-style-complex="italic"/>
    </style:style>
    <style:style style:name="T65" style:family="text">
      <style:text-properties officeooo:rsid="00aca96f"/>
    </style:style>
    <style:style style:name="T66" style:family="text">
      <style:text-properties officeooo:rsid="00a9e1df"/>
    </style:style>
    <style:style style:name="T67" style:family="text">
      <style:text-properties officeooo:rsid="00adf5f8"/>
    </style:style>
    <style:style style:name="T68" style:family="text">
      <style:text-properties officeooo:rsid="00ae3ed0"/>
    </style:style>
    <style:style style:name="T69" style:family="text">
      <style:text-properties fo:font-style="italic" officeooo:rsid="011ea7fa" style:font-style-asian="italic" style:font-style-complex="italic"/>
    </style:style>
    <style:style style:name="T70" style:family="text">
      <style:text-properties fo:font-style="italic" officeooo:rsid="011f68f7" style:font-style-asian="italic" style:font-style-complex="italic"/>
    </style:style>
    <style:style style:name="T71" style:family="text">
      <style:text-properties officeooo:rsid="004756e2"/>
    </style:style>
    <style:style style:name="T72" style:family="text">
      <style:text-properties fo:font-style="italic" officeooo:rsid="01232cea" style:font-style-asian="italic" style:font-style-complex="italic"/>
    </style:style>
    <style:style style:name="T73" style:family="text">
      <style:text-properties officeooo:rsid="016b6168"/>
    </style:style>
    <style:style style:name="T74" style:family="text">
      <style:text-properties officeooo:rsid="01716df9"/>
    </style:style>
    <style:style style:name="T75" style:family="text">
      <style:text-properties officeooo:rsid="01725339"/>
    </style:style>
    <style:style style:name="T76" style:family="text">
      <style:text-properties fo:font-style="italic" officeooo:rsid="01725339" style:font-style-asian="italic" style:font-style-complex="italic"/>
    </style:style>
    <style:style style:name="T77" style:family="text">
      <style:text-properties officeooo:rsid="0173f191"/>
    </style:style>
    <style:style style:name="T78" style:family="text">
      <style:text-properties officeooo:rsid="0028b6fb"/>
    </style:style>
    <style:style style:name="T79" style:family="text">
      <style:text-properties officeooo:rsid="00292dc4"/>
    </style:style>
    <style:style style:name="T80" style:family="text">
      <style:text-properties officeooo:rsid="0034b93b"/>
    </style:style>
    <style:style style:name="T81" style:family="text">
      <style:text-properties officeooo:rsid="002ec9e2"/>
    </style:style>
    <style:style style:name="T82" style:family="text">
      <style:text-properties officeooo:rsid="0034bc00"/>
    </style:style>
    <style:style style:name="T83" style:family="text">
      <style:text-properties fo:font-style="italic" officeooo:rsid="012b38bd" style:font-style-asian="italic" style:font-style-complex="italic"/>
    </style:style>
    <style:style style:name="T84" style:family="text">
      <style:text-properties fo:font-style="italic" officeooo:rsid="013f3b91" style:font-style-asian="italic" style:font-style-complex="italic"/>
    </style:style>
    <style:style style:name="T85" style:family="text">
      <style:text-properties fo:font-style="italic" officeooo:rsid="012c5674" style:font-style-asian="italic" style:font-style-complex="italic"/>
    </style:style>
    <style:style style:name="T86" style:family="text">
      <style:text-properties officeooo:rsid="00bbe00c"/>
    </style:style>
    <style:style style:name="T87" style:family="text">
      <style:text-properties fo:font-style="italic" officeooo:rsid="01314900" style:font-style-asian="italic" style:font-style-complex="italic"/>
    </style:style>
    <style:style style:name="T88" style:family="text">
      <style:text-properties fo:font-style="italic" officeooo:rsid="01321924" style:font-style-asian="italic" style:font-style-complex="italic"/>
    </style:style>
    <style:style style:name="T89" style:family="text">
      <style:text-properties fo:font-style="italic" officeooo:rsid="0133a86a" style:font-style-asian="italic" style:font-style-complex="italic"/>
    </style:style>
    <style:style style:name="T90" style:family="text">
      <style:text-properties fo:font-style="italic" officeooo:rsid="01353272" style:font-style-asian="italic" style:font-style-complex="italic"/>
    </style:style>
    <style:style style:name="T91" style:family="text">
      <style:text-properties fo:font-style="italic" officeooo:rsid="013c8976" style:font-style-asian="italic" style:font-style-complex="italic"/>
    </style:style>
    <style:style style:name="T92" style:family="text">
      <style:text-properties fo:font-style="italic" officeooo:rsid="013f28b8" style:font-style-asian="italic" style:font-style-complex="italic"/>
    </style:style>
    <style:style style:name="T93" style:family="text">
      <style:text-properties fo:font-style="italic" officeooo:rsid="013fb12b" style:font-style-asian="italic" style:font-style-complex="italic"/>
    </style:style>
    <style:style style:name="T94" style:family="text">
      <style:text-properties fo:font-style="italic" officeooo:rsid="013ff355" style:font-style-asian="italic" style:font-style-complex="italic"/>
    </style:style>
    <style:style style:name="T95" style:family="text">
      <style:text-properties officeooo:rsid="01473ff3"/>
    </style:style>
    <style:style style:name="T96" style:family="text">
      <style:text-properties officeooo:rsid="0153d199"/>
    </style:style>
    <style:style style:name="T97" style:family="text">
      <style:text-properties officeooo:rsid="014d11ac"/>
    </style:style>
    <style:style style:name="T98" style:family="text">
      <style:text-properties officeooo:rsid="01567fbe"/>
    </style:style>
    <style:style style:name="T99" style:family="text">
      <style:text-properties officeooo:rsid="014ddaac"/>
    </style:style>
    <style:style style:name="T100" style:family="text">
      <style:text-properties officeooo:rsid="01632579"/>
    </style:style>
    <style:style style:name="T101" style:family="text">
      <style:text-properties officeooo:rsid="015e3739"/>
    </style:style>
    <style:style style:name="T102" style:family="text">
      <style:text-properties officeooo:rsid="016a33e6"/>
    </style:style>
    <style:style style:name="T103" style:family="text">
      <style:text-properties officeooo:rsid="0164e7bf"/>
    </style:style>
    <style:style style:name="T104" style:family="text">
      <style:text-properties officeooo:rsid="0165327b"/>
    </style:style>
    <style:style style:name="T105" style:family="text">
      <style:text-properties officeooo:rsid="014a4db4"/>
    </style:style>
    <style:style style:name="T106" style:family="text">
      <style:text-properties officeooo:rsid="015f0486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officeooo:rsid="00c55401" style:font-weight-asian="bold" style:font-weight-complex="bold"/>
    </style:style>
    <style:style style:name="T109" style:family="text">
      <style:text-properties fo:font-weight="bold" officeooo:rsid="00c945a8" style:font-weight-asian="bold" style:font-weight-complex="bold"/>
    </style:style>
    <style:style style:name="T110" style:family="text">
      <style:text-properties fo:font-weight="bold" officeooo:rsid="00c5460f" style:font-weight-asian="bold" style:font-weight-complex="bold"/>
    </style:style>
    <style:style style:name="T111" style:family="text">
      <style:text-properties officeooo:rsid="00c5460f"/>
    </style:style>
    <style:style style:name="T112" style:family="text">
      <style:text-properties fo:font-style="italic" officeooo:rsid="00c5460f" style:font-style-asian="italic" style:font-style-complex="italic"/>
    </style:style>
    <style:style style:name="T113" style:family="text">
      <style:text-properties fo:font-weight="bold" officeooo:rsid="00d39f75" style:font-weight-asian="bold" style:font-weight-complex="bold"/>
    </style:style>
    <style:style style:name="T114" style:family="text">
      <style:text-properties fo:font-style="italic" officeooo:rsid="00dcbc28" style:font-style-asian="italic" style:font-style-complex="italic"/>
    </style:style>
    <style:style style:name="T115" style:family="text">
      <style:text-properties fo:font-weight="bold" officeooo:rsid="0128bc99" style:font-weight-asian="bold" style:font-weight-complex="bold"/>
    </style:style>
    <style:style style:name="T116" style:family="text">
      <style:text-properties officeooo:rsid="00cbbf6a"/>
    </style:style>
    <style:style style:name="T117" style:family="text">
      <style:text-properties fo:font-style="italic" officeooo:rsid="00cbbf6a" style:font-style-asian="italic" style:font-style-complex="italic"/>
    </style:style>
    <style:style style:name="T118" style:family="text">
      <style:text-properties fo:font-weight="bold" officeooo:rsid="00d42837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<text:span text:style-name="T18">(Mash It!, 2026(a), </text:span><text:span text:style-name="T19">#</text:span><text:span text:style-name="T18">19) (Mash It!, 2026(b), </text:span><text:span text:style-name="T19">#</text:span><text:span text:style-name="T18">27).</text:span></text:p>
        </text:list-item>
        <text:list-item>
          <text:p text:style-name="P11">Development and implement<text:span text:style-name="T20">ed</text:span> of the settings menu <text:span text:style-name="T18">(Mash It!, 2026(</text:span><text:span text:style-name="T21">b</text:span><text:span text:style-name="T18">), </text:span><text:span text:style-name="T22">#</text:span><text:span text:style-name="T23">67</text:span><text:span text:style-name="T18">) (Mash It!, 2026(</text:span><text:span text:style-name="T21">a</text:span><text:span text:style-name="T18">), </text:span><text:span text:style-name="T22">#</text:span><text:span text:style-name="T23">51</text:span><text:span text:style-name="T18">) (Mash It!, 2026(</text:span><text:span text:style-name="T21">a</text:span><text:span text:style-name="T18">), </text:span><text:span text:style-name="T22">#</text:span><text:span text:style-name="T24">54</text:span><text:span text:style-name="T18">) (Mash It!, 2026(</text:span><text:span text:style-name="T25">a</text:span><text:span text:style-name="T18">), </text:span><text:span text:style-name="T22">#</text:span><text:span text:style-name="T24">49</text:span><text:span text:style-name="T18">).</text:span></text:p>
        </text:list-item>
      </text:list>
      <text:p text:style-name="P12"/>
      <text:p text:style-name="P13">1.2(b). <text:span text:style-name="T26">Accessibility</text:span></text:p>
      <text:p text:style-name="P14">This game puts emphasis on accessibility. As developers, we wanted the game to be accessible to as many people as possible. Give<text:span text:style-name="T27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18">(Mash It!, 2026(</text:span><text:span text:style-name="T28">b</text:span><text:span text:style-name="T18">), </text:span><text:span text:style-name="T29">#</text:span><text:span text:style-name="T28">44</text:span><text:span text:style-name="T18">) (Mash It!, 2026(</text:span><text:span text:style-name="T28">a</text:span><text:span text:style-name="T18">), </text:span><text:span text:style-name="T29">#</text:span><text:span text:style-name="T28">48</text:span><text:span text:style-name="T18">).</text:span> </text:p>
        </text:list-item>
        <text:list-item>
          <text:p text:style-name="P17">Development of the in-game tutorial complete with text-to-speech <text:span text:style-name="T18">(Mash It!, 2026(a), </text:span><text:span text:style-name="T29">#</text:span><text:span text:style-name="T30">73</text:span><text:span text:style-name="T18">) (Mash It!, 2026(b), </text:span><text:span text:style-name="T29">#</text:span><text:span text:style-name="T30">85</text:span><text:span text:style-name="T18">) (Mash It!, 2026(</text:span><text:span text:style-name="T30">b</text:span><text:span text:style-name="T18">), </text:span><text:span text:style-name="T29">#</text:span><text:span text:style-name="T30">89</text:span><text:span text:style-name="T18">) (Mash It!, 2026(</text:span><text:span text:style-name="T30">a</text:span><text:span text:style-name="T18">), </text:span><text:span text:style-name="T29">#</text:span><text:span text:style-name="T30">72</text:span><text:span text:style-name="T18">).</text:span> </text:p>
        </text:list-item>
        <text:list-item>
          <text:p text:style-name="P18">Creation and implementation of sound effects <text:span text:style-name="T18">(Mash It!, 2026(a), </text:span><text:span text:style-name="T31">#</text:span><text:span text:style-name="T32">63</text:span><text:span text:style-name="T18">) (Mash It!, 2026(b), </text:span><text:span text:style-name="T31">#</text:span><text:span text:style-name="T32">64</text:span><text:span text:style-name="T18">).</text:span> </text:p>
        </text:list-item>
      </text:list>
      <text:p text:style-name="P19"/>
      <text:p text:style-name="P13"><text:soft-page-break/>1.2(c). <text:span text:style-name="T33">Debugging</text:span></text:p>
      <text:p text:style-name="P20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21">Separated mouse interactions between UI and game level. Before this patch, clicking a UI element would also click the underlying scene objects (like our mash tuns). <text:span text:style-name="T34">I patched it. </text:span><text:span text:style-name="T18">(Mash It!, 2026(a), </text:span><text:span text:style-name="T35">#</text:span><text:span text:style-name="T36">91</text:span><text:span text:style-name="T18">) (Mash It!, 2026(b), </text:span><text:span text:style-name="T35">#</text:span><text:span text:style-name="T37">93</text:span><text:span text:style-name="T18">).</text:span></text:p>
          <text:p text:style-name="P22"/>
        </text:list-item>
      </text:list>
      <text:p text:style-name="P13">1.2(d). <text:span text:style-name="T33">U</text:span><text:span text:style-name="T38">ser Interface (UI)</text:span></text:p>
      <text:p text:style-name="P23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4">Development of the pause menu <text:span text:style-name="T18">(Mash It!, 2026(a), </text:span><text:span text:style-name="T39">#</text:span><text:span text:style-name="T40">52</text:span><text:span text:style-name="T18">) (Mash It!, 2026(b), </text:span><text:span text:style-name="T39">#</text:span><text:span text:style-name="T40">53</text:span><text:span text:style-name="T18">).</text:span> </text:p>
        </text:list-item>
        <text:list-item>
          <text:p text:style-name="P25">Design and development of the in-game store <text:span text:style-name="T18">(Mash It!, 2026(a), </text:span><text:span text:style-name="T41">#</text:span><text:span text:style-name="T42">83</text:span><text:span text:style-name="T18">) <text:s/>(Mash It!, 2026(a), </text:span><text:span text:style-name="T43">#</text:span><text:span text:style-name="T44">82</text:span><text:span text:style-name="T18">) (Mash It!, 2026(b), </text:span><text:span text:style-name="T43">#</text:span><text:span text:style-name="T45">90</text:span><text:span text:style-name="T18">).</text:span></text:p>
        </text:list-item>
        <text:list-item>
          <text:p text:style-name="P26">Development of the main menu <text:span text:style-name="T18">(Mash It!, 2026(a), </text:span><text:span text:style-name="T43">#</text:span><text:span text:style-name="T46">51</text:span><text:span text:style-name="T18">) (Mash It!, 2026(b), </text:span><text:span text:style-name="T43">#</text:span><text:span text:style-name="T47">50</text:span><text:span text:style-name="T18">).</text:span> </text:p>
        </text:list-item>
      </text:list>
      <text:p text:style-name="P27"><text:s/></text:p>
      <text:p text:style-name="P28"><text:span text:style-name="T48">1.2(e). </text:span><text:span text:style-name="T49">Documentation</text:span></text:p>
      <text:p text:style-name="P29">Development is not just about writing effective code. A big part of development is definition and effective application of <text:span text:style-name="T50">organisational</text:span> guidelines. <text:span text:style-name="T51">Our team understood it well </text:span><text:span text:style-name="T52">since</text:span><text:span text:style-name="T51"> the beginning of the project, and given my previous experience with this, I was tasked with creating the following documentation:</text:span></text:p>
      <text:list text:style-name="L5">
        <text:list-item>
          <text:p text:style-name="P30">Justification of Choices Documentation; <text:span text:style-name="T53">this document answers the “what?” and “why?” with respect to the various design choices </text:span><text:span text:style-name="T18">(Mash It!, 2026(a), </text:span><text:span text:style-name="T54">#</text:span><text:span text:style-name="T55">3</text:span><text:span text:style-name="T18">) (Mash It!, 2026(b), </text:span><text:span text:style-name="T54">#</text:span><text:span text:style-name="T55">12</text:span><text:span text:style-name="T18">).</text:span><text:span text:style-name="T53"> </text:span></text:p>
        </text:list-item>
        <text:list-item>
          <text:p text:style-name="P31">Coding <text:span text:style-name="T56">b</text:span>est <text:span text:style-name="T56">p</text:span>ractices – <text:span text:style-name="T57">This document describes the exact syntax to be used when writing code. It takes into consideration casing, units, abbreviations, style, comments, etc. </text:span><text:span text:style-name="T18">(Mash It!, 2026(a), </text:span><text:span text:style-name="T58">#</text:span><text:span text:style-name="T18">1) (Mash It!, 2026(b), </text:span><text:span text:style-name="T58">#</text:span><text:span text:style-name="T59">10</text:span><text:span text:style-name="T18">).</text:span></text:p>
        </text:list-item>
        <text:list-item>
          <text:p text:style-name="P32">Directory <text:span text:style-name="T56">s</text:span>tructure <text:span text:style-name="T56">c</text:span>onvention – <text:span text:style-name="T60">This document outlines </text:span><text:span text:style-name="T61">file storage constraints; what goes where. </text:span><text:span text:style-name="T18">(Mash It!, 2026(a), </text:span><text:span text:style-name="T62">#</text:span><text:span text:style-name="T63">2</text:span><text:span text:style-name="T18">) (Mash It!, 2026(b), </text:span><text:span text:style-name="T62">#</text:span><text:span text:style-name="T64">11</text:span><text:span text:style-name="T18">). </text:span></text:p>
        </text:list-item>
        <text:list-item>
          <text:p text:style-name="P33">Pull request (PR) documentation. This document outlines <text:span text:style-name="T65">the acceptable conduct within the GitHub workflow</text:span><text:span text:style-name="T66">. </text:span><text:span text:style-name="T67">It ensures tha</text:span><text:span text:style-name="T68">t programmers understand </text:span><text:span text:style-name="T18">(Mash It!, 2026(a), </text:span><text:span text:style-name="T62">#</text:span><text:span text:style-name="T69">9</text:span><text:span text:style-name="T18">) (Mash It!, 2026(b), </text:span><text:span text:style-name="T62">#</text:span><text:span text:style-name="T64">1</text:span><text:span text:style-name="T70">4</text:span><text:span text:style-name="T18">).</text:span></text:p>
          <text:p text:style-name="P34"/>
        </text:list-item>
      </text:list>
      <text:p text:style-name="P13">1.2(f). <text:span text:style-name="T71">Design</text:span></text:p>
      <text:p text:style-name="P35">During the development, design decisions were made together as a team. Results of our discussions were recorded on mural <text:span text:style-name="T72">(Mash It!, 2026(c))</text:span> for posterity. </text:p>
      <text:p text:style-name="P36"/>
      <text:p text:style-name="P37"/>
      <text:p text:style-name="P37"><text:soft-page-break/>1.2(<text:span text:style-name="T73">g</text:span>). <text:span text:style-name="T73">Workflow</text:span></text:p>
      <text:p text:style-name="P38">The project was developed collaboratively within the scrum framework. Each sprint would last two weeks. <text:span text:style-name="T74">Planning and retrospectives would take place on our project board </text:span><text:span text:style-name="T72">(Mash It!, 2026(c)). </text:span><text:span text:style-name="T75">Reviews would be held on GitHub </text:span><text:span text:style-name="T72">(Mash It!, 2026(</text:span><text:span text:style-name="T76">b</text:span><text:span text:style-name="T72">)), </text:span><text:span text:style-name="T75">and dailies would take the form of a short message being sent at the start of each day in our Teams group chat – </text:span><text:span text:style-name="T77">This allowed us to detect problems early and act on them.</text:span></text:p>
      <text:p text:style-name="P37"/>
      <text:p text:style-name="P36"/>
      <text:p text:style-name="P3">2. The Shadows of Vahlvadell</text:p>
      <text:p text:style-name="P39">2.1. Overview</text:p>
      <text:p text:style-name="P40">The Shadows of Vahlvadell is a Role-Playing <text:span text:style-name="T78">G</text:span>ame (RPG) <text:span text:style-name="T78">tit</text:span><text:span text:style-name="T79">le </text:span><text:span text:style-name="T80">lead by</text:span><text:span text:style-name="T79"> Aaron Stevens. </text:span><text:span text:style-name="T81">It is developed in Unreal Engine for </text:span><text:span text:style-name="T80">Windows and Linux. The project follows the Agile methodology. </text:span><text:span text:style-name="T82">During development, I fulfilled the role of a software developer.</text:span></text:p>
      <text:p text:style-name="P40"/>
      <text:p text:style-name="P41">2.2. Involvement</text:p>
      <text:p text:style-name="P42">2.2(a) Systems</text:p>
      <text:list text:style-name="L6">
        <text:list-item>
          <text:p text:style-name="P43">Given my previous experience with developing inventory systems for another project (Scattered Lands), I was assigned to the task of designing and implementing an inventory system <text:span text:style-name="T83">(The Shadows of Vahlvadell, 2026(a), #54) (The Shadows of Vahlvadell, 2026(a), #4</text:span><text:span text:style-name="T84">0</text:span><text:span text:style-name="T83">) (The Shadows of Vahlvadell, 2026(</text:span><text:span text:style-name="T85">b</text:span><text:span text:style-name="T83">), #61).</text:span></text:p>
        </text:list-item>
        <text:list-item>
          <text:p text:style-name="P44">Designed <text:span text:style-name="T86">and</text:span> developed a dynamic weather system <text:span text:style-name="T83">(The Shadows of Vahlvadell, 2026(a), #</text:span><text:span text:style-name="T87">3</text:span><text:span text:style-name="T83">) (The Shadows of Vahlvadell, 2026(</text:span><text:span text:style-name="T85">b</text:span><text:span text:style-name="T83">), #</text:span><text:span text:style-name="T88">31</text:span><text:span text:style-name="T83">) </text:span><text:span text:style-name="T89">(The Shadows of Vahlvadell, 2026(c)). </text:span><text:s/><text:span text:style-name="T86">Then, collaborated with Aaron on implementing it</text:span> <text:span text:style-name="T83">(The Shadows of Vahlvadell, 2026(a), #</text:span><text:span text:style-name="T90">40</text:span><text:span text:style-name="T83">).</text:span></text:p>
        </text:list-item>
        <text:list-item>
          <text:p text:style-name="P45">Collaborated on the design<text:span text:style-name="T48"> </text:span><text:span text:style-name="T91">(The Shadows of Vahlvadell, 2026(c))</text:span><text:span text:style-name="T48"> </text:span>and development of the combat system <text:span text:style-name="T92">(</text:span><text:span text:style-name="T83">The Shadows of Vahlvadell, 2026(a), #</text:span><text:span text:style-name="T92">45</text:span><text:span text:style-name="T83">) </text:span><text:span text:style-name="T92">(</text:span><text:span text:style-name="T83">The Shadows of Vahlvadell, 2026(a), #</text:span><text:span text:style-name="T92">27</text:span><text:span text:style-name="T83">) </text:span><text:span text:style-name="T92">(</text:span><text:span text:style-name="T83">The Shadows of Vahlvadell, 2026(a), #</text:span><text:span text:style-name="T92">16</text:span><text:span text:style-name="T83">) </text:span><text:span text:style-name="T92">(</text:span><text:span text:style-name="T83">The Shadows of Vahlvadell, 2026(a), #</text:span><text:span text:style-name="T92">26</text:span><text:span text:style-name="T83">) <text:s/>(The Shadows of Vahlvadell, 2026(a), #54) (The Shadows of Vahlvadell, 2026(</text:span><text:span text:style-name="T93">b</text:span><text:span text:style-name="T83">), #</text:span><text:span text:style-name="T93">46</text:span><text:span text:style-name="T83">) (The Shadows of Vahlvadell, 2026(</text:span><text:span text:style-name="T93">b</text:span><text:span text:style-name="T83">), #</text:span><text:span text:style-name="T93">47</text:span><text:span text:style-name="T83">) (The Shadows of Vahlvadell, 2026(</text:span><text:span text:style-name="T93">b</text:span><text:span text:style-name="T83">), #</text:span><text:span text:style-name="T93">48</text:span><text:span text:style-name="T83">) (The Shadows of Vahlvadell, 2026(</text:span><text:span text:style-name="T93">b</text:span><text:span text:style-name="T83">), #</text:span><text:span text:style-name="T94">49</text:span><text:span text:style-name="T83">).</text:span></text:p>
        </text:list-item>
      </text:list>
      <text:p text:style-name="P46"/>
      <text:p text:style-name="P47"/>
      <text:p text:style-name="P48">2. <text:span text:style-name="T95">Personal Website</text:span></text:p>
      <text:p text:style-name="P49">2.1. Overview</text:p>
      <text:p text:style-name="P50">This website is a solo projec<text:span text:style-name="T96">t</text:span>. It is a<text:span text:style-name="T97">n ever-evolving </text:span><text:span text:style-name="T98">website</text:span><text:span text:style-name="T99"> aimed at increasing my understanding and proficiency with web development. </text:span><text:span text:style-name="T100">It is built on Flask in Python, and runs on</text:span><text:span text:style-name="T101"> a raspberry pi computer, within a docker container. It uses a PostgreSQL database which is contained within a separate </text:span><text:span text:style-name="T102">docker container</text:span><text:span text:style-name="T101"> for security. </text:span><text:span text:style-name="T103">For additional layer of security, the incoming connections go </text:span><text:soft-page-break/><text:span text:style-name="T103">through an NginX server. </text:span><text:span text:style-name="T104">So far, maintaining this project helped me gain understanding and experience in the following </text:span><text:span text:style-name="T105">(Personal RESTful API, 2026)</text:span><text:span text:style-name="T104">:</text:span></text:p>
      <text:list text:style-name="L7">
        <text:list-item>
          <text:p text:style-name="P51">Mobile-first design </text:p>
          <text:list>
            <text:list-item>
              <text:p text:style-name="P52">The website is built with mobile devices in mind. If a given feature doesn’t work on mobile, it is rejected.</text:p>
            </text:list-item>
          </text:list>
        </text:list-item>
        <text:list-item>
          <text:p text:style-name="P51">Security by design</text:p>
          <text:list>
            <text:list-item>
              <text:p text:style-name="P51"/>
            </text:list-item>
          </text:list>
        </text:list-item>
        <text:list-item>
          <text:p text:style-name="P53">Containerisation</text:p>
        </text:list-item>
        <text:list-item>
          <text:p text:style-name="P54">RESTful API<text:span text:style-name="T106">s</text:span></text:p>
        </text:list-item>
      </text:list>
      <text:p text:style-name="P55"/>
      <text:p text:style-name="P56">2.2 Workflow</text:p>
      <text:p text:style-name="P57">Given that this is a solo project, no official framework was adopted during its development. I would simply work on it when I could make the time for it.</text:p>
      <text:p text:style-name="P58"/>
      <text:p text:style-name="P59"/>
      <text:p text:style-name="P59"/>
      <text:p text:style-name="P60"/>
      <text:p text:style-name="P61"/>
      <text:p text:style-name="P61"/>
      <text:p text:style-name="P62">References:</text:p>
      <text:p text:style-name="P63"/>
      <text:p text:style-name="P64"><text:span text:style-name="T107">Mash It!</text:span><text:span text:style-name="T107"> </text:span><text:span text:style-name="T108">(</text:span><text:span text:style-name="T109">Brewing Game</text:span><text:span text:style-name="T108">)</text:span><text:span text:style-name="T107"> </text:span>(2026a) <text:span text:style-name="T48">Kanban</text:span>. Available at: <text:a xlink:type="simple" xlink:href="https://github.com/orgs/Brewing-Game/projects/1" text:style-name="Internet_20_link" text:visited-style-name="Visited_20_Internet_20_Link">https://github.com/orgs/Brewing-Game/projects/1</text:a> (Accessed: 20 May 2026).</text:p>
      <text:p text:style-name="P65"><text:span text:style-name="T110">Mash It! </text:span><text:span text:style-name="T108">(</text:span><text:span text:style-name="T109">Brewing Game</text:span><text:span text:style-name="T108">)</text:span><text:span text:style-name="T111"> (2026b) </text:span><text:span text:style-name="T112">Pull Requests</text:span><text:span text:style-name="T111">. Available at: </text:span><text:a xlink:type="simple" xlink:href="https://github.com/Brewing-Game/brewing-game/pulls" text:style-name="Internet_20_link" text:visited-style-name="Visited_20_Internet_20_Link"><text:span text:style-name="T111">https://github.com/Brewing-Game/brewing-game/pulls</text:span></text:a><text:span text:style-name="T111"> (Accessed: 20 May 2026).</text:span></text:p>
      <text:p text:style-name="P66"><text:span text:style-name="T107">Mash It! </text:span><text:span text:style-name="T113">(Brewing Game)</text:span> (2026c) <text:span text:style-name="T114">Project</text:span><text:span text:style-name="T48"> Board</text:span>. Available at: <text:a xlink:type="simple" xlink:href="https://app.mural.co/t/farmingsimulator9293/m/farmingsimulator9293/1762074910299/66ec2841ac6d7c3ddc9a248ef1a43dd3283119ff" text:style-name="Internet_20_link" text:visited-style-name="Visited_20_Internet_20_Link">https://app.mural.co/t/farmingsimulator9293/m/farmingsimulator9293/1762074910299/66ec2841ac6d7c3ddc9a248ef1a43dd3283119ff</text:a> (Accessed: 20 May 2026).</text:p>
      <text:p text:style-name="P67"/>
      <text:p text:style-name="P68"><text:span text:style-name="T115">The </text:span><text:span text:style-name="T107">Shadows of Vahlvadell (Aaron Stevens)</text:span> <text:span text:style-name="T116">(2026a) </text:span><text:span text:style-name="T117">Kanban</text:span><text:span text:style-name="T116">. Available at: </text:span><text:a xlink:type="simple" xlink:href="https://github.com/users/Strivion/projects/2/views/1" text:style-name="Internet_20_link" text:visited-style-name="Visited_20_Internet_20_Link"><text:span text:style-name="T116">https://github.com/users/Strivion/projects/2/views/1</text:span></text:a><text:span text:style-name="T116"> <text:s/>(Accessed: 20 May 2026).</text:span></text:p>
      <text:p text:style-name="P69"><text:span text:style-name="T115">The </text:span><text:span text:style-name="T107">Shadows of Vahlvadell (Aaron Stevens)</text:span> (2026b) <text:span text:style-name="T48">Pull Requests</text:span>. Available at: <text:a xlink:type="simple" xlink:href="https://github.com/Strivion/Vahlvadell/pulls" text:style-name="Internet_20_link" text:visited-style-name="Visited_20_Internet_20_Link">https://github.com/Strivion/Vahlvadell/pulls</text:a> (Accessed: 20 May 2026).</text:p>
      <text:p text:style-name="P70"><text:soft-page-break/><text:span text:style-name="T115">The </text:span><text:span text:style-name="T107">Shadows of Vahlvadell </text:span><text:span text:style-name="T118">(Aaron Stevens)</text:span><text:span text:style-name="T107"> </text:span>(2026c) <text:span text:style-name="T48">Project Board</text:span>. Available at: <text:a xlink:type="simple" xlink:href="https://app.mural.co/t/vahlvadell2492/m/vahlvadell2492/1764354812668/d19544649393d65be72b9d83c2dc84425e20fd06" text:style-name="Internet_20_link" text:visited-style-name="Visited_20_Internet_20_Link">https://app.mural.co/t/vahlvadell2492/m/vahlvadell2492/1764354812668/d19544649393d65be72b9d83c2dc84425e20fd06</text:a> (Accessed: 20 May 2026).</text:p>
      <text:p text:style-name="P71"/>
      <text:p text:style-name="P72"><text:span text:style-name="T107">Personal RESTful API (Ryboster)</text:span> (2026) <text:span text:style-name="T48">Repository</text:span>. Available at: <text:a xlink:type="simple" xlink:href="https://github.com/Ryboster/Personal_RESTful_API" text:style-name="Internet_20_link" text:visited-style-name="Visited_20_Internet_20_Link">https://github.com/Ryboster/Personal_RESTful_API</text:a> (Accessed: 22 May 2026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9:00:31.200693584</dc:date>
    <meta:editing-duration>P1DT15M22S</meta:editing-duration>
    <meta:editing-cycles>319</meta:editing-cycles>
    <meta:generator>LibreOffice/25.8.3.2$Linux_X86_64 LibreOffice_project/8ca8d55c161d602844f5428fa4b58097424e324e</meta:generator>
    <meta:document-statistic meta:table-count="0" meta:image-count="0" meta:object-count="0" meta:page-count="5" meta:paragraph-count="65" meta:word-count="1128" meta:character-count="7666" meta:non-whitespace-character-count="6603"/>
  </office:meta>
</office:document-meta>
</file>