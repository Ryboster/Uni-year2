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5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47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officeooo:rsid="0153d199"/>
    </style:style>
    <style:style style:name="T92" style:family="text">
      <style:text-properties officeooo:rsid="014d11ac"/>
    </style:style>
    <style:style style:name="T93" style:family="text">
      <style:text-properties officeooo:rsid="01567fbe"/>
    </style:style>
    <style:style style:name="T94" style:family="text">
      <style:text-properties officeooo:rsid="014ddaac"/>
    </style:style>
    <style:style style:name="T95" style:family="text">
      <style:text-properties officeooo:rsid="01563f40"/>
    </style:style>
    <style:style style:name="T96" style:family="text">
      <style:text-properties officeooo:rsid="015a3268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0c55401" style:font-weight-asian="bold" style:font-weight-complex="bold"/>
    </style:style>
    <style:style style:name="T99" style:family="text">
      <style:text-properties fo:font-weight="bold" officeooo:rsid="00c945a8" style:font-weight-asian="bold" style:font-weight-complex="bold"/>
    </style:style>
    <style:style style:name="T100" style:family="text">
      <style:text-properties fo:font-weight="bold" officeooo:rsid="00c5460f" style:font-weight-asian="bold" style:font-weight-complex="bold"/>
    </style:style>
    <style:style style:name="T101" style:family="text">
      <style:text-properties officeooo:rsid="00c5460f"/>
    </style:style>
    <style:style style:name="T102" style:family="text">
      <style:text-properties fo:font-style="italic" officeooo:rsid="00c5460f" style:font-style-asian="italic" style:font-style-complex="italic"/>
    </style:style>
    <style:style style:name="T103" style:family="text">
      <style:text-properties fo:font-weight="bold" officeooo:rsid="00d39f75" style:font-weight-asian="bold" style:font-weight-complex="bold"/>
    </style:style>
    <style:style style:name="T104" style:family="text">
      <style:text-properties fo:font-style="italic" officeooo:rsid="00dcbc28" style:font-style-asian="italic" style:font-style-complex="italic"/>
    </style:style>
    <style:style style:name="T105" style:family="text">
      <style:text-properties fo:font-weight="bold" officeooo:rsid="0128bc99" style:font-weight-asian="bold" style:font-weight-complex="bold"/>
    </style:style>
    <style:style style:name="T106" style:family="text">
      <style:text-properties officeooo:rsid="00cbbf6a"/>
    </style:style>
    <style:style style:name="T107" style:family="text">
      <style:text-properties fo:font-style="italic" officeooo:rsid="00cbbf6a" style:font-style-asian="italic" style:font-style-complex="italic"/>
    </style:style>
    <style:style style:name="T108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.</text:span></text:p>
        </text:list-item>
      </text:list>
      <text:p text:style-name="P36"/>
      <text:p text:style-name="P44">2. <text:span text:style-name="T90">Personal Website</text:span></text:p>
      <text:p text:style-name="P45">2.1. Overview</text:p>
      <text:p text:style-name="P46">This website is a solo projec<text:span text:style-name="T91">t</text:span>. It is a<text:span text:style-name="T92">n ever-evolving </text:span><text:span text:style-name="T93">website</text:span><text:span text:style-name="T94"> aimed at increasing my understanding and proficiency with web development. </text:span><text:span text:style-name="T95">Currently, </text:span><text:span text:style-name="T96">it helped me gain understanding over the following concept:</text:span></text:p>
      <text:list text:style-name="L7">
        <text:list-item>
          <text:p text:style-name="P47">Mobile-first design</text:p>
        </text:list-item>
        <text:list-item>
          <text:p text:style-name="P47">Security by design</text:p>
        </text:list-item>
        <text:list-item>
          <text:p text:style-name="P47"/>
        </text:list-item>
      </text:list>
      <text:p text:style-name="P46"/>
      <text:p text:style-name="P48">(Personal RESTful API, 2026)</text:p>
      <text:p text:style-name="P49"/>
      <text:p text:style-name="P49"/>
      <text:p text:style-name="P50"/>
      <text:p text:style-name="P51"/>
      <text:p text:style-name="P51"><text:soft-page-break/></text:p>
      <text:p text:style-name="P52">References:</text:p>
      <text:p text:style-name="P53"/>
      <text:p text:style-name="P54"><text:span text:style-name="T97">Mash It!</text:span><text:span text:style-name="T97"> </text:span><text:span text:style-name="T98">(</text:span><text:span text:style-name="T99">Brewing Game</text:span><text:span text:style-name="T98">)</text:span><text:span text:style-name="T97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5"><text:span text:style-name="T100">Mash It! </text:span><text:span text:style-name="T98">(</text:span><text:span text:style-name="T99">Brewing Game</text:span><text:span text:style-name="T98">)</text:span><text:span text:style-name="T101"> (2026b) </text:span><text:span text:style-name="T102">Pull Requests</text:span><text:span text:style-name="T101">. Available at: </text:span><text:a xlink:type="simple" xlink:href="https://github.com/Brewing-Game/brewing-game/pulls" text:style-name="Internet_20_link" text:visited-style-name="Visited_20_Internet_20_Link"><text:span text:style-name="T101">https://github.com/Brewing-Game/brewing-game/pulls</text:span></text:a><text:span text:style-name="T101"> (Accessed: 20 May 2026).</text:span></text:p>
      <text:p text:style-name="P56"><text:span text:style-name="T97">Mash It! </text:span><text:span text:style-name="T103">(Brewing Game)</text:span> (2026c) <text:span text:style-name="T104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7"/>
      <text:p text:style-name="P58"><text:span text:style-name="T105">The </text:span><text:span text:style-name="T97">Shadows of Vahlvadell (Aaron Stevens)</text:span> <text:span text:style-name="T106">(2026a) </text:span><text:span text:style-name="T107">Kanban</text:span><text:span text:style-name="T106">. Available at: </text:span><text:a xlink:type="simple" xlink:href="https://github.com/users/Strivion/projects/2/views/1" text:style-name="Internet_20_link" text:visited-style-name="Visited_20_Internet_20_Link"><text:span text:style-name="T106">https://github.com/users/Strivion/projects/2/views/1</text:span></text:a><text:span text:style-name="T106"> <text:s/>(Accessed: 20 May 2026).</text:span></text:p>
      <text:p text:style-name="P59"><text:span text:style-name="T105">The </text:span><text:span text:style-name="T97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0"><text:span text:style-name="T105">The </text:span><text:span text:style-name="T97">Shadows of Vahlvadell </text:span><text:span text:style-name="T108">(Aaron Stevens)</text:span><text:span text:style-name="T97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1"/>
      <text:p text:style-name="P62"><text:span text:style-name="T97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52:52.097715573</dc:date>
    <meta:editing-duration>PT23H7M54S</meta:editing-duration>
    <meta:editing-cycles>297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9" meta:word-count="948" meta:character-count="6625" meta:non-whitespace-character-count="5735"/>
  </office:meta>
</office:document-meta>
</file>