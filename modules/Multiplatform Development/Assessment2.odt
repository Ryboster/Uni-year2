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b2d3ce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c55401" style:font-weight-asian="bold" style:font-weight-complex="bold"/>
    </style:style>
    <style:style style:name="T92" style:family="text">
      <style:text-properties fo:font-weight="bold" officeooo:rsid="00c945a8" style:font-weight-asian="bold" style:font-weight-complex="bold"/>
    </style:style>
    <style:style style:name="T93" style:family="text">
      <style:text-properties fo:font-weight="bold" officeooo:rsid="00c5460f" style:font-weight-asian="bold" style:font-weight-complex="bold"/>
    </style:style>
    <style:style style:name="T94" style:family="text">
      <style:text-properties officeooo:rsid="00c5460f"/>
    </style:style>
    <style:style style:name="T95" style:family="text">
      <style:text-properties fo:font-style="italic" officeooo:rsid="00c5460f" style:font-style-asian="italic" style:font-style-complex="italic"/>
    </style:style>
    <style:style style:name="T96" style:family="text">
      <style:text-properties fo:font-weight="bold" officeooo:rsid="00d39f75" style:font-weight-asian="bold" style:font-weight-complex="bold"/>
    </style:style>
    <style:style style:name="T97" style:family="text">
      <style:text-properties fo:font-style="italic" officeooo:rsid="00dcbc28" style:font-style-asian="italic" style:font-style-complex="italic"/>
    </style:style>
    <style:style style:name="T98" style:family="text">
      <style:text-properties fo:font-weight="bold" officeooo:rsid="0128bc99" style:font-weight-asian="bold" style:font-weight-complex="bold"/>
    </style:style>
    <style:style style:name="T99" style:family="text">
      <style:text-properties officeooo:rsid="00cbbf6a"/>
    </style:style>
    <style:style style:name="T100" style:family="text">
      <style:text-properties fo:font-style="italic" officeooo:rsid="00cbbf6a" style:font-style-asian="italic" style:font-style-complex="italic"/>
    </style:style>
    <style:style style:name="T10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44"/>
      <text:p text:style-name="P45"/>
      <text:p text:style-name="P36"/>
      <text:p text:style-name="P36"/>
      <text:p text:style-name="P36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References:</text:p>
      <text:p text:style-name="P49"/>
      <text:p text:style-name="P50"><text:span text:style-name="T90">Mash It!</text:span><text:span text:style-name="T90"> </text:span><text:span text:style-name="T91">(</text:span><text:span text:style-name="T92">Brewing Game</text:span><text:span text:style-name="T91">)</text:span><text:span text:style-name="T9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1"><text:soft-page-break/><text:span text:style-name="T93">Mash It! </text:span><text:span text:style-name="T91">(</text:span><text:span text:style-name="T92">Brewing Game</text:span><text:span text:style-name="T91">)</text:span><text:span text:style-name="T94"> (2026b) </text:span><text:span text:style-name="T95">Pull Requests</text:span><text:span text:style-name="T94">. Available at: </text:span><text:a xlink:type="simple" xlink:href="https://github.com/Brewing-Game/brewing-game/pulls" text:style-name="Internet_20_link" text:visited-style-name="Visited_20_Internet_20_Link"><text:span text:style-name="T94">https://github.com/Brewing-Game/brewing-game/pulls</text:span></text:a><text:span text:style-name="T94"> (Accessed: 20 May 2026).</text:span></text:p>
      <text:p text:style-name="P52"><text:span text:style-name="T90">Mash It! </text:span><text:span text:style-name="T96">(Brewing Game)</text:span> (2026c) <text:span text:style-name="T9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3"/>
      <text:p text:style-name="P54"><text:span text:style-name="T98">The </text:span><text:span text:style-name="T90">Shadows of Vahlvadell (Aaron Stevens)</text:span> <text:span text:style-name="T99">(2026a) </text:span><text:span text:style-name="T100">Kanban</text:span><text:span text:style-name="T99">. Available at: </text:span><text:a xlink:type="simple" xlink:href="https://github.com/users/Strivion/projects/2/views/1" text:style-name="Internet_20_link" text:visited-style-name="Visited_20_Internet_20_Link"><text:span text:style-name="T99">https://github.com/users/Strivion/projects/2/views/1</text:span></text:a><text:span text:style-name="T99"> <text:s/>(Accessed: 20 May 2026).</text:span></text:p>
      <text:p text:style-name="P55"><text:span text:style-name="T98">The </text:span><text:span text:style-name="T9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6"><text:span text:style-name="T98">The </text:span><text:span text:style-name="T90">Shadows of Vahlvadell </text:span><text:span text:style-name="T101">(Aaron Stevens)</text:span><text:span text:style-name="T9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7"/>
      <text:p text:style-name="P58"><text:span text:style-name="T90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30:10.015940557</dc:date>
    <meta:editing-duration>PT22H45M23S</meta:editing-duration>
    <meta:editing-cycles>279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5" meta:word-count="907" meta:character-count="6376" meta:non-whitespace-character-count="5520"/>
  </office:meta>
</office:document-meta>
</file>