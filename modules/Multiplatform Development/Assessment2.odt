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57250" officeooo:paragraph-rsid="00057250"/>
    </style:style>
    <style:style style:name="P3" style:family="paragraph" style:parent-style-name="Text_20_body">
      <style:text-properties officeooo:rsid="000725ce" officeooo:paragraph-rsid="000725ce"/>
    </style:style>
    <style:style style:name="P4" style:family="paragraph" style:parent-style-name="Text_20_body">
      <style:text-properties officeooo:rsid="0007be72" officeooo:paragraph-rsid="0007be72"/>
    </style:style>
    <style:style style:name="P5" style:family="paragraph" style:parent-style-name="Text_20_body">
      <style:text-properties officeooo:rsid="00108fae" officeooo:paragraph-rsid="0018a1e9"/>
    </style:style>
    <style:style style:name="P6" style:family="paragraph" style:parent-style-name="Text_20_body">
      <style:text-properties officeooo:rsid="00108fae" officeooo:paragraph-rsid="00108fae"/>
    </style:style>
    <style:style style:name="P7" style:family="paragraph" style:parent-style-name="Text_20_body">
      <style:text-properties officeooo:rsid="0016a0fe" officeooo:paragraph-rsid="001ac487"/>
    </style:style>
    <style:style style:name="P8" style:family="paragraph" style:parent-style-name="Text_20_body">
      <style:text-properties officeooo:rsid="0011709a" officeooo:paragraph-rsid="0011709a"/>
    </style:style>
    <style:style style:name="P9" style:family="paragraph" style:parent-style-name="Text_20_body">
      <style:text-properties officeooo:rsid="00182e9a" officeooo:paragraph-rsid="00182e9a"/>
    </style:style>
    <style:style style:name="P10" style:family="paragraph" style:parent-style-name="Text_20_body">
      <style:text-properties officeooo:rsid="001ac487" officeooo:paragraph-rsid="001ac487"/>
    </style:style>
    <style:style style:name="P11" style:family="paragraph" style:parent-style-name="Text_20_body">
      <style:text-properties officeooo:rsid="000acdee" officeooo:paragraph-rsid="000acdee"/>
    </style:style>
    <style:style style:name="P12" style:family="paragraph" style:parent-style-name="Text_20_body">
      <style:text-properties officeooo:rsid="000cf4d2" officeooo:paragraph-rsid="000cf4d2"/>
    </style:style>
    <style:style style:name="P13" style:family="paragraph" style:parent-style-name="Text_20_body">
      <style:text-properties officeooo:rsid="000e0618" officeooo:paragraph-rsid="000e0618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officeooo:rsid="000acdee"/>
    </style:style>
    <style:style style:name="T3" style:family="text">
      <style:text-properties officeooo:rsid="000eaa33"/>
    </style:style>
    <style:style style:name="T4" style:family="text">
      <style:text-properties officeooo:rsid="0018a1e9"/>
    </style:style>
    <style:style style:name="T5" style:family="text">
      <style:text-properties officeooo:rsid="0017884e"/>
    </style:style>
    <style:style style:name="T6" style:family="text">
      <style:text-properties officeooo:rsid="001a9d90"/>
    </style:style>
    <style:style style:name="T7" style:family="text">
      <style:text-properties officeooo:rsid="001ac487"/>
    </style:style>
    <style:style style:name="T8" style:family="text">
      <style:text-properties officeooo:rsid="001fdb95"/>
    </style:style>
    <style:style style:name="T9" style:family="text">
      <style:text-properties officeooo:rsid="00179431"/>
    </style:style>
    <style:style style:name="T10" style:family="text">
      <style:text-properties officeooo:rsid="0022f680"/>
    </style:style>
    <style:style style:name="T11" style:family="text">
      <style:text-properties officeooo:rsid="00182e9a"/>
    </style:style>
    <style:style style:name="T12" style:family="text">
      <style:text-properties officeooo:rsid="00199cd1"/>
    </style:style>
    <style:style style:name="T13" style:family="text">
      <style:text-properties officeooo:rsid="001b02dc"/>
    </style:style>
    <style:style style:name="T14" style:family="text">
      <style:text-properties officeooo:rsid="001b3fbc"/>
    </style:style>
    <style:style style:name="T15" style:family="text">
      <style:text-properties officeooo:rsid="00127f9e"/>
    </style:style>
    <style:style style:name="T16" style:family="text">
      <style:text-properties officeooo:rsid="001be3f0"/>
    </style:style>
    <style:style style:name="T17" style:family="text">
      <style:text-properties officeooo:rsid="0024dfff"/>
    </style:style>
    <style:style style:name="T18" style:family="text">
      <style:text-properties officeooo:rsid="000c3e16"/>
    </style:style>
    <style:style style:name="T19" style:family="text">
      <style:text-properties officeooo:rsid="000e06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3">1. <text:span text:style-name="T1">Project Management Environments</text:span></text:p>
      <text:p text:style-name="P4">1.<text:span text:style-name="T2">1. </text:span><text:span text:style-name="T3">Comparison</text:span><text:span text:style-name="T2"> (Agile vs Waterfall)</text:span></text:p>
      <text:p text:style-name="P5">Agile and waterfall are two different software development methodologies. Each involves a different project development lifecycle, and <text:span text:style-name="T4">has a different philosophy.</text:span></text:p>
      <text:p text:style-name="P6"/>
      <text:p text:style-name="P6">1.1(a). Agile</text:p>
      <text:p text:style-name="P7">Agile assumes that the requirements of a project may change during its development, and that developers may need to amend existing codebase to better suit the ever-evolving<text:span text:style-name="T5"> architecture. </text:span><text:span text:style-name="T6">It </text:span><text:span text:style-name="T7">also </text:span><text:span text:style-name="T6">assumes that developers don’t have complete knowledge and understanding of the requirements </text:span><text:span text:style-name="T7">at the beginning of the project.</text:span></text:p>
      <text:p text:style-name="P7"><text:span text:style-name="T8">Using this methodology</text:span><text:span text:style-name="T9">, developers will typically </text:span><text:span text:style-name="T10">integrate</text:span><text:span text:style-name="T9"> the scrum framework </text:span><text:span text:style-name="T11">in day-to-day development </text:span><text:span text:style-name="T12">to recursively test </text:span><text:span text:style-name="T13">the codebase and ensure successful alignment with the </text:span><text:span text:style-name="T14">set timeline.</text:span></text:p>
      <text:p text:style-name="P6"/>
      <text:p text:style-name="P8">1.1(b). <text:span text:style-name="T15">Waterfall</text:span> </text:p>
      <text:p text:style-name="P9">Waterfall assumes that the requirements must not change during the development of a project. Instead, exact library and versioning requirements are <text:span text:style-name="T16">gathered, </text:span><text:span text:style-name="T6">researched</text:span>, and tested during the planning phase which <text:span text:style-name="T17">takes place</text:span><text:span text:style-name="T6"> at the beginning of the project development lifecycle. </text:span></text:p>
      <text:p text:style-name="P10">Waterfall will delegate </text:p>
      <text:p text:style-name="P6"/>
      <text:p text:style-name="P4"/>
      <text:p text:style-name="P11"><text:span text:style-name="T18">1</text:span>.2. Personal Experience</text:p>
      <text:p text:style-name="P3"/>
      <text:p text:style-name="P3">2. <text:span text:style-name="T1">Business</text:span></text:p>
      <text:p text:style-name="P12">2.<text:span text:style-name="T19">1</text:span></text:p>
      <text:p text:style-name="P12"/>
      <text:p text:style-name="P13">2.2</text:p>
      <text:p text:style-name="P4"/>
      <text:p text:style-name="P3">3. <text:span text:style-name="T1">Meta Skills</text:span></text:p>
      <text:p text:style-name="P4">12</text:p>
      <text:p text:style-name="P4"/>
      <text:p text:style-name="P3">4. <text:span text:style-name="T1">Security</text:span></text:p>
      <text:p text:style-name="P4"><text:soft-page-break/>12</text:p>
      <text:p text:style-name="P4"/>
      <text:p text:style-name="P3">5. <text:span text:style-name="T1">Technical</text:span></text:p>
      <text:p text:style-name="P4">1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1T19:31:51.165844105</dc:date>
    <meta:editing-duration>PT4H43M13S</meta:editing-duration>
    <meta:editing-cycles>28</meta:editing-cycles>
    <meta:generator>LibreOffice/25.8.3.2$Linux_X86_64 LibreOffice_project/8ca8d55c161d602844f5428fa4b58097424e324e</meta:generator>
    <meta:document-statistic meta:table-count="0" meta:image-count="0" meta:object-count="0" meta:page-count="2" meta:paragraph-count="20" meta:word-count="170" meta:character-count="1175" meta:non-whitespace-character-count="1022"/>
  </office:meta>
</office:document-meta>
</file>