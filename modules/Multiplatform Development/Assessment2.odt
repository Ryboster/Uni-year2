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  <style:style style:name="P5" style:family="paragraph" style:parent-style-name="Text_20_body">
      <style:text-properties officeooo:rsid="00108fae" officeooo:paragraph-rsid="0018a1e9"/>
    </style:style>
    <style:style style:name="P6" style:family="paragraph" style:parent-style-name="Text_20_body">
      <style:text-properties officeooo:rsid="00108fae" officeooo:paragraph-rsid="00108fae"/>
    </style:style>
    <style:style style:name="P7" style:family="paragraph" style:parent-style-name="Text_20_body">
      <style:text-properties officeooo:rsid="0016a0fe" officeooo:paragraph-rsid="001ac487"/>
    </style:style>
    <style:style style:name="P8" style:family="paragraph" style:parent-style-name="Text_20_body">
      <style:text-properties officeooo:rsid="0011709a" officeooo:paragraph-rsid="0011709a"/>
    </style:style>
    <style:style style:name="P9" style:family="paragraph" style:parent-style-name="Text_20_body">
      <style:text-properties officeooo:rsid="00182e9a" officeooo:paragraph-rsid="00182e9a"/>
    </style:style>
    <style:style style:name="P10" style:family="paragraph" style:parent-style-name="Text_20_body">
      <style:text-properties officeooo:rsid="001ac487" officeooo:paragraph-rsid="001ac487"/>
    </style:style>
    <style:style style:name="P11" style:family="paragraph" style:parent-style-name="Text_20_body">
      <style:text-properties officeooo:rsid="000acdee" officeooo:paragraph-rsid="000acdee"/>
    </style:style>
    <style:style style:name="P12" style:family="paragraph" style:parent-style-name="Text_20_body">
      <style:text-properties officeooo:rsid="000cf4d2" officeooo:paragraph-rsid="000cf4d2"/>
    </style:style>
    <style:style style:name="P13" style:family="paragraph" style:parent-style-name="Text_20_body">
      <style:text-properties officeooo:rsid="000e0618" officeooo:paragraph-rsid="000e0618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acdee"/>
    </style:style>
    <style:style style:name="T3" style:family="text">
      <style:text-properties officeooo:rsid="000eaa33"/>
    </style:style>
    <style:style style:name="T4" style:family="text">
      <style:text-properties officeooo:rsid="0018a1e9"/>
    </style:style>
    <style:style style:name="T5" style:family="text">
      <style:text-properties officeooo:rsid="0017884e"/>
    </style:style>
    <style:style style:name="T6" style:family="text">
      <style:text-properties officeooo:rsid="001a9d90"/>
    </style:style>
    <style:style style:name="T7" style:family="text">
      <style:text-properties officeooo:rsid="001ac487"/>
    </style:style>
    <style:style style:name="T8" style:family="text">
      <style:text-properties officeooo:rsid="00179431"/>
    </style:style>
    <style:style style:name="T9" style:family="text">
      <style:text-properties officeooo:rsid="00182e9a"/>
    </style:style>
    <style:style style:name="T10" style:family="text">
      <style:text-properties officeooo:rsid="00199cd1"/>
    </style:style>
    <style:style style:name="T11" style:family="text">
      <style:text-properties officeooo:rsid="00127f9e"/>
    </style:style>
    <style:style style:name="T12" style:family="text">
      <style:text-properties officeooo:rsid="000c3e16"/>
    </style:style>
    <style:style style:name="T13" style:family="text">
      <style:text-properties officeooo:rsid="000e06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<text:span text:style-name="T1">Project Management Environments</text:span></text:p>
      <text:p text:style-name="P4">1.<text:span text:style-name="T2">1. </text:span><text:span text:style-name="T3">Comparison</text:span><text:span text:style-name="T2"> (Agile vs Waterfall)</text:span></text:p>
      <text:p text:style-name="P5">Agile and waterfall are two different software development methodologies. Each involves a different project development lifecycle, and <text:span text:style-name="T4">has a different philosophy.</text:span></text:p>
      <text:p text:style-name="P6"/>
      <text:p text:style-name="P6">1.1(a). Agile</text:p>
      <text:p text:style-name="P7">Agile assumes that the requirements of a project may change during its development, and that developers may need to amend existing codebase to better suit the ever-evolving<text:span text:style-name="T5"> architecture. </text:span><text:span text:style-name="T6">It </text:span><text:span text:style-name="T7">also </text:span><text:span text:style-name="T6">assumes that developers don’t have complete knowledge and understanding of the requirements </text:span><text:span text:style-name="T7">at the beginning of the project, and that they’ll gain it during its development. </text:span></text:p>
      <text:p text:style-name="P7"><text:span text:style-name="T8">In agile, developers will typically use the scrum framework </text:span><text:span text:style-name="T9">in day-to-day development </text:span><text:span text:style-name="T10">to recursively test and</text:span></text:p>
      <text:p text:style-name="P6"/>
      <text:p text:style-name="P8">1.1(b). <text:span text:style-name="T11">Waterfall</text:span> </text:p>
      <text:p text:style-name="P9">Waterfall assumes that the requirements must not change during the development of a project. Instead, exact library and versioning requirements are <text:span text:style-name="T6">researched, </text:span>gathered, and tested during the planning phase which <text:span text:style-name="T6">comes at the beginning of the project development lifecycle. </text:span></text:p>
      <text:p text:style-name="P10">Waterfall will delegate </text:p>
      <text:p text:style-name="P6"/>
      <text:p text:style-name="P4"/>
      <text:p text:style-name="P11"><text:span text:style-name="T12">1</text:span>.2. Personal Experience</text:p>
      <text:p text:style-name="P3"/>
      <text:p text:style-name="P3">2. <text:span text:style-name="T1">Business</text:span></text:p>
      <text:p text:style-name="P12">2.<text:span text:style-name="T13">1</text:span></text:p>
      <text:p text:style-name="P12"/>
      <text:p text:style-name="P13">2.2</text:p>
      <text:p text:style-name="P4"/>
      <text:p text:style-name="P3">3. <text:span text:style-name="T1">Meta Skills</text:span></text:p>
      <text:p text:style-name="P4">12</text:p>
      <text:p text:style-name="P4"/>
      <text:p text:style-name="P3">4. <text:span text:style-name="T1">Security</text:span></text:p>
      <text:p text:style-name="P4"><text:soft-page-break/>12</text:p>
      <text:p text:style-name="P4"/>
      <text:p text:style-name="P3">5. <text:span text:style-name="T1">Technical</text:span></text:p>
      <text:p text:style-name="P4">1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5:00:40.788226638</dc:date>
    <meta:editing-duration>PT46M54S</meta:editing-duration>
    <meta:editing-cycles>21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20" meta:word-count="167" meta:character-count="1135" meta:non-whitespace-character-count="984"/>
  </office:meta>
</office:document-meta>
</file>