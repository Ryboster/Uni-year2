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9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3f25fd"/>
    </style:style>
    <style:style style:name="T57" style:family="text">
      <style:text-properties officeooo:rsid="002d47dc"/>
    </style:style>
    <style:style style:name="T58" style:family="text">
      <style:text-properties officeooo:rsid="00371c2c"/>
    </style:style>
    <style:style style:name="T5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6"/>
        </text:list-item>
      </text:list>
      <text:p text:style-name="P37"><text:span text:style-name="T56">2</text:span>.2(a). Inventory System</text:p>
      <text:p text:style-name="P35"><text:s/></text:p>
      <text:p text:style-name="P35"/>
      <text:p text:style-name="P37"><text:span text:style-name="T56">2</text:span>.2(b). Weather System</text:p>
      <text:p text:style-name="P37"><text:span text:style-name="T56">2</text:span>.2(c). Combat System</text:p>
      <text:p text:style-name="P38"/>
      <text:p text:style-name="P31"/>
      <text:p text:style-name="P31">3. MauiScreenTime</text:p>
      <text:p text:style-name="P39"/>
      <text:p text:style-name="P40"><text:span text:style-name="T57">3</text:span>.1. Overview</text:p>
      <text:p text:style-name="P41">“MauiScreenTime” is a mobile application for <text:span text:style-name="T58">A</text:span>ndroid and IOS. <text:span text:style-name="T59">It follows the Agile methodology. </text:span><text:span text:style-name="T58">Although my involvement with it was brief, during its development I fulfilled the role of a software developer.</text:span></text:p>
      <text:p text:style-name="P41"/>
      <text:p text:style-name="P34">3.2. Involvement</text:p>
      <text:p text:style-name="P42"/>
      <text:p text:style-name="P43">3.2(a). </text:p>
      <text:p text:style-name="P31"/>
      <text:p text:style-name="P31"/>
      <text:p text:style-name="P31"/>
      <text:p text:style-name="P44">4. Blazejowski.co.uk</text:p>
      <text:p text:style-name="P45">mobile-first design,</text:p>
      <text:p text:style-name="P45">security by design,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2:18.354108631</dc:date>
    <meta:editing-duration>PT21H48M36S</meta:editing-duration>
    <meta:editing-cycles>155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6" meta:word-count="645" meta:character-count="6117" meta:non-whitespace-character-count="5531"/>
  </office:meta>
</office:document-meta>
</file>