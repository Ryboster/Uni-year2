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182e9a"/>
    </style:style>
    <style:style style:name="P10" style:family="paragraph" style:parent-style-name="Text_20_body">
      <style:text-properties officeooo:rsid="001ac487" officeooo:paragraph-rsid="001ac487"/>
    </style:style>
    <style:style style:name="P11" style:family="paragraph" style:parent-style-name="Text_20_body">
      <style:text-properties officeooo:rsid="000acdee" officeooo:paragraph-rsid="000acdee"/>
    </style:style>
    <style:style style:name="P12" style:family="paragraph" style:parent-style-name="Text_20_body">
      <style:text-properties officeooo:rsid="000cf4d2" officeooo:paragraph-rsid="000cf4d2"/>
    </style:style>
    <style:style style:name="P13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79431"/>
    </style:style>
    <style:style style:name="T9" style:family="text">
      <style:text-properties officeooo:rsid="00182e9a"/>
    </style:style>
    <style:style style:name="T10" style:family="text">
      <style:text-properties officeooo:rsid="00199cd1"/>
    </style:style>
    <style:style style:name="T11" style:family="text">
      <style:text-properties officeooo:rsid="001b02dc"/>
    </style:style>
    <style:style style:name="T12" style:family="text">
      <style:text-properties officeooo:rsid="001b3fbc"/>
    </style:style>
    <style:style style:name="T13" style:family="text">
      <style:text-properties officeooo:rsid="00127f9e"/>
    </style:style>
    <style:style style:name="T14" style:family="text">
      <style:text-properties officeooo:rsid="001be3f0"/>
    </style:style>
    <style:style style:name="T15" style:family="text">
      <style:text-properties officeooo:rsid="000c3e16"/>
    </style:style>
    <style:style style:name="T16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, and that they’ll gain it during its development. </text:span></text:p>
      <text:p text:style-name="P7"><text:span text:style-name="T8">In agile, developers will typically use the scrum framework </text:span><text:span text:style-name="T9">in day-to-day development </text:span><text:span text:style-name="T10">to recursively test </text:span><text:span text:style-name="T11">the codebase and ensure successful alignment with the </text:span><text:span text:style-name="T12">set timeline.</text:span></text:p>
      <text:p text:style-name="P6"/>
      <text:p text:style-name="P8">1.1(b). <text:span text:style-name="T13">Waterfall</text:span> </text:p>
      <text:p text:style-name="P9">Waterfall assumes that the requirements must not change during the development of a project. Instead, exact library and versioning requirements are <text:span text:style-name="T14">gathered, </text:span><text:span text:style-name="T6">researched</text:span>, and tested during the planning phase which <text:span text:style-name="T6">comes at the beginning of the project development lifecycle. </text:span></text:p>
      <text:p text:style-name="P10">Waterfall will delegate </text:p>
      <text:p text:style-name="P6"/>
      <text:p text:style-name="P4"/>
      <text:p text:style-name="P11"><text:span text:style-name="T15">1</text:span>.2. Personal Experience</text:p>
      <text:p text:style-name="P3"/>
      <text:p text:style-name="P3">2. <text:span text:style-name="T1">Business</text:span></text:p>
      <text:p text:style-name="P12">2.<text:span text:style-name="T16">1</text:span></text:p>
      <text:p text:style-name="P12"/>
      <text:p text:style-name="P13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5:04:08.495697672</dc:date>
    <meta:editing-duration>PT50M19S</meta:editing-duration>
    <meta:editing-cycles>24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0" meta:word-count="176" meta:character-count="1199" meta:non-whitespace-character-count="1039"/>
  </office:meta>
</office:document-meta>
</file>