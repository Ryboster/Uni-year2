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13"><text:soft-page-break/>1.2(e). <text:span text:style-name="T30">Documentation</text:span></text:p>
      <text:list text:style-name="L5">
        <text:list-item>
          <text:p text:style-name="P25">Justification of Choices Documentation</text:p>
        </text:list-item>
        <text:list-item>
          <text:p text:style-name="P25"/>
        </text:list-item>
      </text:list>
      <text:p text:style-name="P26"/>
      <text:p text:style-name="P13">1.2(f). <text:span text:style-name="T30">Design</text:span></text:p>
      <text:p text:style-name="P26"/>
      <text:p text:style-name="P27"/>
      <text:p text:style-name="P3">2. The Shadows of Vahlvadell</text:p>
      <text:p text:style-name="P28">2.1. Overview</text:p>
      <text:p text:style-name="P29"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9"/>
      <text:p text:style-name="P30">2.2. Involvement</text:p>
      <text:p text:style-name="P31"><text:span text:style-name="T36">2</text:span>.2(a). Inventory System</text:p>
      <text:p text:style-name="P31"><text:span text:style-name="T36">2</text:span>.2(b). Weather System</text:p>
      <text:p text:style-name="P31"><text:span text:style-name="T36">2</text:span>.2(c). Combat System</text:p>
      <text:p text:style-name="P32"/>
      <text:p text:style-name="P27"/>
      <text:p text:style-name="P27">3. MauiScreenTime</text:p>
      <text:p text:style-name="P33"/>
      <text:p text:style-name="P34"><text:span text:style-name="T37">3</text:span>.1. Overview</text:p>
      <text:p text:style-name="P35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5"/>
      <text:p text:style-name="P30">3.2. Involvement</text:p>
      <text:p text:style-name="P36"/>
      <text:p text:style-name="P37">3.2(a). </text:p>
      <text:p text:style-name="P27"/>
      <text:p text:style-name="P27"/>
      <text:p text:style-name="P27"/>
      <text:p text:style-name="P38"><text:soft-page-break/>4. Blazejowski.co.uk</text:p>
      <text:p text:style-name="P39">mobile-first design,</text:p>
      <text:p text:style-name="P39">security by design,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07:22.559914422</dc:date>
    <meta:editing-duration>PT18H23M58S</meta:editing-duration>
    <meta:editing-cycles>12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47" meta:word-count="463" meta:character-count="4099" meta:non-whitespace-character-count="3688"/>
  </office:meta>
</office:document-meta>
</file>