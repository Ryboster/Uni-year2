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6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3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3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70c2f8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75cb8b"/>
    </style:style>
    <style:style style:name="T22" style:family="text">
      <style:text-properties officeooo:rsid="00702fba"/>
    </style:style>
    <style:style style:name="T23" style:family="text">
      <style:text-properties officeooo:rsid="007d6def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808e5a"/>
    </style:style>
    <style:style style:name="T29" style:family="text">
      <style:text-properties officeooo:rsid="005ab55a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756e2" style:font-style-asian="italic" style:font-style-complex="italic"/>
    </style:style>
    <style:style style:name="T32" style:family="text">
      <style:text-properties officeooo:rsid="009834f9"/>
    </style:style>
    <style:style style:name="T33" style:family="text">
      <style:text-properties officeooo:rsid="009460b7"/>
    </style:style>
    <style:style style:name="T34" style:family="text">
      <style:text-properties officeooo:rsid="0098c8f8"/>
    </style:style>
    <style:style style:name="T35" style:family="text">
      <style:text-properties officeooo:rsid="009a3d00"/>
    </style:style>
    <style:style style:name="T36" style:family="text">
      <style:text-properties officeooo:rsid="00a24646"/>
    </style:style>
    <style:style style:name="T37" style:family="text">
      <style:text-properties officeooo:rsid="00a2eaac"/>
    </style:style>
    <style:style style:name="T38" style:family="text">
      <style:text-properties officeooo:rsid="009a7b88"/>
    </style:style>
    <style:style style:name="T39" style:family="text">
      <style:text-properties officeooo:rsid="009fff75"/>
    </style:style>
    <style:style style:name="T40" style:family="text">
      <style:text-properties officeooo:rsid="009acea7"/>
    </style:style>
    <style:style style:name="T41" style:family="text">
      <style:text-properties officeooo:rsid="009bb78c"/>
    </style:style>
    <style:style style:name="T42" style:family="text">
      <style:text-properties officeooo:rsid="004756e2"/>
    </style:style>
    <style:style style:name="T43" style:family="text">
      <style:text-properties officeooo:rsid="0028b6fb"/>
    </style:style>
    <style:style style:name="T44" style:family="text">
      <style:text-properties officeooo:rsid="00292dc4"/>
    </style:style>
    <style:style style:name="T45" style:family="text">
      <style:text-properties officeooo:rsid="0034b93b"/>
    </style:style>
    <style:style style:name="T46" style:family="text">
      <style:text-properties officeooo:rsid="002ec9e2"/>
    </style:style>
    <style:style style:name="T47" style:family="text">
      <style:text-properties officeooo:rsid="0034bc00"/>
    </style:style>
    <style:style style:name="T48" style:family="text">
      <style:text-properties officeooo:rsid="003f25fd"/>
    </style:style>
    <style:style style:name="T49" style:family="text">
      <style:text-properties officeooo:rsid="002d47dc"/>
    </style:style>
    <style:style style:name="T50" style:family="text">
      <style:text-properties officeooo:rsid="00371c2c"/>
    </style:style>
    <style:style style:name="T51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1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8">(</text:span><text:a xlink:type="simple" xlink:href="https://github.com/Brewing-Game/brewing-game/issues/54" text:style-name="Internet_20_link" text:visited-style-name="Visited_20_Internet_20_Link"><text:span text:style-name="T18">https://github.com/Brewing-Game/brewing-game/issues/54</text:span></text:a><text:span text:style-name="T18">) (</text:span><text:a xlink:type="simple" xlink:href="https://github.com/Brewing-Game/brewing-game/issues/49" text:style-name="Internet_20_link" text:visited-style-name="Visited_20_Internet_20_Link"><text:span text:style-name="T18">https://github.com/Brewing-Game/brewing-game/issues/49</text:span></text:a><text:span text:style-name="T18">)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1">(</text:span><text:a xlink:type="simple" xlink:href="https://github.com/Brewing-Game/brewing-game/pull/44" text:style-name="Internet_20_link" text:visited-style-name="Visited_20_Internet_20_Link"><text:span text:style-name="T21">https://github.com/Brewing-Game/brewing-game/pull/44</text:span></text:a><text:span text:style-name="T21">) (</text:span><text:a xlink:type="simple" xlink:href="https://github.com/Brewing-Game/brewing-game/issues/48" text:style-name="Internet_20_link" text:visited-style-name="Visited_20_Internet_20_Link"><text:span text:style-name="T21">https://github.com/Brewing-Game/brewing-game/issues/48</text:span></text:a><text:span text:style-name="T21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 </text:span><text:span text:style-name="T23">(</text:span><text:a xlink:type="simple" xlink:href="https://github.com/Brewing-Game/brewing-game/issues/72" text:style-name="Internet_20_link" text:visited-style-name="Visited_20_Internet_20_Link"><text:span text:style-name="T23">https://github.com/Brewing-Game/brewing-game/issues/72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  <text:p text:style-name="P17"/>
        </text:list-item>
      </text:list>
      <text:p text:style-name="P13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</text:span><text:a xlink:type="simple" xlink:href="https://github.com/Brewing-Game/brewing-game/pull/93" text:style-name="Internet_20_link" text:visited-style-name="Visited_20_Internet_20_Link"><text:span text:style-name="T27">https://github.com/Brewing-Game/brewing-game/pull/93</text:span></text:a><text:span text:style-name="T27">)</text:span></text:p>
          <text:p text:style-name="P19"/>
        </text:list-item>
      </text:list>
      <text:p text:style-name="P13">1.2(d). <text:span text:style-name="T25">U</text:span><text:span text:style-name="T28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29">(</text:span><text:a xlink:type="simple" xlink:href="https://github.com/Brewing-Game/brewing-game/pull/90" text:style-name="Internet_20_link" text:visited-style-name="Visited_20_Internet_20_Link"><text:span text:style-name="T29">https://github.com/Brewing-Game/brewing-game/pull/90</text:span></text:a><text:span text:style-name="T29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25"><text:soft-page-break/><text:span text:style-name="T30">1.2(e). </text:span><text:span text:style-name="T31">Documentation</text:span></text:p>
      <text:p text:style-name="P26">Development is not just about writing effective code. A big part of development is definition and effective application of <text:span text:style-name="T32">organisational</text:span> guidelines. <text:span text:style-name="T33">Our team understood it well </text:span><text:span text:style-name="T34">since</text:span><text:span text:style-name="T33"> the beginning of the project, and given my previous experience with this, I was tasked with creating the following documentation:</text:span></text:p>
      <text:list text:style-name="L5">
        <text:list-item>
          <text:p text:style-name="P27">Justification of Choices Documentation; <text:span text:style-name="T35">this document answers the “what?” and “why?” with respect to the various design choices. </text:span><text:span text:style-name="T36">(</text:span><text:a xlink:type="simple" xlink:href="https://github.com/Brewing-Game/brewing-game/blob/dev/Documentation/justification_of_choices.md" text:style-name="Internet_20_link" text:visited-style-name="Visited_20_Internet_20_Link"><text:span text:style-name="T36">https://github.com/Brewing-Game/brewing-game/blob/dev/Documentation/justification_of_choices.md</text:span></text:a><text:span text:style-name="T36">) </text:span><text:span text:style-name="T37">(</text:span><text:a xlink:type="simple" xlink:href="https://github.com/Brewing-Game/brewing-game/issues/3" text:style-name="Internet_20_link" text:visited-style-name="Visited_20_Internet_20_Link"><text:span text:style-name="T37">https://github.com/Brewing-Game/brewing-game/issues/3</text:span></text:a><text:span text:style-name="T37">)</text:span></text:p>
        </text:list-item>
        <text:list-item>
          <text:p text:style-name="P28">Coding <text:span text:style-name="T38">b</text:span>est <text:span text:style-name="T38">p</text:span>ractices – <text:span text:style-name="T39">This document describes the exact syntax to be used when writing code. It takes into consideration casing, units, abbreviations, style, comments, etc. (</text:span><text:a xlink:type="simple" xlink:href="https://github.com/Brewing-Game/brewing-game/blob/dev/Documentation/coding_practices.md" text:style-name="Internet_20_link" text:visited-style-name="Visited_20_Internet_20_Link"><text:span text:style-name="T39">https://github.com/Brewing-Game/brewing-game/blob/dev/Documentation/coding_practices.md</text:span></text:a><text:span text:style-name="T39">) (</text:span><text:a xlink:type="simple" xlink:href="https://github.com/Brewing-Game/brewing-game/issues/1" text:style-name="Internet_20_link" text:visited-style-name="Visited_20_Internet_20_Link"><text:span text:style-name="T39">https://github.com/Brewing-Game/brewing-game/issues/1</text:span></text:a><text:span text:style-name="T39">)</text:span></text:p>
        </text:list-item>
        <text:list-item>
          <text:p text:style-name="P28">Directory <text:span text:style-name="T38">s</text:span>tructure <text:span text:style-name="T38">c</text:span>onvention – <text:span text:style-name="T40">This document outlines </text:span><text:span text:style-name="T41">file storage constraints; what goes where. </text:span></text:p>
        </text:list-item>
        <text:list-item>
          <text:p text:style-name="P29">Pull request (PR) documentation. This document outlines the rules </text:p>
        </text:list-item>
        <text:list-item>
          <text:p text:style-name="P29"/>
        </text:list-item>
      </text:list>
      <text:p text:style-name="P13">1.2(f). <text:span text:style-name="T42">Design</text:span></text:p>
      <text:p text:style-name="P30"/>
      <text:p text:style-name="P31"/>
      <text:p text:style-name="P3">2. The Shadows of Vahlvadell</text:p>
      <text:p text:style-name="P32">2.1. Overview</text:p>
      <text:p text:style-name="P33">The Shadows of Vahlvadell is a Role-Playing <text:span text:style-name="T43">G</text:span>ame (RPG) <text:span text:style-name="T43">tit</text:span><text:span text:style-name="T44">le </text:span><text:span text:style-name="T45">lead by</text:span><text:span text:style-name="T44"> Aaron Stevens. </text:span><text:span text:style-name="T46">It is developed in Unreal Engine for </text:span><text:span text:style-name="T45">Windows and Linux. The project follows the Agile methodology. </text:span><text:span text:style-name="T47">During development, I fulfilled the role of a software developer.</text:span></text:p>
      <text:p text:style-name="P33"/>
      <text:p text:style-name="P34">2.2. Involvement</text:p>
      <text:p text:style-name="P35"><text:span text:style-name="T48">2</text:span>.2(a). Inventory System</text:p>
      <text:p text:style-name="P35"><text:span text:style-name="T48">2</text:span>.2(b). Weather System</text:p>
      <text:p text:style-name="P35"><text:span text:style-name="T48">2</text:span>.2(c). Combat System</text:p>
      <text:p text:style-name="P36"/>
      <text:p text:style-name="P31"/>
      <text:p text:style-name="P31">3. MauiScreenTime</text:p>
      <text:p text:style-name="P37"/>
      <text:p text:style-name="P38"><text:span text:style-name="T49">3</text:span>.1. Overview</text:p>
      <text:p text:style-name="P39"><text:soft-page-break/>“MauiScreenTime” is a mobile application for <text:span text:style-name="T50">A</text:span>ndroid and IOS. <text:span text:style-name="T51">It follows the Agile methodology. </text:span><text:span text:style-name="T50">Although my involvement with it was brief, during its development I fulfilled the role of a software developer.</text:span></text:p>
      <text:p text:style-name="P39"/>
      <text:p text:style-name="P34">3.2. Involvement</text:p>
      <text:p text:style-name="P40"/>
      <text:p text:style-name="P41">3.2(a). </text:p>
      <text:p text:style-name="P31"/>
      <text:p text:style-name="P31"/>
      <text:p text:style-name="P31"/>
      <text:p text:style-name="P42">4. Blazejowski.co.uk</text:p>
      <text:p text:style-name="P43">mobile-first design,</text:p>
      <text:p text:style-name="P43">security by design,</text:p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3:16:44.702126764</dc:date>
    <meta:editing-duration>PT18H33M10S</meta:editing-duration>
    <meta:editing-cycles>141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51" meta:word-count="577" meta:character-count="5144" meta:non-whitespace-character-count="4622"/>
  </office:meta>
</office:document-meta>
</file>