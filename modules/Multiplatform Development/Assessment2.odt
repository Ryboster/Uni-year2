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5460f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3be3f" officeooo:paragraph-rsid="00c3be3f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style:text-position="super 58%"/>
    </style:style>
    <style:style style:name="T66" style:family="text">
      <style:text-properties officeooo:rsid="00c5460f"/>
    </style:style>
    <style:style style:name="T67" style:family="text">
      <style:text-properties style:text-position="super 58%" officeooo:rsid="00c5460f"/>
    </style:style>
    <style:style style:name="T68" style:family="text">
      <style:text-properties officeooo:rsid="00c3be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Mash It! (2026a) Kanban. Available at: (Accessed: 20<text:span text:style-name="T65">th</text:span> May 2026)</text:p>
      <text:p text:style-name="P50"/>
      <text:p text:style-name="P51"><text:span text:style-name="T66">Mash It!(2026b) Pull Requests. Available at: (Accessed: 20</text:span><text:span text:style-name="T67">th</text:span><text:span text:style-name="T66"> May 2026)</text:span></text:p>
      <text:p text:style-name="P51"/>
      <text:p text:style-name="P51"><text:s/></text:p>
      <text:p text:style-name="P49"/>
      <text:p text:style-name="P52">Mash It! Kanban (<text:span text:style-name="T68">2026</text:span>)</text:p>
      <text:p text:style-name="P53">Vahlvadell Kanban (2026)</text:p>
      <text:p text:style-name="P53">Vahlvadell Github (2026)</text:p>
      <text:p text:style-name="P53">Mash It! Github (2026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9:31.639402020</dc:date>
    <meta:editing-duration>PT21H55M42S</meta:editing-duration>
    <meta:editing-cycles>171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5" meta:word-count="711" meta:character-count="6786" meta:non-whitespace-character-count="6141"/>
  </office:meta>
</office:document-meta>
</file>