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2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2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officeooo:rsid="004756e2"/>
    </style:style>
    <style:style style:name="T31" style:family="text">
      <style:text-properties officeooo:rsid="0028b6fb"/>
    </style:style>
    <style:style style:name="T32" style:family="text">
      <style:text-properties officeooo:rsid="00292dc4"/>
    </style:style>
    <style:style style:name="T33" style:family="text">
      <style:text-properties officeooo:rsid="0034b93b"/>
    </style:style>
    <style:style style:name="T34" style:family="text">
      <style:text-properties officeooo:rsid="002ec9e2"/>
    </style:style>
    <style:style style:name="T35" style:family="text">
      <style:text-properties officeooo:rsid="0034bc00"/>
    </style:style>
    <style:style style:name="T36" style:family="text">
      <style:text-properties officeooo:rsid="003f25fd"/>
    </style:style>
    <style:style style:name="T37" style:family="text">
      <style:text-properties officeooo:rsid="002d47dc"/>
    </style:style>
    <style:style style:name="T38" style:family="text">
      <style:text-properties officeooo:rsid="00371c2c"/>
    </style:style>
    <style:style style:name="T3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13"><text:soft-page-break/>1.2(e). <text:span text:style-name="T30">Documentation</text:span></text:p>
      <text:p text:style-name="P13"/>
      <text:p text:style-name="P25"/>
      <text:p text:style-name="P13">1.2(f). <text:span text:style-name="T30">Design</text:span></text:p>
      <text:p text:style-name="P25"/>
      <text:p text:style-name="P26"/>
      <text:p text:style-name="P3">2. The Shadows of Vahlvadell</text:p>
      <text:p text:style-name="P27">2.1. Overview</text:p>
      <text:p text:style-name="P28">The Shadows of Vahlvadell is a Role-Playing <text:span text:style-name="T31">G</text:span>ame (RPG) <text:span text:style-name="T31">tit</text:span><text:span text:style-name="T32">le </text:span><text:span text:style-name="T33">lead by</text:span><text:span text:style-name="T32"> Aaron Stevens. </text:span><text:span text:style-name="T34">It is developed in Unreal Engine for </text:span><text:span text:style-name="T33">Windows and Linux. The project follows the Agile methodology. </text:span><text:span text:style-name="T35">During development, I fulfilled the role of a software developer.</text:span></text:p>
      <text:p text:style-name="P28"/>
      <text:p text:style-name="P29">2.2. Involvement</text:p>
      <text:p text:style-name="P30"><text:span text:style-name="T36">2</text:span>.2(a). Inventory System</text:p>
      <text:p text:style-name="P30"><text:span text:style-name="T36">2</text:span>.2(b). Weather System</text:p>
      <text:p text:style-name="P30"><text:span text:style-name="T36">2</text:span>.2(c). Combat System</text:p>
      <text:p text:style-name="P31"/>
      <text:p text:style-name="P26"/>
      <text:p text:style-name="P26">3. MauiScreenTime</text:p>
      <text:p text:style-name="P32"/>
      <text:p text:style-name="P33"><text:span text:style-name="T37">3</text:span>.1. Overview</text:p>
      <text:p text:style-name="P34">“MauiScreenTime” is a mobile application for <text:span text:style-name="T38">A</text:span>ndroid and IOS. <text:span text:style-name="T39">It follows the Agile methodology. </text:span><text:span text:style-name="T38">Although my involvement with it was brief, during its development I fulfilled the role of a software developer.</text:span></text:p>
      <text:p text:style-name="P34"/>
      <text:p text:style-name="P29">3.2. Involvement</text:p>
      <text:p text:style-name="P35"/>
      <text:p text:style-name="P36">3.2(a). </text:p>
      <text:p text:style-name="P26"/>
      <text:p text:style-name="P26"/>
      <text:p text:style-name="P26"/>
      <text:p text:style-name="P37">4. Blazejowski.co.uk</text:p>
      <text:p text:style-name="P38"><text:soft-page-break/>mobile-first design,</text:p>
      <text:p text:style-name="P38">security by design,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06:17.483905739</dc:date>
    <meta:editing-duration>PT18H22M54S</meta:editing-duration>
    <meta:editing-cycles>121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45" meta:word-count="457" meta:character-count="4059" meta:non-whitespace-character-count="3651"/>
  </office:meta>
</office:document-meta>
</file>