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460f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1dcee" officeooo:paragraph-rsid="00c1dcee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3be3f" officeooo:paragraph-rsid="00c3be3f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c1e35c"/>
    </style:style>
    <style:style style:name="T61" style:family="text">
      <style:text-properties officeooo:rsid="003f25fd"/>
    </style:style>
    <style:style style:name="T62" style:family="text">
      <style:text-properties officeooo:rsid="002d47dc"/>
    </style:style>
    <style:style style:name="T63" style:family="text">
      <style:text-properties officeooo:rsid="00371c2c"/>
    </style:style>
    <style:style style:name="T64" style:family="text">
      <style:text-properties officeooo:rsid="003a16a5"/>
    </style:style>
    <style:style style:name="T65" style:family="text">
      <style:text-properties officeooo:rsid="00c55401"/>
    </style:style>
    <style:style style:name="T66" style:family="text">
      <style:text-properties officeooo:rsid="00c945a8"/>
    </style:style>
    <style:style style:name="T67" style:family="text">
      <style:text-properties officeooo:rsid="00c5460f"/>
    </style:style>
    <style:style style:name="T68" style:family="text">
      <style:text-properties fo:font-style="italic" officeooo:rsid="00c5460f" style:font-style-asian="italic" style:font-style-complex="italic"/>
    </style:style>
    <style:style style:name="T69" style:family="text">
      <style:text-properties officeooo:rsid="00cbbf6a"/>
    </style:style>
    <style:style style:name="T70" style:family="text">
      <style:text-properties officeooo:rsid="00c3be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<text:span text:style-name="T60">()</text:span> and development of the combat system ()</text:p>
        </text:list-item>
      </text:list>
      <text:p text:style-name="P39"><text:span text:style-name="T61">2</text:span>.2(a). Inventory System</text:p>
      <text:p text:style-name="P35"><text:s/></text:p>
      <text:p text:style-name="P35"/>
      <text:p text:style-name="P39"><text:span text:style-name="T61">2</text:span>.2(b). Weather System</text:p>
      <text:p text:style-name="P39"><text:span text:style-name="T61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2">3</text:span>.1. Overview</text:p>
      <text:p text:style-name="P43">“MauiScreenTime” is a mobile application for <text:span text:style-name="T63">A</text:span>ndroid and IOS. <text:span text:style-name="T64">It follows the Agile methodology. </text:span><text:span text:style-name="T63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9"/>
      <text:p text:style-name="P50">Mash It! <text:span text:style-name="T65">(</text:span><text:span text:style-name="T66">Brewing Game</text:span><text:span text:style-name="T65">)</text:span> (2026a) <text:span text:style-name="T30">Kanban</text:span>. Available at: (Accessed: 20 May 2026).</text:p>
      <text:p text:style-name="P50"/>
      <text:p text:style-name="P51"><text:span text:style-name="T67">Mash It! </text:span><text:span text:style-name="T65">(</text:span><text:span text:style-name="T66">Brewing Game</text:span><text:span text:style-name="T65">)</text:span><text:span text:style-name="T67"> (2026b) </text:span><text:span text:style-name="T68">Pull Requests</text:span><text:span text:style-name="T67">. Available at: (Accessed: 20 May 2026).</text:span></text:p>
      <text:p text:style-name="P52"/>
      <text:p text:style-name="P53">Mash It! (2026c) <text:span text:style-name="T30">Mural Board</text:span>. Available at: (Accessed: 20 May 2026).</text:p>
      <text:p text:style-name="P52"/>
      <text:p text:style-name="P54">Shadows of Vahlvadell (Aaron Stevens) <text:span text:style-name="T69">(2026a) Kanban. Available at: (Accessed: 20 May 2026).</text:span></text:p>
      <text:p text:style-name="P54"/>
      <text:p text:style-name="P55">Shadows of Vahlvadell (Aaron Stevens) (2026b) Pull Requests. Available at: (Accessed: 20 May 2026).</text:p>
      <text:p text:style-name="P55"/>
      <text:p text:style-name="P56">Shadows of Vahlvadell (2026c) Project Board. Available at: (Accessed: 20 May 2026).</text:p>
      <text:p text:style-name="P55"/>
      <text:p text:style-name="P57"/>
      <text:p text:style-name="P57"><text:s/></text:p>
      <text:p text:style-name="P49"/>
      <text:p text:style-name="P58">Mash It! Kanban (<text:span text:style-name="T70">2026</text:span>)</text:p>
      <text:p text:style-name="P59">Vahlvadell Kanban (2026)</text:p>
      <text:p text:style-name="P59">Vahlvadell Github (2026)</text:p>
      <text:p text:style-name="P59">Mash It! Github (2026)</text:p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2:42.843974434</dc:date>
    <meta:editing-duration>PT21H58M47S</meta:editing-duration>
    <meta:editing-cycles>183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9" meta:word-count="766" meta:character-count="7157" meta:non-whitespace-character-count="6461"/>
  </office:meta>
</office:document-meta>
</file>