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3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4535e4"/>
    </style:style>
    <style:style style:name="T5" style:family="text">
      <style:text-properties officeooo:rsid="00464452"/>
    </style:style>
    <style:style style:name="T6" style:family="text">
      <style:text-properties officeooo:rsid="0043dd38"/>
    </style:style>
    <style:style style:name="T7" style:family="text">
      <style:text-properties officeooo:rsid="0028b6fb"/>
    </style:style>
    <style:style style:name="T8" style:family="text">
      <style:text-properties officeooo:rsid="00292dc4"/>
    </style:style>
    <style:style style:name="T9" style:family="text">
      <style:text-properties officeooo:rsid="0034b93b"/>
    </style:style>
    <style:style style:name="T10" style:family="text">
      <style:text-properties officeooo:rsid="002ec9e2"/>
    </style:style>
    <style:style style:name="T11" style:family="text">
      <style:text-properties officeooo:rsid="0034bc00"/>
    </style:style>
    <style:style style:name="T12" style:family="text">
      <style:text-properties officeooo:rsid="003f25fd"/>
    </style:style>
    <style:style style:name="T13" style:family="text">
      <style:text-properties officeooo:rsid="002d47dc"/>
    </style:style>
    <style:style style:name="T14" style:family="text">
      <style:text-properties officeooo:rsid="00371c2c"/>
    </style:style>
    <style:style style:name="T15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/>
      <text:p text:style-name="P6">1.2(a). <text:span text:style-name="T4">Game Level</text:span></text:p>
      <text:p text:style-name="P6"/>
      <text:p text:style-name="P6">1.2(b). <text:span text:style-name="T5">Accessibility</text:span></text:p>
      <text:p text:style-name="P7">main menu, settings menu, navigation,</text:p>
      <text:p text:style-name="P7"/>
      <text:p text:style-name="P6">1.2(c). <text:span text:style-name="T6">Debugging</text:span></text:p>
      <text:p text:style-name="P6">1.2(d). <text:span text:style-name="T6">UI</text:span></text:p>
      <text:p text:style-name="P8">shop, main menu, settings menu, heads-up display (HUD) design, </text:p>
      <text:p text:style-name="P6">1.2(e)</text:p>
      <text:p text:style-name="P6">1.2(f)</text:p>
      <text:p text:style-name="P6">1.2(g)</text:p>
      <text:p text:style-name="P6">1.2(h)</text:p>
      <text:p text:style-name="P6">1.2(j)</text:p>
      <text:p text:style-name="P5"/>
      <text:p text:style-name="P3"/>
      <text:p text:style-name="P3">2. The Shadows of Vahlvadell</text:p>
      <text:p text:style-name="P9">2.1. Overview</text:p>
      <text:p text:style-name="P10">The Shadows of Vahlvadell is a Role-Playing <text:span text:style-name="T7">G</text:span>ame (RPG) <text:span text:style-name="T7">tit</text:span><text:span text:style-name="T8">le </text:span><text:span text:style-name="T9">lead by</text:span><text:span text:style-name="T8"> Aaron Stevens. </text:span><text:span text:style-name="T10">It is developed in Unreal Engine for </text:span><text:span text:style-name="T9">Windows and Linux. The project follows the Agile methodology. </text:span><text:span text:style-name="T11">During development, I fulfilled the role of a software developer.</text:span></text:p>
      <text:p text:style-name="P10"/>
      <text:p text:style-name="P5"><text:soft-page-break/>2.2. Involvement</text:p>
      <text:p text:style-name="P11"><text:span text:style-name="T12">2</text:span>.2(a). Inventory System</text:p>
      <text:p text:style-name="P11"><text:span text:style-name="T12">2</text:span>.2(b). Weather System</text:p>
      <text:p text:style-name="P11"><text:span text:style-name="T12">2</text:span>.2(c). Combat System</text:p>
      <text:p text:style-name="P12"/>
      <text:p text:style-name="P3"/>
      <text:p text:style-name="P3">3. MauiScreenTime</text:p>
      <text:p text:style-name="P13"/>
      <text:p text:style-name="P14"><text:span text:style-name="T13">3</text:span>.1. Overview</text:p>
      <text:p text:style-name="P15">“MauiScreenTime” is a mobile application for <text:span text:style-name="T14">A</text:span>ndroid and IOS. <text:span text:style-name="T15">It follows the Agile methodology. </text:span><text:span text:style-name="T14">Although my involvement with it was brief, during its development I fulfilled the role of a software developer.</text:span></text:p>
      <text:p text:style-name="P15"/>
      <text:p text:style-name="P5">3.2. Involvement</text:p>
      <text:p text:style-name="P16"/>
      <text:p text:style-name="P3"/>
      <text:p text:style-name="P3"/>
      <text:p text:style-name="P3"/>
      <text:p text:style-name="P17">4. Blazejowski.co.uk</text:p>
      <text:p text:style-name="P18">mobile-first design,</text:p>
      <text:p text:style-name="P18">security by design,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20:00:51.392075460</dc:date>
    <meta:editing-duration>PT5H11M57S</meta:editing-duration>
    <meta:editing-cycles>63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0" meta:word-count="174" meta:character-count="1139" meta:non-whitespace-character-count="994"/>
  </office:meta>
</office:document-meta>
</file>