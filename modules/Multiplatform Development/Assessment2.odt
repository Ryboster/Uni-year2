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2b38bd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2c5674" style:font-style-asian="italic" style:font-style-complex="italic"/>
    </style:style>
    <style:style style:name="T80" style:family="text">
      <style:text-properties officeooo:rsid="00bbe00c"/>
    </style:style>
    <style:style style:name="T81" style:family="text">
      <style:text-properties fo:font-style="italic" officeooo:rsid="01314900" style:font-style-asian="italic" style:font-style-complex="italic"/>
    </style:style>
    <style:style style:name="T82" style:family="text">
      <style:text-properties fo:font-style="italic" officeooo:rsid="01321924" style:font-style-asian="italic" style:font-style-complex="italic"/>
    </style:style>
    <style:style style:name="T83" style:family="text">
      <style:text-properties fo:font-style="italic" officeooo:rsid="0133a86a" style:font-style-asian="italic" style:font-style-complex="italic"/>
    </style:style>
    <style:style style:name="T84" style:family="text">
      <style:text-properties fo:font-style="italic" officeooo:rsid="01353272" style:font-style-asian="italic" style:font-style-complex="italic"/>
    </style:style>
    <style:style style:name="T85" style:family="text">
      <style:text-properties officeooo:rsid="00c1e35c"/>
    </style:style>
    <style:style style:name="T86" style:family="text">
      <style:text-properties officeooo:rsid="003f25fd"/>
    </style:style>
    <style:style style:name="T87" style:family="text">
      <style:text-properties officeooo:rsid="002d47dc"/>
    </style:style>
    <style:style style:name="T88" style:family="text">
      <style:text-properties officeooo:rsid="00371c2c"/>
    </style:style>
    <style:style style:name="T89" style:family="text">
      <style:text-properties officeooo:rsid="003a16a5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c55401" style:font-weight-asian="bold" style:font-weight-complex="bold"/>
    </style:style>
    <style:style style:name="T92" style:family="text">
      <style:text-properties fo:font-weight="bold" officeooo:rsid="00c945a8" style:font-weight-asian="bold" style:font-weight-complex="bold"/>
    </style:style>
    <style:style style:name="T93" style:family="text">
      <style:text-properties fo:font-weight="bold" officeooo:rsid="00c5460f" style:font-weight-asian="bold" style:font-weight-complex="bold"/>
    </style:style>
    <style:style style:name="T94" style:family="text">
      <style:text-properties officeooo:rsid="00c5460f"/>
    </style:style>
    <style:style style:name="T95" style:family="text">
      <style:text-properties fo:font-style="italic" officeooo:rsid="00c5460f" style:font-style-asian="italic" style:font-style-complex="italic"/>
    </style:style>
    <style:style style:name="T96" style:family="text">
      <style:text-properties fo:font-weight="bold" officeooo:rsid="00d39f75" style:font-weight-asian="bold" style:font-weight-complex="bold"/>
    </style:style>
    <style:style style:name="T97" style:family="text">
      <style:text-properties fo:font-style="italic" officeooo:rsid="00dcbc28" style:font-style-asian="italic" style:font-style-complex="italic"/>
    </style:style>
    <style:style style:name="T98" style:family="text">
      <style:text-properties fo:font-weight="bold" officeooo:rsid="0128bc99" style:font-weight-asian="bold" style:font-weight-complex="bold"/>
    </style:style>
    <style:style style:name="T99" style:family="text">
      <style:text-properties officeooo:rsid="00cbbf6a"/>
    </style:style>
    <style:style style:name="T100" style:family="text">
      <style:text-properties fo:font-style="italic" officeooo:rsid="00cbbf6a" style:font-style-asian="italic" style:font-style-complex="italic"/>
    </style:style>
    <style:style style:name="T101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">2. The Shadows of Vahlvadell</text:p>
      <text:p text:style-name="P37"><text:soft-page-break/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</text:span><text:span text:style-name="T79">b</text:span><text:span text:style-name="T78">), #61).</text:span></text:p>
        </text:list-item>
        <text:list-item>
          <text:p text:style-name="P42">Designed <text:span text:style-name="T80">and</text:span> developed a dynamic weather system <text:span text:style-name="T78">(The Shadows of Vahlvadell, 2026(a), #</text:span><text:span text:style-name="T81">3</text:span><text:span text:style-name="T78">) (The Shadows of Vahlvadell, 2026(</text:span><text:span text:style-name="T79">b</text:span><text:span text:style-name="T78">), #</text:span><text:span text:style-name="T82">31</text:span><text:span text:style-name="T78">) </text:span><text:span text:style-name="T83">(The Shadows of Vahlvadell, 2026(c)). </text:span><text:s/><text:span text:style-name="T80">Then, collaborated with Aaron on implementing it</text:span> <text:span text:style-name="T78">(The Shadows of Vahlvadell, 2026(a), #</text:span><text:span text:style-name="T84">40</text:span><text:span text:style-name="T78">).</text:span></text:p>
        </text:list-item>
        <text:list-item>
          <text:p text:style-name="P43">Collaborated on the design <text:span text:style-name="T85">()</text:span> and development of the combat system ()</text:p>
        </text:list-item>
      </text:list>
      <text:p text:style-name="P44"><text:span text:style-name="T86">2</text:span>.2(a). Inventory System</text:p>
      <text:p text:style-name="P40"><text:s/></text:p>
      <text:p text:style-name="P40"/>
      <text:p text:style-name="P44"><text:span text:style-name="T86">2</text:span>.2(b). Weather System</text:p>
      <text:p text:style-name="P44"><text:span text:style-name="T86">2</text:span>.2(c). Combat System</text:p>
      <text:p text:style-name="P45"/>
      <text:p text:style-name="P36"/>
      <text:p text:style-name="P36">3. MauiScreenTime</text:p>
      <text:p text:style-name="P46"/>
      <text:p text:style-name="P47"><text:span text:style-name="T87">3</text:span>.1. Overview</text:p>
      <text:p text:style-name="P48">“MauiScreenTime” is a mobile application for <text:span text:style-name="T88">A</text:span>ndroid and IOS. <text:span text:style-name="T89">It follows the Agile methodology. </text:span><text:span text:style-name="T88">Although my involvement with it was brief, during its development I fulfilled the role of a software developer.</text:span></text:p>
      <text:p text:style-name="P48"/>
      <text:p text:style-name="P39">3.2. Involvement</text:p>
      <text:p text:style-name="P49"/>
      <text:p text:style-name="P50">3.2(a). </text:p>
      <text:p text:style-name="P36"/>
      <text:p text:style-name="P36"/>
      <text:p text:style-name="P36"><text:soft-page-break/></text:p>
      <text:p text:style-name="P51">4. Blazejowski.co.uk</text:p>
      <text:p text:style-name="P52">mobile-first design,</text:p>
      <text:p text:style-name="P52">security by design,</text:p>
      <text:p text:style-name="P52"/>
      <text:p text:style-name="P52"/>
      <text:p text:style-name="P53">References:</text:p>
      <text:p text:style-name="P54"/>
      <text:p text:style-name="P55"><text:span text:style-name="T90">Mash It!</text:span><text:span text:style-name="T90"> </text:span><text:span text:style-name="T91">(</text:span><text:span text:style-name="T92">Brewing Game</text:span><text:span text:style-name="T91">)</text:span><text:span text:style-name="T90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6"><text:span text:style-name="T93">Mash It! </text:span><text:span text:style-name="T91">(</text:span><text:span text:style-name="T92">Brewing Game</text:span><text:span text:style-name="T91">)</text:span><text:span text:style-name="T94"> (2026b) </text:span><text:span text:style-name="T95">Pull Requests</text:span><text:span text:style-name="T94">. Available at: </text:span><text:a xlink:type="simple" xlink:href="https://github.com/Brewing-Game/brewing-game/pulls" text:style-name="Internet_20_link" text:visited-style-name="Visited_20_Internet_20_Link"><text:span text:style-name="T94">https://github.com/Brewing-Game/brewing-game/pulls</text:span></text:a><text:span text:style-name="T94"> (Accessed: 20 May 2026).</text:span></text:p>
      <text:p text:style-name="P57"><text:span text:style-name="T90">Mash It! </text:span><text:span text:style-name="T96">(Brewing Game)</text:span> (2026c) <text:span text:style-name="T97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8"/>
      <text:p text:style-name="P59"><text:span text:style-name="T98">The </text:span><text:span text:style-name="T90">Shadows of Vahlvadell (Aaron Stevens)</text:span> <text:span text:style-name="T99">(2026a) </text:span><text:span text:style-name="T100">Kanban</text:span><text:span text:style-name="T99">. Available at: </text:span><text:a xlink:type="simple" xlink:href="https://github.com/users/Strivion/projects/2/views/1" text:style-name="Internet_20_link" text:visited-style-name="Visited_20_Internet_20_Link"><text:span text:style-name="T99">https://github.com/users/Strivion/projects/2/views/1</text:span></text:a><text:span text:style-name="T99"> <text:s/>(Accessed: 20 May 2026).</text:span></text:p>
      <text:p text:style-name="P60"><text:span text:style-name="T98">The </text:span><text:span text:style-name="T90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1"><text:span text:style-name="T98">The </text:span><text:span text:style-name="T90">Shadows of Vahlvadell </text:span><text:span text:style-name="T101">(Aaron Stevens)</text:span><text:span text:style-name="T90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2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59:49.676587388</dc:date>
    <meta:editing-duration>PT22H15M8S</meta:editing-duration>
    <meta:editing-cycles>269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3" meta:word-count="879" meta:character-count="6114" meta:non-whitespace-character-count="5293"/>
  </office:meta>
</office:document-meta>
</file>