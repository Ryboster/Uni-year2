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3" style:family="paragraph" style:parent-style-name="Text_20_body" style:list-style-name="L2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0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6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54bcb3"/>
    </style:style>
    <style:style style:name="T7" style:family="text">
      <style:text-properties officeooo:rsid="005235ac"/>
    </style:style>
    <style:style style:name="T8" style:family="text">
      <style:text-properties officeooo:rsid="004535e4"/>
    </style:style>
    <style:style style:name="T9" style:family="text">
      <style:text-properties officeooo:rsid="00569dad"/>
    </style:style>
    <style:style style:name="T10" style:family="text">
      <style:text-properties officeooo:rsid="0062cd3f"/>
    </style:style>
    <style:style style:name="T11" style:family="text">
      <style:text-properties officeooo:rsid="00535450"/>
    </style:style>
    <style:style style:name="T12" style:family="text">
      <style:text-properties officeooo:rsid="0057a59c"/>
    </style:style>
    <style:style style:name="T13" style:family="text">
      <style:text-properties officeooo:rsid="00590a9e"/>
    </style:style>
    <style:style style:name="T14" style:family="text">
      <style:text-properties officeooo:rsid="005c0343"/>
    </style:style>
    <style:style style:name="T15" style:family="text">
      <style:text-properties officeooo:rsid="005d751c"/>
    </style:style>
    <style:style style:name="T16" style:family="text">
      <style:text-properties officeooo:rsid="005ab55a"/>
    </style:style>
    <style:style style:name="T17" style:family="text">
      <style:text-properties officeooo:rsid="00464452"/>
    </style:style>
    <style:style style:name="T18" style:family="text">
      <style:text-properties officeooo:rsid="0043dd38"/>
    </style:style>
    <style:style style:name="T19" style:family="text">
      <style:text-properties officeooo:rsid="004756e2"/>
    </style:style>
    <style:style style:name="T20" style:family="text">
      <style:text-properties officeooo:rsid="0028b6fb"/>
    </style:style>
    <style:style style:name="T21" style:family="text">
      <style:text-properties officeooo:rsid="00292dc4"/>
    </style:style>
    <style:style style:name="T22" style:family="text">
      <style:text-properties officeooo:rsid="0034b93b"/>
    </style:style>
    <style:style style:name="T23" style:family="text">
      <style:text-properties officeooo:rsid="002ec9e2"/>
    </style:style>
    <style:style style:name="T24" style:family="text">
      <style:text-properties officeooo:rsid="0034bc00"/>
    </style:style>
    <style:style style:name="T25" style:family="text">
      <style:text-properties officeooo:rsid="003f25fd"/>
    </style:style>
    <style:style style:name="T26" style:family="text">
      <style:text-properties officeooo:rsid="002d47dc"/>
    </style:style>
    <style:style style:name="T27" style:family="text">
      <style:text-properties officeooo:rsid="00371c2c"/>
    </style:style>
    <style:style style:name="T28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 spanned.</text:span> I contributed to the design, planning, <text:span text:style-name="T6">accessibility,</text:span> development, refinement, <text:span text:style-name="T7">and branding</text:span> of the final product. </text:p>
      <text:p text:style-name="P6"/>
      <text:p text:style-name="P7">1.2(a). <text:span text:style-name="T8">Game Level</text:span><text:span text:style-name="T6">s</text:span></text:p>
      <text:p text:style-name="P8">I <text:span text:style-name="T9">was involved </text:span><text:span text:style-name="T10">with</text:span> the design and <text:span text:style-name="T11">development</text:span> of the game’s level<text:span text:style-name="T6">s</text:span>. <text:span text:style-name="T6">This includes the </text:span><text:span text:style-name="T12">main </text:span><text:span text:style-name="T6">game level as well as the main menu </text:span><text:span text:style-name="T13">(</text:span><text:span text:style-name="T14">complete with</text:span><text:span text:style-name="T13"> various other menus </text:span><text:span text:style-name="T15">such as settings or shop</text:span><text:span text:style-name="T13">)</text:span><text:span text:style-name="T6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6">(</text:span><text:a xlink:type="simple" xlink:href="https://github.com/Brewing-Game/brewing-game/pull/90" text:style-name="Internet_20_link" text:visited-style-name="Visited_20_Internet_20_Link"><text:span text:style-name="T16">https://github.com/Brewing-Game/brewing-game/pull/90</text:span></text:a><text:span text:style-name="T16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0"/>
        </text:list-item>
      </text:list>
      <text:p text:style-name="P11"/>
      <text:p text:style-name="P7">1.2(b). <text:span text:style-name="T17">Accessibility</text:span></text:p>
      <text:p text:style-name="P12">Tutorial, TTS, hover highlight script</text:p>
      <text:list text:style-name="L2">
        <text:list-item>
          <text:p text:style-name="P13">Implementation of text-to-speech</text:p>
        </text:list-item>
        <text:list-item>
          <text:p text:style-name="P13"/>
        </text:list-item>
      </text:list>
      <text:p text:style-name="P14">main menu, settings menu, navigation,</text:p>
      <text:p text:style-name="P14"/>
      <text:p text:style-name="P7"><text:soft-page-break/>1.2(c). <text:span text:style-name="T18">Debugging</text:span></text:p>
      <text:p text:style-name="P7">1.2(d). <text:span text:style-name="T18">UI</text:span></text:p>
      <text:p text:style-name="P15">shop, main menu, settings menu, heads-up display (HUD) design, </text:p>
      <text:p text:style-name="P7">1.2(e). <text:span text:style-name="T19">Documentation</text:span></text:p>
      <text:p text:style-name="P7">1.2(f). <text:span text:style-name="T19">Design</text:span></text:p>
      <text:p text:style-name="P7"/>
      <text:p text:style-name="P3"/>
      <text:p text:style-name="P3">2. The Shadows of Vahlvadell</text:p>
      <text:p text:style-name="P16">2.1. Overview</text:p>
      <text:p text:style-name="P17">The Shadows of Vahlvadell is a Role-Playing <text:span text:style-name="T20">G</text:span>ame (RPG) <text:span text:style-name="T20">tit</text:span><text:span text:style-name="T21">le </text:span><text:span text:style-name="T22">lead by</text:span><text:span text:style-name="T21"> Aaron Stevens. </text:span><text:span text:style-name="T23">It is developed in Unreal Engine for </text:span><text:span text:style-name="T22">Windows and Linux. The project follows the Agile methodology. </text:span><text:span text:style-name="T24">During development, I fulfilled the role of a software developer.</text:span></text:p>
      <text:p text:style-name="P17"/>
      <text:p text:style-name="P5">2.2. Involvement</text:p>
      <text:p text:style-name="P18"><text:span text:style-name="T25">2</text:span>.2(a). Inventory System</text:p>
      <text:p text:style-name="P18"><text:span text:style-name="T25">2</text:span>.2(b). Weather System</text:p>
      <text:p text:style-name="P18"><text:span text:style-name="T25">2</text:span>.2(c). Combat System</text:p>
      <text:p text:style-name="P19"/>
      <text:p text:style-name="P3"/>
      <text:p text:style-name="P3">3. MauiScreenTime</text:p>
      <text:p text:style-name="P20"/>
      <text:p text:style-name="P21"><text:span text:style-name="T26">3</text:span>.1. Overview</text:p>
      <text:p text:style-name="P22">“MauiScreenTime” is a mobile application for <text:span text:style-name="T27">A</text:span>ndroid and IOS. <text:span text:style-name="T28">It follows the Agile methodology. </text:span><text:span text:style-name="T27">Although my involvement with it was brief, during its development I fulfilled the role of a software developer.</text:span></text:p>
      <text:p text:style-name="P22"/>
      <text:p text:style-name="P5">3.2. Involvement</text:p>
      <text:p text:style-name="P23"/>
      <text:p text:style-name="P24">3.2(a). </text:p>
      <text:p text:style-name="P3"/>
      <text:p text:style-name="P3"/>
      <text:p text:style-name="P3"/>
      <text:p text:style-name="P25"><text:soft-page-break/>4. Blazejowski.co.uk</text:p>
      <text:p text:style-name="P26">mobile-first design,</text:p>
      <text:p text:style-name="P26">security by design,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0:29:11.129193221</dc:date>
    <meta:editing-duration>PT16H34M57S</meta:editing-duration>
    <meta:editing-cycles>80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38" meta:word-count="274" meta:character-count="2116" meta:non-whitespace-character-count="1880"/>
  </office:meta>
</office:document-meta>
</file>