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5" style:family="paragraph" style:parent-style-name="Text_20_body" style:list-style-name="L2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3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9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464452"/>
    </style:style>
    <style:style style:name="T20" style:family="text">
      <style:text-properties officeooo:rsid="0043dd38"/>
    </style:style>
    <style:style style:name="T21" style:family="text">
      <style:text-properties officeooo:rsid="004756e2"/>
    </style:style>
    <style:style style:name="T22" style:family="text">
      <style:text-properties officeooo:rsid="0028b6fb"/>
    </style:style>
    <style:style style:name="T23" style:family="text">
      <style:text-properties officeooo:rsid="00292dc4"/>
    </style:style>
    <style:style style:name="T24" style:family="text">
      <style:text-properties officeooo:rsid="0034b93b"/>
    </style:style>
    <style:style style:name="T25" style:family="text">
      <style:text-properties officeooo:rsid="002ec9e2"/>
    </style:style>
    <style:style style:name="T26" style:family="text">
      <style:text-properties officeooo:rsid="0034bc00"/>
    </style:style>
    <style:style style:name="T27" style:family="text">
      <style:text-properties officeooo:rsid="003f25fd"/>
    </style:style>
    <style:style style:name="T28" style:family="text">
      <style:text-properties officeooo:rsid="002d47dc"/>
    </style:style>
    <style:style style:name="T29" style:family="text">
      <style:text-properties officeooo:rsid="00371c2c"/>
    </style:style>
    <style:style style:name="T30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2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</text:p>
        </text:list-item>
      </text:list>
      <text:p text:style-name="P13"/>
      <text:p text:style-name="P7">1.2(b). <text:span text:style-name="T19">Accessibility</text:span></text:p>
      <text:p text:style-name="P14">Tutorial, TTS, hover highlight script</text:p>
      <text:list text:style-name="L2">
        <text:list-item>
          <text:p text:style-name="P15"><text:soft-page-break/>Implementation of text-to-speech</text:p>
        </text:list-item>
        <text:list-item>
          <text:p text:style-name="P16">Implementation of hover highlight</text:p>
        </text:list-item>
        <text:list-item>
          <text:p text:style-name="P16"/>
        </text:list-item>
      </text:list>
      <text:p text:style-name="P17">main menu, settings menu, navigation,</text:p>
      <text:p text:style-name="P17"/>
      <text:p text:style-name="P7">1.2(c). <text:span text:style-name="T20">Debugging</text:span></text:p>
      <text:p text:style-name="P7">1.2(d). <text:span text:style-name="T20">UI</text:span></text:p>
      <text:p text:style-name="P18">shop, main menu, settings menu, heads-up display (HUD) design, </text:p>
      <text:p text:style-name="P7">1.2(e). <text:span text:style-name="T21">Documentation</text:span></text:p>
      <text:p text:style-name="P7">1.2(f). <text:span text:style-name="T21">Design</text:span></text:p>
      <text:p text:style-name="P7"/>
      <text:p text:style-name="P3"/>
      <text:p text:style-name="P3">2. The Shadows of Vahlvadell</text:p>
      <text:p text:style-name="P19">2.1. Overview</text:p>
      <text:p text:style-name="P20">The Shadows of Vahlvadell is a Role-Playing <text:span text:style-name="T22">G</text:span>ame (RPG) <text:span text:style-name="T22">tit</text:span><text:span text:style-name="T23">le </text:span><text:span text:style-name="T24">lead by</text:span><text:span text:style-name="T23"> Aaron Stevens. </text:span><text:span text:style-name="T25">It is developed in Unreal Engine for </text:span><text:span text:style-name="T24">Windows and Linux. The project follows the Agile methodology. </text:span><text:span text:style-name="T26">During development, I fulfilled the role of a software developer.</text:span></text:p>
      <text:p text:style-name="P20"/>
      <text:p text:style-name="P5">2.2. Involvement</text:p>
      <text:p text:style-name="P21"><text:span text:style-name="T27">2</text:span>.2(a). Inventory System</text:p>
      <text:p text:style-name="P21"><text:span text:style-name="T27">2</text:span>.2(b). Weather System</text:p>
      <text:p text:style-name="P21"><text:span text:style-name="T27">2</text:span>.2(c). Combat System</text:p>
      <text:p text:style-name="P22"/>
      <text:p text:style-name="P3"/>
      <text:p text:style-name="P3">3. MauiScreenTime</text:p>
      <text:p text:style-name="P23"/>
      <text:p text:style-name="P24"><text:span text:style-name="T28">3</text:span>.1. Overview</text:p>
      <text:p text:style-name="P25">“MauiScreenTime” is a mobile application for <text:span text:style-name="T29">A</text:span>ndroid and IOS. <text:span text:style-name="T30">It follows the Agile methodology. </text:span><text:span text:style-name="T29">Although my involvement with it was brief, during its development I fulfilled the role of a software developer.</text:span></text:p>
      <text:p text:style-name="P25"/>
      <text:p text:style-name="P5">3.2. Involvement</text:p>
      <text:p text:style-name="P26"/>
      <text:p text:style-name="P27"><text:soft-page-break/>3.2(a). </text:p>
      <text:p text:style-name="P3"/>
      <text:p text:style-name="P3"/>
      <text:p text:style-name="P3"/>
      <text:p text:style-name="P28">4. Blazejowski.co.uk</text:p>
      <text:p text:style-name="P29">mobile-first design,</text:p>
      <text:p text:style-name="P29">security by design,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0:58:19.898243440</dc:date>
    <meta:editing-duration>PT16H53M33S</meta:editing-duration>
    <meta:editing-cycles>85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0" meta:word-count="298" meta:character-count="2472" meta:non-whitespace-character-count="2217"/>
  </office:meta>
</office:document-meta>
</file>