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6fae4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028b6fb"/>
    </style:style>
    <style:style style:name="T76" style:family="text">
      <style:text-properties officeooo:rsid="00292dc4"/>
    </style:style>
    <style:style style:name="T77" style:family="text">
      <style:text-properties officeooo:rsid="0034b93b"/>
    </style:style>
    <style:style style:name="T78" style:family="text">
      <style:text-properties officeooo:rsid="002ec9e2"/>
    </style:style>
    <style:style style:name="T79" style:family="text">
      <style:text-properties officeooo:rsid="0034bc00"/>
    </style:style>
    <style:style style:name="T80" style:family="text">
      <style:text-properties fo:font-style="italic" officeooo:rsid="012b38bd" style:font-style-asian="italic" style:font-style-complex="italic"/>
    </style:style>
    <style:style style:name="T81" style:family="text">
      <style:text-properties fo:font-style="italic" officeooo:rsid="013f3b91" style:font-style-asian="italic" style:font-style-complex="italic"/>
    </style:style>
    <style:style style:name="T82" style:family="text">
      <style:text-properties fo:font-style="italic" officeooo:rsid="012c5674" style:font-style-asian="italic" style:font-style-complex="italic"/>
    </style:style>
    <style:style style:name="T83" style:family="text">
      <style:text-properties officeooo:rsid="00bbe00c"/>
    </style:style>
    <style:style style:name="T84" style:family="text">
      <style:text-properties fo:font-style="italic" officeooo:rsid="01314900" style:font-style-asian="italic" style:font-style-complex="italic"/>
    </style:style>
    <style:style style:name="T85" style:family="text">
      <style:text-properties fo:font-style="italic" officeooo:rsid="01321924" style:font-style-asian="italic" style:font-style-complex="italic"/>
    </style:style>
    <style:style style:name="T86" style:family="text">
      <style:text-properties fo:font-style="italic" officeooo:rsid="0133a86a" style:font-style-asian="italic" style:font-style-complex="italic"/>
    </style:style>
    <style:style style:name="T87" style:family="text">
      <style:text-properties fo:font-style="italic" officeooo:rsid="01353272" style:font-style-asian="italic" style:font-style-complex="italic"/>
    </style:style>
    <style:style style:name="T88" style:family="text">
      <style:text-properties fo:font-style="italic" officeooo:rsid="013c8976" style:font-style-asian="italic" style:font-style-complex="italic"/>
    </style:style>
    <style:style style:name="T89" style:family="text">
      <style:text-properties fo:font-style="italic" officeooo:rsid="013f28b8" style:font-style-asian="italic" style:font-style-complex="italic"/>
    </style:style>
    <style:style style:name="T90" style:family="text">
      <style:text-properties fo:font-style="italic" officeooo:rsid="013fb12b" style:font-style-asian="italic" style:font-style-complex="italic"/>
    </style:style>
    <style:style style:name="T91" style:family="text">
      <style:text-properties fo:font-style="italic" officeooo:rsid="013ff355" style:font-style-asian="italic" style:font-style-complex="italic"/>
    </style:style>
    <style:style style:name="T92" style:family="text">
      <style:text-properties officeooo:rsid="01473ff3"/>
    </style:style>
    <style:style style:name="T93" style:family="text">
      <style:text-properties officeooo:rsid="0153d199"/>
    </style:style>
    <style:style style:name="T94" style:family="text">
      <style:text-properties officeooo:rsid="014d11ac"/>
    </style:style>
    <style:style style:name="T95" style:family="text">
      <style:text-properties officeooo:rsid="01567fbe"/>
    </style:style>
    <style:style style:name="T96" style:family="text">
      <style:text-properties officeooo:rsid="014ddaac"/>
    </style:style>
    <style:style style:name="T97" style:family="text">
      <style:text-properties officeooo:rsid="01632579"/>
    </style:style>
    <style:style style:name="T98" style:family="text">
      <style:text-properties officeooo:rsid="015e3739"/>
    </style:style>
    <style:style style:name="T99" style:family="text">
      <style:text-properties officeooo:rsid="016a33e6"/>
    </style:style>
    <style:style style:name="T100" style:family="text">
      <style:text-properties officeooo:rsid="0164e7bf"/>
    </style:style>
    <style:style style:name="T101" style:family="text">
      <style:text-properties officeooo:rsid="0165327b"/>
    </style:style>
    <style:style style:name="T102" style:family="text">
      <style:text-properties officeooo:rsid="014a4db4"/>
    </style:style>
    <style:style style:name="T103" style:family="text">
      <style:text-properties officeooo:rsid="015f0486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c55401" style:font-weight-asian="bold" style:font-weight-complex="bold"/>
    </style:style>
    <style:style style:name="T106" style:family="text">
      <style:text-properties fo:font-weight="bold" officeooo:rsid="00c945a8" style:font-weight-asian="bold" style:font-weight-complex="bold"/>
    </style:style>
    <style:style style:name="T107" style:family="text">
      <style:text-properties fo:font-weight="bold" officeooo:rsid="00c5460f" style:font-weight-asian="bold" style:font-weight-complex="bold"/>
    </style:style>
    <style:style style:name="T108" style:family="text">
      <style:text-properties officeooo:rsid="00c5460f"/>
    </style:style>
    <style:style style:name="T109" style:family="text">
      <style:text-properties fo:font-style="italic" officeooo:rsid="00c5460f" style:font-style-asian="italic" style:font-style-complex="italic"/>
    </style:style>
    <style:style style:name="T110" style:family="text">
      <style:text-properties fo:font-weight="bold" officeooo:rsid="00d39f75" style:font-weight-asian="bold" style:font-weight-complex="bold"/>
    </style:style>
    <style:style style:name="T111" style:family="text">
      <style:text-properties fo:font-style="italic" officeooo:rsid="00dcbc28" style:font-style-asian="italic" style:font-style-complex="italic"/>
    </style:style>
    <style:style style:name="T112" style:family="text">
      <style:text-properties fo:font-weight="bold" officeooo:rsid="0128bc99" style:font-weight-asian="bold" style:font-weight-complex="bold"/>
    </style:style>
    <style:style style:name="T113" style:family="text">
      <style:text-properties officeooo:rsid="00cbbf6a"/>
    </style:style>
    <style:style style:name="T114" style:family="text">
      <style:text-properties fo:font-style="italic" officeooo:rsid="00cbbf6a" style:font-style-asian="italic" style:font-style-complex="italic"/>
    </style:style>
    <style:style style:name="T115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5">G</text:span>ame (RPG) <text:span text:style-name="T75">tit</text:span><text:span text:style-name="T76">le </text:span><text:span text:style-name="T77">lead by</text:span><text:span text:style-name="T76"> Aaron Stevens. </text:span><text:span text:style-name="T78">It is developed in Unreal Engine for </text:span><text:span text:style-name="T77">Windows and Linux. The project follows the Agile methodology. </text:span><text:span text:style-name="T79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0">(The Shadows of Vahlvadell, 2026(a), #54) (The Shadows of Vahlvadell, 2026(a), #4</text:span><text:span text:style-name="T81">0</text:span><text:span text:style-name="T80">) (The Shadows of Vahlvadell, 2026(</text:span><text:span text:style-name="T82">b</text:span><text:span text:style-name="T80">), #61).</text:span></text:p>
        </text:list-item>
        <text:list-item>
          <text:p text:style-name="P44">Designed <text:span text:style-name="T83">and</text:span> developed a dynamic weather system <text:span text:style-name="T80">(The Shadows of Vahlvadell, 2026(a), #</text:span><text:span text:style-name="T84">3</text:span><text:span text:style-name="T80">) (The Shadows of Vahlvadell, 2026(</text:span><text:span text:style-name="T82">b</text:span><text:span text:style-name="T80">), #</text:span><text:span text:style-name="T85">31</text:span><text:span text:style-name="T80">) </text:span><text:span text:style-name="T86">(The Shadows of Vahlvadell, 2026(c)). </text:span><text:s/><text:span text:style-name="T83">Then, collaborated with Aaron on implementing it</text:span> <text:span text:style-name="T80">(The Shadows of Vahlvadell, 2026(a), #</text:span><text:span text:style-name="T87">40</text:span><text:span text:style-name="T80">).</text:span></text:p>
        </text:list-item>
        <text:list-item>
          <text:p text:style-name="P45">Collaborated on the design<text:span text:style-name="T48"> </text:span><text:span text:style-name="T88">(The Shadows of Vahlvadell, 2026(c))</text:span><text:span text:style-name="T48"> </text:span>and development of the combat system <text:span text:style-name="T89">(</text:span><text:span text:style-name="T80">The Shadows of Vahlvadell, 2026(a), #</text:span><text:span text:style-name="T89">45</text:span><text:span text:style-name="T80">) </text:span><text:span text:style-name="T89">(</text:span><text:span text:style-name="T80">The Shadows of Vahlvadell, 2026(a), #</text:span><text:span text:style-name="T89">27</text:span><text:span text:style-name="T80">) </text:span><text:span text:style-name="T89">(</text:span><text:span text:style-name="T80">The Shadows of Vahlvadell, 2026(a), #</text:span><text:span text:style-name="T89">16</text:span><text:span text:style-name="T80">) </text:span><text:span text:style-name="T89">(</text:span><text:span text:style-name="T80">The Shadows of Vahlvadell, 2026(a), #</text:span><text:span text:style-name="T89">26</text:span><text:span text:style-name="T80">) <text:s/>(The Shadows of Vahlvadell, 2026(a), #54) (The Shadows of Vahlvadell, 2026(</text:span><text:span text:style-name="T90">b</text:span><text:span text:style-name="T80">), #</text:span><text:span text:style-name="T90">46</text:span><text:span text:style-name="T80">) (The Shadows of Vahlvadell, 2026(</text:span><text:span text:style-name="T90">b</text:span><text:span text:style-name="T80">), #</text:span><text:span text:style-name="T90">47</text:span><text:span text:style-name="T80">) (The Shadows of Vahlvadell, 2026(</text:span><text:span text:style-name="T90">b</text:span><text:span text:style-name="T80">), #</text:span><text:span text:style-name="T90">48</text:span><text:span text:style-name="T80">) (The Shadows of Vahlvadell, 2026(</text:span><text:span text:style-name="T90">b</text:span><text:span text:style-name="T80">), #</text:span><text:span text:style-name="T91">49</text:span><text:span text:style-name="T80">).</text:span></text:p>
        </text:list-item>
      </text:list>
      <text:p text:style-name="P36"/>
      <text:p text:style-name="P46">2. <text:span text:style-name="T92">Personal Website</text:span></text:p>
      <text:p text:style-name="P47">2.1. Overview</text:p>
      <text:p text:style-name="P48">This website is a solo projec<text:span text:style-name="T93">t</text:span>. It is a<text:span text:style-name="T94">n ever-evolving </text:span><text:span text:style-name="T95">website</text:span><text:span text:style-name="T96"> aimed at increasing my understanding and proficiency with web development. </text:span><text:span text:style-name="T97">It is built on Flask in Python, and runs on</text:span><text:span text:style-name="T98"> a raspberry pi computer, within a docker container. It uses a PostgreSQL database which is contained within a separate </text:span><text:span text:style-name="T99">docker container</text:span><text:span text:style-name="T98"> for security. </text:span><text:span text:style-name="T100">For additional layer of security, the incoming connections go through an NginX server. </text:span><text:span text:style-name="T101">So far, maintaining this project helped me gain understanding and experience in the following </text:span><text:span text:style-name="T102">(Personal RESTful API, 2026)</text:span><text:span text:style-name="T101">:</text:span></text:p>
      <text:list text:style-name="L7">
        <text:list-item>
          <text:p text:style-name="P49">Mobile-first design </text:p>
          <text:list>
            <text:list-item>
              <text:p text:style-name="P50"><text:soft-page-break/>The website is built with mobile devices in mind. If a given feature doesn’t work on mobile, it is rejected.</text:p>
            </text:list-item>
          </text:list>
        </text:list-item>
        <text:list-item>
          <text:p text:style-name="P49">Security by design</text:p>
          <text:list>
            <text:list-item>
              <text:p text:style-name="P49"/>
            </text:list-item>
          </text:list>
        </text:list-item>
        <text:list-item>
          <text:p text:style-name="P51">Containerisation</text:p>
        </text:list-item>
        <text:list-item>
          <text:p text:style-name="P52">RESTful API<text:span text:style-name="T103">s</text:span></text:p>
        </text:list-item>
      </text:list>
      <text:p text:style-name="P53"/>
      <text:p text:style-name="P54"/>
      <text:p text:style-name="P55"/>
      <text:p text:style-name="P55"/>
      <text:p text:style-name="P56"/>
      <text:p text:style-name="P57"/>
      <text:p text:style-name="P57"/>
      <text:p text:style-name="P58">References:</text:p>
      <text:p text:style-name="P59"/>
      <text:p text:style-name="P60"><text:span text:style-name="T104">Mash It!</text:span><text:span text:style-name="T104"> </text:span><text:span text:style-name="T105">(</text:span><text:span text:style-name="T106">Brewing Game</text:span><text:span text:style-name="T105">)</text:span><text:span text:style-name="T104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1"><text:span text:style-name="T107">Mash It! </text:span><text:span text:style-name="T105">(</text:span><text:span text:style-name="T106">Brewing Game</text:span><text:span text:style-name="T105">)</text:span><text:span text:style-name="T108"> (2026b) </text:span><text:span text:style-name="T109">Pull Requests</text:span><text:span text:style-name="T108">. Available at: </text:span><text:a xlink:type="simple" xlink:href="https://github.com/Brewing-Game/brewing-game/pulls" text:style-name="Internet_20_link" text:visited-style-name="Visited_20_Internet_20_Link"><text:span text:style-name="T108">https://github.com/Brewing-Game/brewing-game/pulls</text:span></text:a><text:span text:style-name="T108"> (Accessed: 20 May 2026).</text:span></text:p>
      <text:p text:style-name="P62"><text:span text:style-name="T104">Mash It! </text:span><text:span text:style-name="T110">(Brewing Game)</text:span> (2026c) <text:span text:style-name="T111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3"/>
      <text:p text:style-name="P64"><text:span text:style-name="T112">The </text:span><text:span text:style-name="T104">Shadows of Vahlvadell (Aaron Stevens)</text:span> <text:span text:style-name="T113">(2026a) </text:span><text:span text:style-name="T114">Kanban</text:span><text:span text:style-name="T113">. Available at: </text:span><text:a xlink:type="simple" xlink:href="https://github.com/users/Strivion/projects/2/views/1" text:style-name="Internet_20_link" text:visited-style-name="Visited_20_Internet_20_Link"><text:span text:style-name="T113">https://github.com/users/Strivion/projects/2/views/1</text:span></text:a><text:span text:style-name="T113"> <text:s/>(Accessed: 20 May 2026).</text:span></text:p>
      <text:p text:style-name="P65"><text:span text:style-name="T112">The </text:span><text:span text:style-name="T104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6"><text:span text:style-name="T112">The </text:span><text:span text:style-name="T104">Shadows of Vahlvadell </text:span><text:span text:style-name="T115">(Aaron Stevens)</text:span><text:span text:style-name="T104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7"/>
      <text:p text:style-name="P68"><text:span text:style-name="T104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6:39.961740604</dc:date>
    <meta:editing-duration>P1DT11M35S</meta:editing-duration>
    <meta:editing-cycles>31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1051" meta:character-count="7257" meta:non-whitespace-character-count="6269"/>
  </office:meta>
</office:document-meta>
</file>