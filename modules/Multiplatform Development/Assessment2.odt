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8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1" style:family="paragraph" style:parent-style-name="Text_20_body" style:list-style-name="L6">
      <style:text-properties fo:font-size="12pt" fo:font-weight="normal" officeooo:rsid="00b2d3ce" officeooo:paragraph-rsid="013f3b91" style:font-size-asian="10.5pt" style:font-weight-asian="normal" style:font-size-complex="12pt" style:font-weight-complex="normal"/>
    </style:style>
    <style:style style:name="P42" style:family="paragraph" style:parent-style-name="Text_20_body" style:list-style-name="L6">
      <style:text-properties fo:font-size="12pt" fo:font-weight="normal" officeooo:rsid="00b5cc82" officeooo:paragraph-rsid="01353272" style:font-size-asian="10.5pt" style:font-weight-asian="normal" style:font-size-complex="12pt" style:font-weight-complex="normal"/>
    </style:style>
    <style:style style:name="P43" style:family="paragraph" style:parent-style-name="Text_20_body" style:list-style-name="L6">
      <style:text-properties fo:font-size="12pt" fo:font-weight="normal" officeooo:rsid="00be4142" officeooo:paragraph-rsid="013fb12b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2pt" fo:font-weight="normal" officeooo:rsid="00493ea5" officeooo:paragraph-rsid="00b2d3ce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4pt" fo:font-weight="bold" officeooo:rsid="00265e63" officeooo:paragraph-rsid="014652f4" style:font-size-asian="14pt" style:font-weight-asian="bold" style:font-size-complex="14pt" style:font-weight-complex="bold"/>
    </style:style>
    <style:style style:name="P47" style:family="paragraph" style:parent-style-name="Text_20_body">
      <style:text-properties fo:font-size="13pt" fo:font-weight="bold" officeooo:rsid="002eb126" officeooo:paragraph-rsid="014652f4" style:font-size-asian="13pt" style:font-weight-asian="bold" style:font-size-complex="13pt" style:font-weight-complex="bold"/>
    </style:style>
    <style:style style:name="P48" style:family="paragraph" style:parent-style-name="Text_20_body">
      <style:text-properties fo:font-size="12pt" fo:font-weight="normal" officeooo:rsid="014858c2" officeooo:paragraph-rsid="014858c2" style:font-size-asian="10.5pt" style:font-weight-asian="normal" style:font-size-complex="12pt" style:font-weight-complex="normal"/>
    </style:style>
    <style:style style:name="P49" style:family="paragraph" style:parent-style-name="Text_20_body">
      <style:text-properties fo:font-size="12pt" fo:font-weight="normal" officeooo:rsid="014a4db4" officeooo:paragraph-rsid="014a4db4" style:font-size-asian="10.5pt" style:font-weight-asian="normal" style:font-size-complex="12pt" style:font-weight-complex="normal"/>
    </style:style>
    <style:style style:name="P50" style:family="paragraph" style:parent-style-name="Text_20_body">
      <style:text-properties fo:font-size="12pt" fo:font-weight="normal" officeooo:rsid="0027a6ff" officeooo:paragraph-rsid="0146bee2" style:font-size-asian="10.5pt" style:font-weight-asian="normal" style:font-size-complex="12pt" style:font-weight-complex="normal"/>
    </style:style>
    <style:style style:name="P51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52" style:family="paragraph" style:parent-style-name="Text_20_body">
      <style:text-properties fo:font-size="13pt" fo:font-weight="normal" officeooo:rsid="014652f4" officeooo:paragraph-rsid="014652f4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60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61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62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63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P64" style:family="paragraph" style:parent-style-name="Text_20_body">
      <style:text-properties fo:font-size="13pt" fo:font-weight="normal" officeooo:rsid="0142900e" officeooo:paragraph-rsid="0142900e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028b6fb"/>
    </style:style>
    <style:style style:name="T74" style:family="text">
      <style:text-properties officeooo:rsid="00292dc4"/>
    </style:style>
    <style:style style:name="T75" style:family="text">
      <style:text-properties officeooo:rsid="0034b93b"/>
    </style:style>
    <style:style style:name="T76" style:family="text">
      <style:text-properties officeooo:rsid="002ec9e2"/>
    </style:style>
    <style:style style:name="T77" style:family="text">
      <style:text-properties officeooo:rsid="0034bc00"/>
    </style:style>
    <style:style style:name="T78" style:family="text">
      <style:text-properties fo:font-style="italic" officeooo:rsid="012b38bd" style:font-style-asian="italic" style:font-style-complex="italic"/>
    </style:style>
    <style:style style:name="T79" style:family="text">
      <style:text-properties fo:font-style="italic" officeooo:rsid="013f3b91" style:font-style-asian="italic" style:font-style-complex="italic"/>
    </style:style>
    <style:style style:name="T80" style:family="text">
      <style:text-properties fo:font-style="italic" officeooo:rsid="012c5674" style:font-style-asian="italic" style:font-style-complex="italic"/>
    </style:style>
    <style:style style:name="T81" style:family="text">
      <style:text-properties officeooo:rsid="00bbe00c"/>
    </style:style>
    <style:style style:name="T82" style:family="text">
      <style:text-properties fo:font-style="italic" officeooo:rsid="01314900" style:font-style-asian="italic" style:font-style-complex="italic"/>
    </style:style>
    <style:style style:name="T83" style:family="text">
      <style:text-properties fo:font-style="italic" officeooo:rsid="01321924" style:font-style-asian="italic" style:font-style-complex="italic"/>
    </style:style>
    <style:style style:name="T84" style:family="text">
      <style:text-properties fo:font-style="italic" officeooo:rsid="0133a86a" style:font-style-asian="italic" style:font-style-complex="italic"/>
    </style:style>
    <style:style style:name="T85" style:family="text">
      <style:text-properties fo:font-style="italic" officeooo:rsid="01353272" style:font-style-asian="italic" style:font-style-complex="italic"/>
    </style:style>
    <style:style style:name="T86" style:family="text">
      <style:text-properties fo:font-style="italic" officeooo:rsid="013c8976" style:font-style-asian="italic" style:font-style-complex="italic"/>
    </style:style>
    <style:style style:name="T87" style:family="text">
      <style:text-properties fo:font-style="italic" officeooo:rsid="013f28b8" style:font-style-asian="italic" style:font-style-complex="italic"/>
    </style:style>
    <style:style style:name="T88" style:family="text">
      <style:text-properties fo:font-style="italic" officeooo:rsid="013fb12b" style:font-style-asian="italic" style:font-style-complex="italic"/>
    </style:style>
    <style:style style:name="T89" style:family="text">
      <style:text-properties fo:font-style="italic" officeooo:rsid="013ff355" style:font-style-asian="italic" style:font-style-complex="italic"/>
    </style:style>
    <style:style style:name="T90" style:family="text">
      <style:text-properties officeooo:rsid="01473ff3"/>
    </style:style>
    <style:style style:name="T91" style:family="text">
      <style:text-properties officeooo:rsid="014d11ac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officeooo:rsid="00c55401" style:font-weight-asian="bold" style:font-weight-complex="bold"/>
    </style:style>
    <style:style style:name="T94" style:family="text">
      <style:text-properties fo:font-weight="bold" officeooo:rsid="00c945a8" style:font-weight-asian="bold" style:font-weight-complex="bold"/>
    </style:style>
    <style:style style:name="T95" style:family="text">
      <style:text-properties fo:font-weight="bold" officeooo:rsid="00c5460f" style:font-weight-asian="bold" style:font-weight-complex="bold"/>
    </style:style>
    <style:style style:name="T96" style:family="text">
      <style:text-properties officeooo:rsid="00c5460f"/>
    </style:style>
    <style:style style:name="T97" style:family="text">
      <style:text-properties fo:font-style="italic" officeooo:rsid="00c5460f" style:font-style-asian="italic" style:font-style-complex="italic"/>
    </style:style>
    <style:style style:name="T98" style:family="text">
      <style:text-properties fo:font-weight="bold" officeooo:rsid="00d39f75" style:font-weight-asian="bold" style:font-weight-complex="bold"/>
    </style:style>
    <style:style style:name="T99" style:family="text">
      <style:text-properties fo:font-style="italic" officeooo:rsid="00dcbc28" style:font-style-asian="italic" style:font-style-complex="italic"/>
    </style:style>
    <style:style style:name="T100" style:family="text">
      <style:text-properties fo:font-weight="bold" officeooo:rsid="0128bc99" style:font-weight-asian="bold" style:font-weight-complex="bold"/>
    </style:style>
    <style:style style:name="T101" style:family="text">
      <style:text-properties officeooo:rsid="00cbbf6a"/>
    </style:style>
    <style:style style:name="T102" style:family="text">
      <style:text-properties fo:font-style="italic" officeooo:rsid="00cbbf6a" style:font-style-asian="italic" style:font-style-complex="italic"/>
    </style:style>
    <style:style style:name="T103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6"/>
      <text:p text:style-name="P3"><text:soft-page-break/>2. The Shadows of Vahlvadell</text:p>
      <text:p text:style-name="P37">2.1. Overview</text:p>
      <text:p text:style-name="P38">The Shadows of Vahlvadell is a Role-Playing <text:span text:style-name="T73">G</text:span>ame (RPG) <text:span text:style-name="T73">tit</text:span><text:span text:style-name="T74">le </text:span><text:span text:style-name="T75">lead by</text:span><text:span text:style-name="T74"> Aaron Stevens. </text:span><text:span text:style-name="T76">It is developed in Unreal Engine for </text:span><text:span text:style-name="T75">Windows and Linux. The project follows the Agile methodology. </text:span><text:span text:style-name="T77">During development, I fulfilled the role of a software developer.</text:span></text:p>
      <text:p text:style-name="P38"/>
      <text:p text:style-name="P39">2.2. Involvement</text:p>
      <text:p text:style-name="P40">2.2(a) Systems</text:p>
      <text:list text:style-name="L6">
        <text:list-item>
          <text:p text:style-name="P41">Given my previous experience with developing inventory systems for another project (Scattered Lands), I was assigned to the task of designing and implementing an inventory system <text:span text:style-name="T78">(The Shadows of Vahlvadell, 2026(a), #54) (The Shadows of Vahlvadell, 2026(a), #4</text:span><text:span text:style-name="T79">0</text:span><text:span text:style-name="T78">) (The Shadows of Vahlvadell, 2026(</text:span><text:span text:style-name="T80">b</text:span><text:span text:style-name="T78">), #61).</text:span></text:p>
        </text:list-item>
        <text:list-item>
          <text:p text:style-name="P42">Designed <text:span text:style-name="T81">and</text:span> developed a dynamic weather system <text:span text:style-name="T78">(The Shadows of Vahlvadell, 2026(a), #</text:span><text:span text:style-name="T82">3</text:span><text:span text:style-name="T78">) (The Shadows of Vahlvadell, 2026(</text:span><text:span text:style-name="T80">b</text:span><text:span text:style-name="T78">), #</text:span><text:span text:style-name="T83">31</text:span><text:span text:style-name="T78">) </text:span><text:span text:style-name="T84">(The Shadows of Vahlvadell, 2026(c)). </text:span><text:s/><text:span text:style-name="T81">Then, collaborated with Aaron on implementing it</text:span> <text:span text:style-name="T78">(The Shadows of Vahlvadell, 2026(a), #</text:span><text:span text:style-name="T85">40</text:span><text:span text:style-name="T78">).</text:span></text:p>
        </text:list-item>
        <text:list-item>
          <text:p text:style-name="P43">Collaborated on the design<text:span text:style-name="T48"> </text:span><text:span text:style-name="T86">(The Shadows of Vahlvadell, 2026(c))</text:span><text:span text:style-name="T48"> </text:span>and development of the combat system <text:span text:style-name="T87">(</text:span><text:span text:style-name="T78">The Shadows of Vahlvadell, 2026(a), #</text:span><text:span text:style-name="T87">45</text:span><text:span text:style-name="T78">) </text:span><text:span text:style-name="T87">(</text:span><text:span text:style-name="T78">The Shadows of Vahlvadell, 2026(a), #</text:span><text:span text:style-name="T87">27</text:span><text:span text:style-name="T78">) </text:span><text:span text:style-name="T87">(</text:span><text:span text:style-name="T78">The Shadows of Vahlvadell, 2026(a), #</text:span><text:span text:style-name="T87">16</text:span><text:span text:style-name="T78">) </text:span><text:span text:style-name="T87">(</text:span><text:span text:style-name="T78">The Shadows of Vahlvadell, 2026(a), #</text:span><text:span text:style-name="T87">26</text:span><text:span text:style-name="T78">) <text:s/>(The Shadows of Vahlvadell, 2026(a), #54) (The Shadows of Vahlvadell, 2026(</text:span><text:span text:style-name="T88">b</text:span><text:span text:style-name="T78">), #</text:span><text:span text:style-name="T88">46</text:span><text:span text:style-name="T78">) (The Shadows of Vahlvadell, 2026(</text:span><text:span text:style-name="T88">b</text:span><text:span text:style-name="T78">), #</text:span><text:span text:style-name="T88">47</text:span><text:span text:style-name="T78">) (The Shadows of Vahlvadell, 2026(</text:span><text:span text:style-name="T88">b</text:span><text:span text:style-name="T78">), #</text:span><text:span text:style-name="T88">48</text:span><text:span text:style-name="T78">) (The Shadows of Vahlvadell, 2026(</text:span><text:span text:style-name="T88">b</text:span><text:span text:style-name="T78">), #</text:span><text:span text:style-name="T89">49</text:span><text:span text:style-name="T78">) </text:span></text:p>
        </text:list-item>
      </text:list>
      <text:p text:style-name="P44"/>
      <text:p text:style-name="P45"/>
      <text:p text:style-name="P36"/>
      <text:p text:style-name="P46">2. <text:span text:style-name="T90">Personal Website</text:span></text:p>
      <text:p text:style-name="P47">2.1. Overview</text:p>
      <text:p text:style-name="P48">This website is a solo project developed by myself for myself. It is a<text:span text:style-name="T91">n ever-evolving </text:span></text:p>
      <text:p text:style-name="P48"/>
      <text:p text:style-name="P49">(Personal RESTful API, 2026)</text:p>
      <text:p text:style-name="P50"/>
      <text:p text:style-name="P50"/>
      <text:p text:style-name="P50"/>
      <text:p text:style-name="P51">4. Blazejowski.co.uk</text:p>
      <text:p text:style-name="P52"/>
      <text:p text:style-name="P53">mobile-first design,</text:p>
      <text:p text:style-name="P53"><text:soft-page-break/>security by design,</text:p>
      <text:p text:style-name="P53"/>
      <text:p text:style-name="P53"/>
      <text:p text:style-name="P54">References:</text:p>
      <text:p text:style-name="P55"/>
      <text:p text:style-name="P56"><text:span text:style-name="T92">Mash It!</text:span><text:span text:style-name="T92"> </text:span><text:span text:style-name="T93">(</text:span><text:span text:style-name="T94">Brewing Game</text:span><text:span text:style-name="T93">)</text:span><text:span text:style-name="T92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7"><text:span text:style-name="T95">Mash It! </text:span><text:span text:style-name="T93">(</text:span><text:span text:style-name="T94">Brewing Game</text:span><text:span text:style-name="T93">)</text:span><text:span text:style-name="T96"> (2026b) </text:span><text:span text:style-name="T97">Pull Requests</text:span><text:span text:style-name="T96">. Available at: </text:span><text:a xlink:type="simple" xlink:href="https://github.com/Brewing-Game/brewing-game/pulls" text:style-name="Internet_20_link" text:visited-style-name="Visited_20_Internet_20_Link"><text:span text:style-name="T96">https://github.com/Brewing-Game/brewing-game/pulls</text:span></text:a><text:span text:style-name="T96"> (Accessed: 20 May 2026).</text:span></text:p>
      <text:p text:style-name="P58"><text:span text:style-name="T92">Mash It! </text:span><text:span text:style-name="T98">(Brewing Game)</text:span> (2026c) <text:span text:style-name="T99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59"/>
      <text:p text:style-name="P60"><text:span text:style-name="T100">The </text:span><text:span text:style-name="T92">Shadows of Vahlvadell (Aaron Stevens)</text:span> <text:span text:style-name="T101">(2026a) </text:span><text:span text:style-name="T102">Kanban</text:span><text:span text:style-name="T101">. Available at: </text:span><text:a xlink:type="simple" xlink:href="https://github.com/users/Strivion/projects/2/views/1" text:style-name="Internet_20_link" text:visited-style-name="Visited_20_Internet_20_Link"><text:span text:style-name="T101">https://github.com/users/Strivion/projects/2/views/1</text:span></text:a><text:span text:style-name="T101"> <text:s/>(Accessed: 20 May 2026).</text:span></text:p>
      <text:p text:style-name="P61"><text:span text:style-name="T100">The </text:span><text:span text:style-name="T92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62"><text:span text:style-name="T100">The </text:span><text:span text:style-name="T92">Shadows of Vahlvadell </text:span><text:span text:style-name="T103">(Aaron Stevens)</text:span><text:span text:style-name="T92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63"/>
      <text:p text:style-name="P64"><text:span text:style-name="T92">Personal RESTful API (Ryboster)</text:span> (2026) <text:span text:style-name="T48">Repository</text:span>. Available at: <text:a xlink:type="simple" xlink:href="https://github.com/Ryboster/Personal_RESTful_API" text:style-name="Internet_20_link" text:visited-style-name="Visited_20_Internet_20_Link">https://github.com/Ryboster/Personal_RESTful_API</text:a> (Accessed: 22 May 2026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7:32:26.330042205</dc:date>
    <meta:editing-duration>PT22H47M36S</meta:editing-duration>
    <meta:editing-cycles>285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59" meta:word-count="931" meta:character-count="6522" meta:non-whitespace-character-count="5645"/>
  </office:meta>
</office:document-meta>
</file>