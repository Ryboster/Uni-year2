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900000042B74D261474423CC2.png" manifest:media-type="image/png"/>
  <manifest:file-entry manifest:full-path="Pictures/1000020100000384000002A3E61FE2B92AA395E6.png" manifest:media-type="image/png"/>
  <manifest:file-entry manifest:full-path="Pictures/10000201000000F40000004334ADD2044C3A3683.png" manifest:media-type="image/png"/>
  <manifest:file-entry manifest:full-path="Pictures/10000201000000F0000000F0C7B4EB6C84C8DFD8.png" manifest:media-type="image/png"/>
  <manifest:file-entry manifest:full-path="Pictures/10000201000000F1000000408FB41A58E28F59D2.png" manifest:media-type="image/png"/>
  <manifest:file-entry manifest:full-path="Pictures/1000012C000003200000029EAA081581F2264FDC.gif" manifest:media-type="image/gif"/>
  <manifest:file-entry manifest:full-path="Pictures/100002010000051300000242FC0EE8A42E665A43.png" manifest:media-type="image/png"/>
  <manifest:file-entry manifest:full-path="Pictures/10000201000001040000012D3F47AAE8A6B35B9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3" style:family="paragraph">
      <style:paragraph-properties fo:margin-left="0cm" fo:margin-right="0cm" fo:margin-top="0cm" fo:margin-bottom="0cm" fo:line-height="8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81f5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Grotesk Light" fo:font-size="64pt" fo:letter-spacing="normal" fo:font-style="normal" style:text-underline-style="none" fo:font-weight="normal" style:font-name-asian="Space Grotesk Light" style:font-size-asian="64pt" style:font-style-asian="normal" style:font-weight-asian="normal" style:font-name-complex="Space Grotesk Light" style:font-size-complex="64pt" style:font-style-complex="normal" style:font-weight-complex="normal"/>
    </style:style>
    <style:style style:name="T3" style:family="text">
      <style:text-properties fo:font-variant="normal" fo:text-transform="none" fo:color="#81f5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81f5ff" style:text-line-through-style="none" style:text-line-through-type="none" style:text-position="0% 100%" style:font-name="Space Grotesk Light" fo:font-size="48pt" fo:letter-spacing="normal" fo:font-style="normal" style:text-underline-style="none" fo:font-weight="normal" style:font-name-asian="Space Grotesk Light" style:font-size-asian="48pt" style:font-style-asian="normal" style:font-weight-asian="normal" style:font-name-complex="Space Grotesk Light" style:font-size-complex="4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pace Grotesk" fo:font-size="22pt" fo:letter-spacing="normal" fo:font-style="normal" style:text-underline-style="none" fo:font-weight="normal" style:font-name-asian="Space Grotesk" style:font-size-asian="22pt" style:font-style-asian="normal" style:font-weight-asian="normal" style:font-name-complex="Space Grotesk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248cm" text:min-label-width="1.022cm"/>
        <style:text-properties style:font-name="Space Grotesk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rewing Game" draw:style-name="dp1" draw:master-page-name="BLANK">
        <draw:frame draw:name="Google Shape;319;p38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Sprint 5 - Review</text:span></text:p>
          </draw:text-box>
        </draw:frame>
        <draw:frame draw:name="Google Shape;320;p38" presentation:style-name="pr2" draw:text-style-name="P2" draw:layer="layout" svg:width="20.974cm" svg:height="6.333cm" svg:x="3.901cm" svg:y="7.735cm" presentation:class="title" presentation:user-transformed="true">
          <draw:text-box>
            <text:p text:style-name="P3"><text:span text:style-name="T2">The Brewing Game</text:span></text:p>
          </draw:text-box>
        </draw:frame>
        <draw:frame draw:name="Google Shape;321;p38" presentation:style-name="pr3" draw:text-style-name="P5" draw:layer="layout" svg:width="14.187cm" svg:height="8.287cm" svg:x="0.635cm" svg:y="8.025cm" presentation:class="subtitle" presentation:user-transformed="true">
          <draw:text-box>
            <text:p text:style-name="P4"><text:span text:style-name="T3">2nd February 2026</text:span></text:p>
          </draw:text-box>
        </draw:frame>
        <presentation:notes draw:style-name="dp2">
          <draw:page-thumbnail draw:name="Google Shape;316;g3c2cabe9ccb_0_0:notes" draw:style-name="gr1" draw:layer="layout" svg:width="16.932cm" svg:height="9.524cm" svg:x="1.059cm" svg:y="1.905cm" draw:page-number="1" presentation:class="page"/>
          <draw:frame draw:name="Google Shape;317;g3c2cabe9ccb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 &#10;Mash Tun Interactions&#10;" draw:style-name="dp1" draw:master-page-name="BLANK">
        <draw:frame draw:name="Google Shape;326;p39" presentation:style-name="pr1" draw:text-style-name="P2" draw:layer="layout" svg:width="24.136cm" svg:height="5.484cm" svg:x="0.632cm" svg:y="0.388cm" presentation:class="title" presentation:user-transformed="true">
          <draw:text-box>
            <text:p text:style-name="P1"><text:span text:style-name="T4">Added </text:span><text:span text:style-name="T4"><text:line-break/></text:span><text:span text:style-name="T4">Mash Tun Interactions</text:span><text:span text:style-name="T4"><text:line-break/></text:span><text:span text:style-name="T4"/></text:p>
          </draw:text-box>
        </draw:frame>
        <draw:frame draw:name="Google Shape;327;p39" draw:style-name="gr2" draw:text-style-name="P7" draw:layer="layout" svg:width="6.878cm" svg:height="7.963cm" svg:x="19.151cm" svg:y="4.667cm">
          <draw:image xlink:href="Pictures/10000201000001040000012D3F47AAE8A6B35B93.png" xlink:type="simple" xlink:show="embed" xlink:actuate="onLoad">
            <text:p/>
          </draw:image>
        </draw:frame>
        <draw:frame draw:name="Google Shape;328;p39" presentation:style-name="pr3" draw:text-style-name="P5" draw:layer="layout" svg:width="14.187cm" svg:height="8.287cm" svg:x="0.635cm" svg:y="9.431cm" presentation:class="subtitle" presentation:user-transformed="true">
          <draw:text-box>
            <text:p text:style-name="P4"><text:span text:style-name="T3">Marta Grazia</text:span></text:p>
          </draw:text-box>
        </draw:frame>
        <draw:frame draw:name="Google Shape;329;p39" draw:style-name="gr2" draw:text-style-name="P7" draw:layer="layout" svg:width="10.9cm" svg:height="9.128cm" svg:x="7.91cm" svg:y="4.084cm">
          <draw:image xlink:href="Pictures/1000012C000003200000029EAA081581F2264FDC.gif" xlink:type="simple" xlink:show="embed" xlink:actuate="onLoad">
            <text:p/>
          </draw:image>
        </draw:frame>
        <presentation:notes draw:style-name="dp2">
          <draw:page-thumbnail draw:name="Google Shape;323;g3c2cabe9ccb_0_343:notes" draw:style-name="gr1" draw:layer="layout" svg:width="16.932cm" svg:height="9.524cm" svg:x="1.059cm" svg:y="1.905cm" draw:page-number="2" presentation:class="page"/>
          <draw:frame draw:name="Google Shape;324;g3c2cabe9ccb_0_34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d-Sprint work" draw:style-name="dp1" draw:master-page-name="BLANK">
        <draw:frame draw:name="Google Shape;334;p40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1">Mid-Sprint work</text:span></text:p>
          </draw:text-box>
        </draw:frame>
        <draw:frame draw:name="Google Shape;335;p40" presentation:style-name="pr3" draw:text-style-name="P5" draw:layer="layout" svg:width="14.187cm" svg:height="8.287cm" svg:x="0.635cm" svg:y="9.431cm" presentation:class="subtitle" presentation:user-transformed="true">
          <draw:text-box>
            <text:p text:style-name="P4"><text:span text:style-name="T3">Marta Grazia</text:span></text:p>
          </draw:text-box>
        </draw:frame>
        <draw:custom-shape draw:name="Google Shape;336;p40" draw:style-name="gr3" draw:text-style-name="P9" draw:layer="layout" svg:width="12.497cm" svg:height="5.339cm" svg:x="8.229cm" svg:y="5.016cm">
          <text:list text:style-name="L3">
            <text:list-item>
              <text:p text:style-name="P8"><text:span text:style-name="T5">Game Manager Script</text:span></text:p>
            </text:list-item>
            <text:list-item>
              <text:p text:style-name="P8"><text:span text:style-name="T5">Tabbing Navigation</text:span></text:p>
            </text:list-item>
            <text:list-item>
              <text:p text:style-name="P8"><text:span text:style-name="T5">Text to Speech 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3c61420dfc0_0_1:notes" draw:style-name="gr1" draw:layer="layout" svg:width="16.932cm" svg:height="9.524cm" svg:x="1.059cm" svg:y="1.905cm" draw:page-number="3" presentation:class="page"/>
          <draw:frame draw:name="Google Shape;332;g3c61420dfc0_0_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341;p41" draw:style-name="gr2" draw:text-style-name="P7" xml:id="id1" draw:id="id1" draw:layer="layout" svg:width="19.289cm" svg:height="14.467cm" svg:x="3.055cm" svg:y="-0.09cm">
          <draw:image xlink:href="Pictures/10000201000000F0000000F0C7B4EB6C84C8DF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338;g3c2cabe9ccb_0_359:notes" draw:style-name="gr1" draw:layer="layout" svg:width="16.932cm" svg:height="9.524cm" svg:x="1.059cm" svg:y="1.905cm" draw:page-number="4" presentation:class="page"/>
          <draw:frame draw:name="Google Shape;339;g3c2cabe9ccb_0_35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d a &#10;score formula" draw:style-name="dp1" draw:master-page-name="BLANK">
        <draw:frame draw:name="Google Shape;346;p42" presentation:style-name="pr1" draw:text-style-name="P2" draw:layer="layout" svg:width="24.136cm" svg:height="4.605cm" svg:x="0.628cm" svg:y="0.402cm" presentation:class="title" presentation:user-transformed="true">
          <draw:text-box>
            <text:p text:style-name="P1"><text:span text:style-name="T2">Created a </text:span><text:span text:style-name="T2"><text:line-break/></text:span><text:span text:style-name="T2">score formula</text:span></text:p>
          </draw:text-box>
        </draw:frame>
        <draw:frame draw:name="Google Shape;347;p42" presentation:style-name="pr3" draw:text-style-name="P5" draw:layer="layout" svg:width="14.187cm" svg:height="8.287cm" svg:x="0.635cm" svg:y="8.025cm" presentation:class="subtitle" presentation:user-transformed="true">
          <draw:text-box>
            <text:p text:style-name="P4"><text:span text:style-name="T3">Bruce Gray</text:span></text:p>
          </draw:text-box>
        </draw:frame>
        <draw:frame draw:name="Google Shape;348;p42" draw:style-name="gr2" draw:text-style-name="P7" draw:layer="layout" svg:width="6.455cm" svg:height="1.772cm" svg:x="11.805cm" svg:y="7.144cm">
          <draw:image xlink:href="Pictures/10000201000000F40000004334ADD2044C3A3683.png" xlink:type="simple" xlink:show="embed" xlink:actuate="onLoad">
            <text:p/>
          </draw:image>
        </draw:frame>
        <presentation:notes draw:style-name="dp2">
          <draw:page-thumbnail draw:name="Google Shape;343;g3c2cabe9ccb_0_365:notes" draw:style-name="gr1" draw:layer="layout" svg:width="16.932cm" svg:height="9.524cm" svg:x="1.059cm" svg:y="1.905cm" draw:page-number="5" presentation:class="page"/>
          <draw:frame draw:name="Google Shape;344;g3c2cabe9ccb_0_36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353;p43" draw:style-name="gr2" draw:text-style-name="P7" draw:layer="layout" svg:width="17.459cm" svg:height="13.094cm" svg:x="5.467cm" svg:y="0.488cm">
          <draw:image xlink:href="Pictures/1000020100000384000002A3E61FE2B92AA395E6.png" xlink:type="simple" xlink:show="embed" xlink:actuate="onLoad">
            <text:p/>
          </draw:image>
        </draw:frame>
        <presentation:notes draw:style-name="dp2">
          <draw:page-thumbnail draw:name="Google Shape;350;g3c2cabe9ccb_0_352:notes" draw:style-name="gr1" draw:layer="layout" svg:width="16.932cm" svg:height="9.524cm" svg:x="1.059cm" svg:y="1.905cm" draw:page-number="6" presentation:class="page"/>
          <draw:frame draw:name="Google Shape;351;g3c2cabe9ccb_0_352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ed first FX + Track" draw:style-name="dp1" draw:master-page-name="BLANK">
        <draw:frame draw:name="Google Shape;358;p44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Added first FX + Track</text:span></text:p>
          </draw:text-box>
        </draw:frame>
        <draw:frame draw:name="Google Shape;359;p44" presentation:style-name="pr3" draw:text-style-name="P5" draw:layer="layout" svg:width="14.187cm" svg:height="8.287cm" svg:x="0.635cm" svg:y="8.025cm" presentation:class="subtitle" presentation:user-transformed="true">
          <draw:text-box>
            <text:p text:style-name="P4"><text:span text:style-name="T3">Gracjan Blazejowski</text:span></text:p>
          </draw:text-box>
        </draw:frame>
        <draw:frame draw:name="Google Shape;360;p44" draw:style-name="gr2" draw:text-style-name="P7" draw:layer="layout" svg:width="6.587cm" svg:height="1.745cm" svg:x="13.581cm" svg:y="5.977cm">
          <draw:image xlink:href="Pictures/10000201000000F900000042B74D261474423CC2.png" xlink:type="simple" xlink:show="embed" xlink:actuate="onLoad">
            <text:p/>
          </draw:image>
        </draw:frame>
        <draw:frame draw:name="Google Shape;361;p44" draw:style-name="gr2" draw:text-style-name="P7" draw:layer="layout" svg:width="6.375cm" svg:height="1.692cm" svg:x="13.687cm" svg:y="7.724cm">
          <draw:image xlink:href="Pictures/10000201000000F1000000408FB41A58E28F59D2.png" xlink:type="simple" xlink:show="embed" xlink:actuate="onLoad">
            <text:p/>
          </draw:image>
        </draw:frame>
        <presentation:notes draw:style-name="dp2">
          <draw:page-thumbnail draw:name="Google Shape;355;g3c2cabe9ccb_0_319:notes" draw:style-name="gr1" draw:layer="layout" svg:width="16.932cm" svg:height="9.524cm" svg:x="1.059cm" svg:y="1.905cm" draw:page-number="7" presentation:class="page"/>
          <draw:frame draw:name="Google Shape;356;g3c2cabe9ccb_0_3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366;p45" draw:style-name="gr2" draw:text-style-name="P7" draw:layer="layout" svg:width="24.552cm" svg:height="10.924cm" svg:x="0.847cm" svg:y="1.266cm">
          <draw:image xlink:href="Pictures/100002010000051300000242FC0EE8A42E665A43.png" xlink:type="simple" xlink:show="embed" xlink:actuate="onLoad">
            <text:p/>
          </draw:image>
        </draw:frame>
        <presentation:notes draw:style-name="dp2">
          <draw:page-thumbnail draw:name="Google Shape;363;g3c2cabe9ccb_0_382:notes" draw:style-name="gr1" draw:layer="layout" svg:width="16.932cm" svg:height="9.524cm" svg:x="1.059cm" svg:y="1.905cm" draw:page-number="8" presentation:class="page"/>
          <draw:frame draw:name="Google Shape;364;g3c2cabe9ccb_0_38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ewing Game" draw:style-name="dp1" draw:master-page-name="BLANK">
        <draw:frame draw:name="Google Shape;371;p46" presentation:style-name="pr1" draw:text-style-name="P2" draw:layer="layout" svg:width="24.136cm" svg:height="2.386cm" svg:x="0.628cm" svg:y="0.402cm" presentation:class="title" presentation:user-transformed="true">
          <draw:text-box>
            <text:p text:style-name="P1"><text:span text:style-name="T2">Thank you!</text:span></text:p>
          </draw:text-box>
        </draw:frame>
        <draw:frame draw:name="Google Shape;372;p46" presentation:style-name="pr2" draw:text-style-name="P2" draw:layer="layout" svg:width="20.974cm" svg:height="6.333cm" svg:x="3.901cm" svg:y="7.735cm" presentation:class="title" presentation:user-transformed="true">
          <draw:text-box>
            <text:p text:style-name="P3"><text:span text:style-name="T2">The Brewing Game</text:span></text:p>
          </draw:text-box>
        </draw:frame>
        <presentation:notes draw:style-name="dp2">
          <draw:page-thumbnail draw:name="Google Shape;368;g3c2cabe9ccb_0_390:notes" draw:style-name="gr1" draw:layer="layout" svg:width="16.932cm" svg:height="9.524cm" svg:x="1.059cm" svg:y="1.905cm" draw:page-number="9" presentation:class="page"/>
          <draw:frame draw:name="Google Shape;369;g3c2cabe9ccb_0_39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Space Grotesk" svg:font-family="'Space Grotesk'"/>
    <style:font-face style:name="Space Grotesk Light" svg:font-family="'Space Grotesk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8585" draw:end-color="#070707" draw:start-intensity="100%" draw:end-intensity="100%" draw:angle="2991" draw:border="0%"/>
    <draw:gradient draw:name="msFillGradient_20_1" draw:display-name="msFillGradient 1" draw:style="linear" draw:start-color="#008585" draw:end-color="#07070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2" draw:style-name="Mgr3" draw:text-style-name="MP5" draw:layer="backgroundobjects" svg:width="21.703cm" svg:height="21.703cm" draw:transform="rotate (-1.06447631079134) translate (25.869cm -7.61cm)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;p2" presentation:style-name="BLANK-title" draw:layer="backgroundobjects" svg:width="24.136cm" svg:height="5.419cm" svg:x="0.628cm" svg:y="0.402cm" presentation:class="title" presentation:placeholder="true" presentation:user-transformed="true">
        <draw:text-box/>
      </draw:frame>
      <draw:frame draw:name="Google Shape;11;p2" presentation:style-name="BLANK-title" draw:layer="backgroundobjects" svg:width="20.974cm" svg:height="6.333cm" svg:x="3.901cm" svg:y="7.735cm" presentation:class="title" presentation:placeholder="true" presentation:user-transformed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6.0.5.2$Linux_X86_64 LibreOffice_project/</meta:generator>
  </office:meta>
</office:document-meta>
</file>