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4000001F200000175EBA536F2003E0CFE.gif" manifest:media-type="image/gif"/>
  <manifest:file-entry manifest:full-path="Pictures/1000020100000267000004114B41D4DBDBF9D32B.png" manifest:media-type="image/png"/>
  <manifest:file-entry manifest:full-path="Pictures/10000201000000F0000000F0C7B4EB6C84C8DFD8.png" manifest:media-type="image/png"/>
  <manifest:file-entry manifest:full-path="Pictures/10000201000004E90000027CFE160EF2AD0345A3.png" manifest:media-type="image/png"/>
  <manifest:file-entry manifest:full-path="Pictures/100002010000027C0000019BB04A0DA2F4F5EF40.png" manifest:media-type="image/png"/>
  <manifest:file-entry manifest:full-path="Pictures/1000010300000320000001C4F5D0563D3527BBEA.gif" manifest:media-type="image/gif"/>
  <manifest:file-entry manifest:full-path="Pictures/100000BE00000320000001C46C7E74A4994D820F.gif" manifest:media-type="image/gif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Roboto" svg:font-family="Roboto"/>
    <style:font-face style:name="Space Grotesk" svg:font-family="'Space Grotesk'"/>
    <style:font-face style:name="Space Grotesk Light" svg:font-family="'Space Grotesk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289cm, 0cm, 1.594cm, 0cm)" draw:image-opacity="100%" style:mirror="none"/>
    </style:style>
    <style:style style:name="pr1" style:family="presentation" style:parent-style-name="BLANK-title">
      <style:graphic-properties draw:stroke="none" svg:stroke-width="0cm" draw:fill="none" draw:textarea-vertical-align="top" draw:auto-grow-height="true" draw:fit-to-size="false" style:shrink-to-fit="false" fo:min-height="2.386cm" fo:padding-top="0cm" fo:padding-bottom="0cm" fo:padding-left="0cm" fo:padding-right="0cm" fo:wrap-option="wrap"/>
    </style:style>
    <style:style style:name="pr2" style:family="presentation" style:parent-style-name="BLANK-title">
      <style:graphic-properties draw:stroke="none" svg:stroke-width="0cm" draw:fill="none" draw:textarea-vertical-align="bottom" draw:auto-grow-height="false" draw:fit-to-size="false" style:shrink-to-fit="false" fo:min-height="2.386cm" fo:padding-top="0cm" fo:padding-bottom="0cm" fo:padding-left="0cm" fo:padding-right="0cm" fo:wrap-option="wrap"/>
    </style:style>
    <style:style style:name="pr3" style:family="presentation" style:parent-style-name="BLANK-subtitle">
      <style:graphic-properties draw:stroke="none" svg:stroke-width="0cm" draw:fill="none" draw:fill-color="#ffffff" draw:textarea-vertical-align="top" draw:auto-grow-height="true" draw:fit-to-size="false" style:shrink-to-fit="false" fo:min-height="8.287cm" fo:padding-top="0cm" fo:padding-bottom="0cm" fo:padding-left="0cm" fo:padding-right="0cm" fo:wrap-option="wrap"/>
    </style:style>
    <style:style style:name="pr4" style:family="presentation" style:parent-style-name="BLANK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BLANK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BLANK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BLANK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BLANK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BLANK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BLANK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BLANK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BLANK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BLANK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BLANK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BLANK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BLANK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BLANK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85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64pt"/>
    </style:style>
    <style:style style:name="P3" style:family="paragraph">
      <style:paragraph-properties fo:margin-left="0cm" fo:margin-right="0cm" fo:margin-top="0cm" fo:margin-bottom="0cm" fo:line-height="85%" fo:text-align="end" fo:text-indent="0cm" style:writing-mode="lr-tb">
        <style:tab-stops>
          <style:tab-stop style:position="0cm"/>
        </style:tab-stops>
      </style:paragraph-properties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P11" style:family="paragraph">
      <style:paragraph-properties fo:margin-left="0cm" fo:margin-right="0cm" fo:margin-top="0cm" fo:margin-bottom="0cm" fo:line-height="200%" fo:text-align="start" fo:text-indent="0cm" style:writing-mode="lr-tb"/>
    </style:style>
    <style:style style:name="T1" style:family="text">
      <style:text-properties fo:font-variant="normal" fo:text-transform="none" fo:color="#81f5ff" style:text-line-through-style="none" style:text-line-through-type="none" style:text-position="0% 100%" style:font-name="Space Grotesk Light" fo:font-size="64pt" fo:letter-spacing="normal" fo:font-style="normal" style:text-underline-style="none" fo:font-weight="normal" style:font-name-asian="Space Grotesk Light" style:font-size-asian="64pt" style:font-style-asian="normal" style:font-weight-asian="normal" style:font-name-complex="Space Grotesk Light" style:font-size-complex="64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Space Grotesk Light" fo:font-size="64pt" fo:letter-spacing="normal" fo:font-style="normal" style:text-underline-style="none" fo:font-weight="normal" style:font-name-asian="Space Grotesk Light" style:font-size-asian="64pt" style:font-style-asian="normal" style:font-weight-asian="normal" style:font-name-complex="Space Grotesk Light" style:font-size-complex="64pt" style:font-style-complex="normal" style:font-weight-complex="normal"/>
    </style:style>
    <style:style style:name="T3" style:family="text">
      <style:text-properties fo:font-variant="normal" fo:text-transform="none" fo:color="#81f5ff" style:text-line-through-style="none" style:text-line-through-type="none" style:text-position="0% 100%" style:font-name="Roboto" fo:font-size="24pt" fo:letter-spacing="normal" fo:font-style="normal" style:text-underline-style="none" fo:font-weight="normal" style:font-name-asian="Roboto" style:font-size-asian="24pt" style:font-style-asian="normal" style:font-weight-asian="normal" style:font-name-complex="Roboto" style:font-size-complex="24pt" style:font-style-complex="normal" style:font-weight-complex="normal"/>
    </style:style>
    <style:style style:name="T4" style:family="text">
      <style:text-properties fo:font-variant="normal" fo:text-transform="none" fo:color="#81f5ff" style:text-line-through-style="none" style:text-line-through-type="none" style:text-position="0% 100%" style:font-name="Roboto" fo:font-size="17pt" fo:letter-spacing="normal" fo:font-style="normal" style:text-underline-style="none" fo:font-weight="normal" style:font-name-asian="Roboto" style:font-size-asian="17pt" style:font-style-asian="normal" style:font-weight-asian="normal" style:font-name-complex="Roboto" style:font-size-complex="17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Space Grotesk" fo:font-size="22pt" fo:letter-spacing="normal" fo:font-style="normal" style:text-underline-style="none" fo:font-weight="normal" style:font-name-asian="Space Grotesk" style:font-size-asian="22pt" style:font-style-asian="normal" style:font-weight-asian="normal" style:font-name-complex="Space Grotesk" style:font-size-complex="22pt" style:font-style-complex="normal" style:font-weight-complex="normal"/>
    </style:style>
    <style:style style:name="T6" style:family="text">
      <style:text-properties fo:font-variant="normal" fo:text-transform="none" fo:color="#81f5ff" style:text-line-through-style="none" style:text-line-through-type="none" style:text-position="0% 100%" style:font-name="Space Grotesk Light" fo:font-size="41pt" fo:letter-spacing="normal" fo:font-style="normal" style:text-underline-style="none" fo:font-weight="normal" style:font-name-asian="Space Grotesk Light" style:font-size-asian="41pt" style:font-style-asian="normal" style:font-weight-asian="normal" style:font-name-complex="Space Grotesk Light" style:font-size-complex="41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Roboto" fo:font-size="10pt" fo:letter-spacing="normal" fo:font-style="normal" style:text-underline-style="none" fo:font-weight="normal" style:font-name-asian="Roboto" style:font-size-asian="10pt" style:font-style-asian="normal" style:font-weight-asian="normal" style:font-name-complex="Roboto" style:font-size-complex="10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Space Grotesk Light" fo:font-size="52pt" fo:letter-spacing="normal" fo:font-style="normal" style:text-underline-style="none" fo:font-weight="normal" style:font-name-asian="Space Grotesk Light" style:font-size-asian="52pt" style:font-style-asian="normal" style:font-weight-asian="normal" style:font-name-complex="Space Grotesk Light" style:font-size-complex="52pt" style:font-style-complex="normal" style:font-weight-complex="normal"/>
    </style:style>
    <style:style style:name="T9" style:family="text">
      <style:text-properties fo:font-variant="normal" fo:text-transform="none" fo:color="#81f5ff" style:text-line-through-style="none" style:text-line-through-type="none" style:text-position="0% 100%" style:font-name="Space Grotesk" fo:font-size="24pt" fo:letter-spacing="normal" fo:font-style="normal" style:text-underline-style="none" fo:font-weight="normal" style:font-name-asian="Space Grotesk" style:font-size-asian="24pt" style:font-style-asian="normal" style:font-weight-asian="normal" style:font-name-complex="Space Grotesk" style:font-size-complex="24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Space Grotesk" fo:font-size="37pt" fo:letter-spacing="normal" fo:font-style="normal" style:text-underline-style="none" fo:font-weight="bold" style:font-name-asian="Space Grotesk" style:font-size-asian="37pt" style:font-style-asian="normal" style:font-weight-asian="bold" style:font-name-complex="Space Grotesk" style:font-size-complex="37pt" style:font-style-complex="normal" style:font-weight-complex="bold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Space Grotesk Light" fo:font-size="30pt" fo:letter-spacing="normal" fo:font-style="normal" style:text-underline-style="none" fo:font-weight="normal" style:font-name-asian="Space Grotesk Light" style:font-size-asian="30pt" style:font-style-asian="normal" style:font-weight-asian="normal" style:font-name-complex="Space Grotesk Light" style:font-size-complex="30pt" style:font-style-complex="normal" style:font-weight-complex="normal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Space Grotesk Light" fo:font-size="57pt" fo:letter-spacing="normal" fo:font-style="normal" style:text-underline-style="none" fo:font-weight="normal" style:font-name-asian="Space Grotesk Light" style:font-size-asian="57pt" style:font-style-asian="normal" style:font-weight-asian="normal" style:font-name-complex="Space Grotesk Light" style:font-size-complex="57pt" style:font-style-complex="normal" style:font-weight-complex="normal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Space Grotesk Light" fo:font-size="56pt" fo:letter-spacing="normal" fo:font-style="normal" style:text-underline-style="none" fo:font-weight="normal" style:font-name-asian="Space Grotesk Light" style:font-size-asian="56pt" style:font-style-asian="normal" style:font-weight-asian="normal" style:font-name-complex="Space Grotesk Light" style:font-size-complex="56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❏">
        <style:list-level-properties text:space-before="0.248cm" text:min-label-width="1.022cm"/>
        <style:text-properties style:font-name="Space Grotesk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❏">
        <style:list-level-properties text:space-before="0.248cm" text:min-label-width="1.022cm"/>
        <style:text-properties style:font-name="Space Grotesk" fo:color="#ffffff" fo:font-size="100%"/>
      </text:list-level-style-bullet>
      <text:list-level-style-bullet text:level="2" text:bullet-char="❏">
        <style:list-level-properties text:space-before="1.518cm" text:min-label-width="1.022cm"/>
        <style:text-properties style:font-name="Space Grotesk" fo:color="#ffffff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248cm" text:min-label-width="1.02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❏">
        <style:list-level-properties text:space-before="0.248cm" text:min-label-width="1.022cm"/>
        <style:text-properties style:font-name="Space Grotesk" fo:color="#ffffff" fo:font-size="100%"/>
      </text:list-level-style-bullet>
      <text:list-level-style-bullet text:level="2" text:bullet-char="❏">
        <style:list-level-properties text:space-before="2.788cm" text:min-label-width="1.022cm"/>
        <style:text-properties style:font-name="Space Grotesk" fo:color="#ffffff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248cm" text:min-label-width="1.022cm"/>
        <style:text-properties fo:color="#000000" fo:font-size="100%"/>
      </text:list-level-style-number>
      <text:list-level-style-bullet text:level="2" text:bullet-char="❏">
        <style:list-level-properties text:space-before="2.788cm" text:min-label-width="1.022cm"/>
        <style:text-properties style:font-name="Space Grotesk" fo:color="#ffffff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he Brewing Game" draw:style-name="dp1" draw:master-page-name="BLANK">
        <draw:frame draw:name="Google Shape;319;p38" presentation:style-name="pr1" draw:text-style-name="P2" draw:layer="layout" svg:width="24.136cm" svg:height="2.386cm" svg:x="0.628cm" svg:y="0.402cm" presentation:class="title" presentation:user-transformed="true">
          <draw:text-box>
            <text:p text:style-name="P1"><text:span text:style-name="T1">Sprint Review 7</text:span></text:p>
          </draw:text-box>
        </draw:frame>
        <draw:frame draw:name="Google Shape;320;p38" presentation:style-name="pr2" draw:text-style-name="P2" draw:layer="layout" svg:width="20.974cm" svg:height="6.333cm" svg:x="3.79cm" svg:y="7.789cm" presentation:class="title" presentation:user-transformed="true">
          <draw:text-box>
            <text:p text:style-name="P3"><text:span text:style-name="T2">The Brewing Game</text:span></text:p>
          </draw:text-box>
        </draw:frame>
        <draw:frame draw:name="Google Shape;321;p38" presentation:style-name="pr3" draw:text-style-name="P5" draw:layer="layout" svg:width="14.187cm" svg:height="8.287cm" svg:x="0.628cm" svg:y="6.306cm" presentation:class="subtitle" presentation:user-transformed="true">
          <draw:text-box>
            <text:p text:style-name="P4"><text:span text:style-name="T3">27th February 2026</text:span><text:span text:style-name="T3"><text:line-break/></text:span><text:span text:style-name="T4">Gracjan Blazejowski</text:span></text:p>
            <text:p text:style-name="P4"><text:span text:style-name="T4">Bruce Gray</text:span></text:p>
            <text:p text:style-name="P4"><text:span text:style-name="T4">Marta Grazia</text:span></text:p>
            <text:p text:style-name="P4"><text:span text:style-name="T4">Sergio Eneide</text:span></text:p>
            <text:p text:style-name="P4"><text:span text:style-name="T4">Aaron Stevens</text:span></text:p>
          </draw:text-box>
        </draw:frame>
        <presentation:notes draw:style-name="dp2">
          <draw:page-thumbnail draw:name="Google Shape;316;g3c2cabe9ccb_0_0:notes" draw:style-name="gr1" draw:layer="layout" svg:width="16.932cm" svg:height="9.524cm" svg:x="1.059cm" svg:y="1.905cm" draw:page-number="1" presentation:class="page"/>
          <draw:frame draw:name="Google Shape;317;g3c2cabe9ccb_0_0:notes" presentation:style-name="pr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print work" draw:style-name="dp1" draw:master-page-name="BLANK">
        <draw:frame draw:name="Google Shape;326;p39" presentation:style-name="pr1" draw:text-style-name="P2" draw:layer="layout" svg:width="24.136cm" svg:height="2.386cm" svg:x="0.628cm" svg:y="0.402cm" presentation:class="title" presentation:user-transformed="true">
          <draw:text-box>
            <text:p text:style-name="P1"><text:span text:style-name="T1">Sprint work</text:span></text:p>
          </draw:text-box>
        </draw:frame>
        <draw:frame draw:name="Google Shape;327;p39" presentation:style-name="pr3" draw:text-style-name="P5" draw:layer="layout" svg:width="5.227cm" svg:height="8.287cm" svg:x="19.537cm" svg:y="12.631cm" presentation:class="subtitle" presentation:user-transformed="true">
          <draw:text-box>
            <text:p text:style-name="P4"><text:span text:style-name="T3">Marta Grazia</text:span></text:p>
          </draw:text-box>
        </draw:frame>
        <draw:custom-shape draw:name="Google Shape;328;p39" draw:style-name="gr2" draw:text-style-name="P8" draw:layer="layout" svg:width="16.4cm" svg:height="10.574cm" svg:x="4.322cm" svg:y="2.43cm">
          <text:p text:style-name="P7"><text:span text:style-name="T5"/></text:p>
          <text:list text:style-name="L4">
            <text:list-item>
              <text:p text:style-name="P4"><text:span text:style-name="T5">Reassess roadmap</text:span></text:p>
            </text:list-item>
            <text:list-item>
              <text:p text:style-name="P4"><text:span text:style-name="T5">Accessibility features</text:span></text:p>
            </text:list-item>
            <text:list-item>
              <text:p text:style-name="P4"><text:span text:style-name="T5">Tutorial + Text To Speech</text:span></text:p>
            </text:list-item>
            <text:list-item>
              <text:p text:style-name="P4"><text:span text:style-name="T5">Instrument Shop System</text:span></text:p>
            </text:list-item>
            <text:list-item>
              <text:p text:style-name="P4"><text:span text:style-name="T5">UI Bug Fixes and improvements</text:span></text:p>
            </text:list-item>
            <text:list-item>
              <text:p text:style-name="P4"><text:span text:style-name="T5">Basic Game Loop consolidation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23;g3c7e6a59d7c_0_26:notes" draw:style-name="gr1" draw:layer="layout" svg:width="16.932cm" svg:height="9.524cm" svg:x="1.059cm" svg:y="1.905cm" draw:page-number="2" presentation:class="page"/>
          <draw:frame draw:name="Google Shape;324;g3c7e6a59d7c_0_26:notes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dded&#10;Tabbing Navigation and Selection Feedback&#10;" draw:style-name="dp1" draw:master-page-name="BLANK">
        <draw:frame draw:name="Google Shape;333;p40" presentation:style-name="pr1" draw:text-style-name="P2" draw:layer="layout" svg:width="24.913cm" svg:height="6.158cm" svg:x="0.632cm" svg:y="0.388cm" presentation:class="title" presentation:user-transformed="true">
          <draw:text-box>
            <text:p text:style-name="P1"><text:span text:style-name="T6">Added</text:span><text:span text:style-name="T6"><text:line-break/></text:span><text:span text:style-name="T6">Tabbing Navigation and Selection Feedback</text:span><text:span text:style-name="T6"><text:line-break/></text:span><text:span text:style-name="T6"/></text:p>
          </draw:text-box>
        </draw:frame>
        <draw:frame draw:name="Google Shape;334;p40" presentation:style-name="pr3" draw:text-style-name="P5" draw:layer="layout" svg:width="5.162cm" svg:height="8.287cm" svg:x="19.683cm" svg:y="12.605cm" presentation:class="subtitle" presentation:user-transformed="true">
          <draw:text-box>
            <text:p text:style-name="P4"><text:span text:style-name="T3">Marta Grazia</text:span></text:p>
          </draw:text-box>
        </draw:frame>
        <draw:custom-shape draw:name="Google Shape;335;p40" draw:style-name="gr2" draw:text-style-name="P8" draw:layer="layout" svg:width="15.724cm" svg:height="7.326cm" svg:x="3.809cm" svg:y="5.453cm">
          <text:list text:style-name="L4">
            <text:list-item>
              <text:p text:style-name="P9"><text:span text:style-name="T5">Additional way to interact with the game</text:span></text:p>
            </text:list-item>
            <text:list-item>
              <text:p text:style-name="P9"><text:span text:style-name="T5">Quality Of Life Additions</text:span></text:p>
            </text:list-item>
          </text:list>
          <text:list text:style-name="L5">
            <text:list-item>
              <text:list>
                <text:list-item>
                  <text:p text:style-name="P9"><text:span text:style-name="T5">Selection feedback</text:span></text:p>
                </text:list-item>
                <text:list-item>
                  <text:p text:style-name="P9"><text:span text:style-name="T5">Active/Inactive HUD</text:span></text:p>
                </text:list-item>
                <text:list-item>
                  <text:p text:style-name="P9"><text:span text:style-name="T5">Changed Hover Highlight color</text:span></text:p>
                </text:list-item>
                <text:list-item>
                  <text:p text:style-name="P9"><text:span text:style-name="T5">UI Improvements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30;g3c2cabe9ccb_0_343:notes" draw:style-name="gr1" draw:layer="layout" svg:width="16.932cm" svg:height="9.524cm" svg:x="1.059cm" svg:y="1.905cm" draw:page-number="3" presentation:class="page"/>
          <draw:frame draw:name="Google Shape;331;g3c2cabe9ccb_0_343:notes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dded&#10;Tabbing Navigation and Selection Feedback&#10;" draw:style-name="dp1" draw:master-page-name="BLANK">
        <draw:frame draw:name="Google Shape;340;p41" presentation:style-name="pr1" draw:text-style-name="P2" draw:layer="layout" svg:width="25.758cm" svg:height="6.158cm" svg:x="0.632cm" svg:y="0.388cm" presentation:class="title" presentation:user-transformed="true">
          <draw:text-box>
            <text:p text:style-name="P1"><text:span text:style-name="T6">Added</text:span><text:span text:style-name="T6"><text:line-break/></text:span><text:span text:style-name="T6">Tabbing Navigation and Selection Feedback</text:span><text:span text:style-name="T6"><text:line-break/></text:span><text:span text:style-name="T6"/></text:p>
          </draw:text-box>
        </draw:frame>
        <draw:frame draw:name="Google Shape;341;p41" presentation:style-name="pr3" draw:text-style-name="P5" draw:layer="layout" svg:width="5.162cm" svg:height="8.287cm" svg:x="19.683cm" svg:y="12.605cm" presentation:class="subtitle" presentation:user-transformed="true">
          <draw:text-box>
            <text:p text:style-name="P4"><text:span text:style-name="T3">Marta Grazia</text:span></text:p>
          </draw:text-box>
        </draw:frame>
        <draw:frame draw:name="Google Shape;342;p41" draw:style-name="gr3" draw:text-style-name="P10" draw:layer="layout" svg:width="8.662cm" svg:height="4.894cm" svg:x="2.333cm" svg:y="5.331cm">
          <draw:image xlink:href="Pictures/100000BE00000320000001C46C7E74A4994D820F.gif" xlink:type="simple" xlink:show="embed" xlink:actuate="onLoad">
            <text:p/>
          </draw:image>
        </draw:frame>
        <draw:custom-shape draw:name="Google Shape;343;p41" draw:style-name="gr2" draw:text-style-name="P8" draw:layer="layout" svg:width="7.77cm" svg:height="0.8cm" svg:x="2.779cm" svg:y="10.225cm">
          <text:p text:style-name="P4"><text:span text:style-name="T7">Input Feedback integration + Quality of lif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44;p41" draw:style-name="gr3" draw:text-style-name="P10" draw:layer="layout" svg:width="8.662cm" svg:height="4.894cm" svg:x="12.043cm" svg:y="5.331cm">
          <draw:image xlink:href="Pictures/1000010300000320000001C4F5D0563D3527BBEA.gif" xlink:type="simple" xlink:show="embed" xlink:actuate="onLoad">
            <text:p/>
          </draw:image>
        </draw:frame>
        <draw:custom-shape draw:name="Google Shape;345;p41" draw:style-name="gr2" draw:text-style-name="P8" draw:layer="layout" svg:width="3.647cm" svg:height="0.8cm" svg:x="14.55cm" svg:y="10.225cm">
          <text:p text:style-name="P4"><text:span text:style-name="T7">Keyboard Control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37;g3bf26b3b2ea_0_2:notes" draw:style-name="gr1" draw:layer="layout" svg:width="16.932cm" svg:height="9.524cm" svg:x="1.059cm" svg:y="1.905cm" draw:page-number="4" presentation:class="page"/>
          <draw:frame draw:name="Google Shape;338;g3bf26b3b2ea_0_2:notes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mplementing Instruments Shop UI" draw:style-name="dp1" draw:master-page-name="BLANK">
        <draw:frame draw:name="Google Shape;350;p42" presentation:style-name="pr1" draw:text-style-name="P2" draw:layer="layout" svg:width="24.142cm" svg:height="3.741cm" svg:x="0.629cm" svg:y="0.5cm" presentation:class="title" presentation:user-transformed="true">
          <draw:text-box>
            <text:p text:style-name="P1"><text:span text:style-name="T8">Implementing Instruments Shop UI</text:span></text:p>
          </draw:text-box>
        </draw:frame>
        <draw:custom-shape draw:name="Google Shape;351;p42" draw:style-name="gr4" draw:text-style-name="P8" draw:layer="layout" svg:width="8.157cm" svg:height="1.017cm" svg:x="16.613cm" svg:y="12.634cm">
          <text:p text:style-name="P4"><text:span text:style-name="T9">Gracjan Blazejowsk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2;p42" draw:style-name="gr2" draw:text-style-name="P8" draw:layer="layout" svg:width="11.9cm" svg:height="3.389cm" svg:x="0.799cm" svg:y="4.456cm">
          <text:list text:style-name="L4">
            <text:list-item>
              <text:p text:style-name="P9"><text:span text:style-name="T5">Initial UI Shop Design</text:span></text:p>
            </text:list-item>
            <text:list-item>
              <text:p text:style-name="P9"><text:span text:style-name="T5">Font size unifying script</text:span></text:p>
            </text:list-item>
            <text:list-item>
              <text:p text:style-name="P9"><text:span text:style-name="T5">New class: ShopItem</text:span></text:p>
            </text:list-item>
          </text:list>
          <text:p text:style-name="P4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53;p42" draw:style-name="gr3" draw:text-style-name="P10" draw:layer="layout" svg:width="11.969cm" svg:height="7.735cm" svg:x="12.7cm" svg:y="2.798cm">
          <draw:image xlink:href="Pictures/100002010000027C0000019BB04A0DA2F4F5EF40.png" xlink:type="simple" xlink:show="embed" xlink:actuate="onLoad">
            <text:p/>
          </draw:image>
        </draw:frame>
        <draw:frame draw:name="Google Shape;354;p42" draw:style-name="gr3" draw:text-style-name="P10" draw:layer="layout" svg:width="10.775cm" svg:height="5.451cm" svg:x="1.526cm" svg:y="8.375cm">
          <draw:image xlink:href="Pictures/10000201000004E90000027CFE160EF2AD0345A3.png" xlink:type="simple" xlink:show="embed" xlink:actuate="onLoad">
            <text:p/>
          </draw:image>
        </draw:frame>
        <presentation:notes draw:style-name="dp2">
          <draw:page-thumbnail draw:name="Google Shape;347;g3c2cabe9ccb_0_365:notes" draw:style-name="gr1" draw:layer="layout" svg:width="16.932cm" svg:height="9.524cm" svg:x="1.059cm" svg:y="1.905cm" draw:page-number="5" presentation:class="page"/>
          <draw:frame draw:name="Google Shape;348;g3c2cabe9ccb_0_365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blems:" draw:style-name="dp1" draw:master-page-name="BLANK">
        <draw:frame draw:name="Google Shape;359;p43" presentation:style-name="pr1" draw:text-style-name="P2" draw:layer="layout" svg:width="24.142cm" svg:height="2.386cm" svg:x="0.629cm" svg:y="0.5cm" presentation:class="title" presentation:user-transformed="true">
          <draw:text-box>
            <text:p text:style-name="P1"><text:span text:style-name="T8">UI Bug Fixes</text:span></text:p>
          </draw:text-box>
        </draw:frame>
        <draw:custom-shape draw:name="Google Shape;360;p43" draw:style-name="gr4" draw:text-style-name="P8" draw:layer="layout" svg:width="8.157cm" svg:height="1.017cm" svg:x="16.613cm" svg:y="12.634cm">
          <text:p text:style-name="P4"><text:span text:style-name="T9">Gracjan Blazejowsk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1;p43" draw:style-name="gr2" draw:text-style-name="P8" draw:layer="layout" svg:width="16.4cm" svg:height="7.326cm" svg:x="1.282cm" svg:y="4.656cm">
          <text:list text:style-name="L4">
            <text:list-item>
              <text:p text:style-name="P9"><text:span text:style-name="T5">You could click on Mash Tuns through the UI; UI did not stop raytracing</text:span></text:p>
            </text:list-item>
          </text:list>
          <text:p text:style-name="P7"><text:span text:style-name="T5"/></text:p>
          <text:list text:continue-numbering="true" text:style-name="L4">
            <text:list-item>
              <text:p text:style-name="P4"><text:span text:style-name="T5">One class handled 3 separate </text:span></text:p>
            </text:list-item>
          </text:list>
          <text:p text:style-name="P7"><text:span text:style-name="T5">responsibilities</text:span></text:p>
          <text:p text:style-name="P4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62;p43" presentation:style-name="pr1" draw:text-style-name="P2" draw:layer="layout" svg:width="24.142cm" svg:height="2.386cm" svg:x="0.629cm" svg:y="3.312cm" presentation:class="title" presentation:user-transformed="true">
          <draw:text-box>
            <text:p text:style-name="P1"><text:span text:style-name="T10">Problems:</text:span></text:p>
          </draw:text-box>
        </draw:frame>
        <presentation:notes draw:style-name="dp2">
          <draw:page-thumbnail draw:name="Google Shape;356;g3cb9937ebcd_0_14:notes" draw:style-name="gr1" draw:layer="layout" svg:width="16.932cm" svg:height="9.524cm" svg:x="1.059cm" svg:y="1.905cm" draw:page-number="6" presentation:class="page"/>
          <draw:frame draw:name="Google Shape;357;g3cb9937ebcd_0_14:notes" presentation:style-name="pr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I Bug Fixes - Code refactor" draw:style-name="dp1" draw:master-page-name="BLANK">
        <draw:frame draw:name="Google Shape;367;p44" presentation:style-name="pr1" draw:text-style-name="P2" draw:layer="layout" svg:width="24.142cm" svg:height="2.386cm" svg:x="0.629cm" svg:y="0.5cm" presentation:class="title" presentation:user-transformed="true">
          <draw:text-box>
            <text:p text:style-name="P1"><text:span text:style-name="T8">UI Bug Fixes - Code refactor</text:span></text:p>
          </draw:text-box>
        </draw:frame>
        <draw:custom-shape draw:name="Google Shape;368;p44" draw:style-name="gr4" draw:text-style-name="P8" draw:layer="layout" svg:width="8.157cm" svg:height="1.017cm" svg:x="16.613cm" svg:y="12.634cm">
          <text:p text:style-name="P4"><text:span text:style-name="T9">Gracjan Blazejowsk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9;p44" draw:style-name="gr2" draw:text-style-name="P8" draw:layer="layout" svg:width="16.4cm" svg:height="7.326cm" svg:x="0.726cm" svg:y="4.648cm">
          <text:list text:style-name="L4">
            <text:list-item>
              <text:p text:style-name="P9"><text:span text:style-name="T5">Changed the method for detecting mouse clicks; IPointerClickHandler</text:span></text:p>
            </text:list-item>
          </text:list>
          <text:p text:style-name="P7"><text:span text:style-name="T5"/></text:p>
          <text:list text:continue-numbering="true" text:style-name="L4">
            <text:list-item>
              <text:p text:style-name="P4"><text:span text:style-name="T5">Split the responsibilities across multiple classes</text:span></text:p>
            </text:list-item>
          </text:list>
          <text:p text:style-name="P4"><text:span text:style-name="T5"/></text:p>
          <text:p text:style-name="P4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64;g3cba006d3dd_0_1:notes" draw:style-name="gr1" draw:layer="layout" svg:width="16.932cm" svg:height="9.524cm" svg:x="1.059cm" svg:y="1.905cm" draw:page-number="7" presentation:class="page"/>
          <draw:frame draw:name="Google Shape;365;g3cba006d3dd_0_1:notes" presentation:style-name="pr1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mplementing Instruments Shop System" draw:style-name="dp1" draw:master-page-name="BLANK">
        <draw:frame draw:name="Google Shape;374;p45" presentation:style-name="pr1" draw:text-style-name="P2" draw:layer="layout" svg:width="24.142cm" svg:height="3.741cm" svg:x="0.629cm" svg:y="0.5cm" presentation:class="title" presentation:user-transformed="true">
          <draw:text-box>
            <text:p text:style-name="P1"><text:span text:style-name="T8">Implementing Instruments Shop System</text:span></text:p>
          </draw:text-box>
        </draw:frame>
        <draw:custom-shape draw:name="Google Shape;375;p45" draw:style-name="gr2" draw:text-style-name="P8" draw:layer="layout" svg:width="16.4cm" svg:height="7.326cm" svg:x="5.544cm" svg:y="4.611cm">
          <text:list text:style-name="L4">
            <text:list-item>
              <text:p text:style-name="P9"><text:span text:style-name="T5">UML Diagram</text:span></text:p>
            </text:list-item>
            <text:list-item>
              <text:p text:style-name="P9"><text:span text:style-name="T5">Small Scale Shop Logic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76;p45" presentation:style-name="pr3" draw:text-style-name="P5" draw:layer="layout" svg:width="5.227cm" svg:height="8.287cm" svg:x="19.544cm" svg:y="12.631cm" presentation:class="subtitle" presentation:user-transformed="true">
          <draw:text-box>
            <text:p text:style-name="P4"><text:span text:style-name="T3">Marta Grazia</text:span></text:p>
          </draw:text-box>
        </draw:frame>
        <presentation:notes draw:style-name="dp2">
          <draw:page-thumbnail draw:name="Google Shape;371;g3cb9937ebcd_0_8:notes" draw:style-name="gr1" draw:layer="layout" svg:width="16.932cm" svg:height="9.524cm" svg:x="1.059cm" svg:y="1.905cm" draw:page-number="8" presentation:class="page"/>
          <draw:frame draw:name="Google Shape;372;g3cb9937ebcd_0_8:notes" presentation:style-name="pr1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ame loop - getting closer to the MVP" draw:style-name="dp1" draw:master-page-name="BLANK">
        <draw:frame draw:name="Google Shape;381;p46" presentation:style-name="pr1" draw:text-style-name="P2" draw:layer="layout" svg:width="24.142cm" svg:height="3.741cm" svg:x="0.629cm" svg:y="0.5cm" presentation:class="title" presentation:user-transformed="true">
          <draw:text-box>
            <text:p text:style-name="P1"><text:span text:style-name="T8">Game loop - getting closer to the MVP</text:span></text:p>
          </draw:text-box>
        </draw:frame>
        <draw:custom-shape draw:name="Google Shape;382;p46" draw:style-name="gr2" draw:text-style-name="P8" draw:layer="layout" svg:width="16.4cm" svg:height="7.326cm" svg:x="5.544cm" svg:y="4.611cm">
          <text:list text:style-name="L4">
            <text:list-item>
              <text:p text:style-name="P9"><text:span text:style-name="T5">Added Win Conditions</text:span></text:p>
            </text:list-item>
            <text:list-item>
              <text:p text:style-name="P9"><text:span text:style-name="T5">Changed values for tolerance and fill rate</text:span></text:p>
            </text:list-item>
            <text:list-item>
              <text:p text:style-name="P9"><text:span text:style-name="T5">Polished UI</text:span></text:p>
            </text:list-item>
          </text:list>
          <text:list text:style-name="L7">
            <text:list-item>
              <text:list>
                <text:list-item>
                  <text:p text:style-name="P9"><text:span text:style-name="T5">Input feedback</text:span></text:p>
                </text:list-item>
                <text:list-item>
                  <text:p text:style-name="P9"><text:span text:style-name="T5">Interaction feedback</text:span></text:p>
                </text:list-item>
              </text:list>
            </text:list-item>
          </text:list>
          <text:p text:style-name="P4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83;p46" presentation:style-name="pr3" draw:text-style-name="P5" draw:layer="layout" svg:width="5.227cm" svg:height="8.287cm" svg:x="19.544cm" svg:y="12.631cm" presentation:class="subtitle" presentation:user-transformed="true">
          <draw:text-box>
            <text:p text:style-name="P4"><text:span text:style-name="T3">Marta Grazia</text:span></text:p>
          </draw:text-box>
        </draw:frame>
        <presentation:notes draw:style-name="dp2">
          <draw:page-thumbnail draw:name="Google Shape;378;g3cb9937ebcd_0_21:notes" draw:style-name="gr1" draw:layer="layout" svg:width="16.932cm" svg:height="9.524cm" svg:x="1.059cm" svg:y="1.905cm" draw:page-number="9" presentation:class="page"/>
          <draw:frame draw:name="Google Shape;379;g3cb9937ebcd_0_21:notes" presentation:style-name="pr1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etting closer to MVP…" draw:style-name="dp1" draw:master-page-name="BLANK">
        <draw:frame draw:name="Google Shape;388;p47" presentation:style-name="pr1" draw:text-style-name="P2" draw:layer="layout" svg:width="26.959cm" svg:height="2.386cm" svg:x="0.629cm" svg:y="0.5cm" presentation:class="title" presentation:user-transformed="true">
          <draw:text-box>
            <text:p text:style-name="P1"><text:span text:style-name="T11">Getting closer to MVP…</text:span></text:p>
          </draw:text-box>
        </draw:frame>
        <draw:frame draw:name="Google Shape;389;p47" draw:style-name="gr3" draw:text-style-name="P10" xml:id="id1" draw:id="id1" draw:layer="layout" svg:width="16.371cm" svg:height="12.278cm" svg:x="4.514cm" svg:y="1.59cm">
          <draw:image xlink:href="Pictures/10000201000000F0000000F0C7B4EB6C84C8DFD8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smil:attributeName="visibility" smil:to="visible"/>
                  <anim:transitionFilter smil:dur="1s" smil:targetElement="id1" smil:type="fade" smil:subtype="crossfade"/>
                </anim:par>
              </anim:par>
            </anim:par>
          </anim:seq>
        </anim:par>
        <presentation:notes draw:style-name="dp2">
          <draw:page-thumbnail draw:name="Google Shape;385;g3cb9937ebcd_0_27:notes" draw:style-name="gr1" draw:layer="layout" svg:width="16.932cm" svg:height="9.524cm" svg:x="1.059cm" svg:y="1.905cm" draw:page-number="10" presentation:class="page"/>
          <draw:frame draw:name="Google Shape;386;g3cb9937ebcd_0_27:notes" presentation:style-name="pr1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went well" draw:style-name="dp1" draw:master-page-name="BLANK">
        <draw:frame draw:name="Google Shape;394;p48" presentation:style-name="pr1" draw:text-style-name="P2" draw:layer="layout" svg:width="24.136cm" svg:height="2.386cm" svg:x="0.628cm" svg:y="0.402cm" presentation:class="title" presentation:user-transformed="true">
          <draw:text-box>
            <text:p text:style-name="P1"><text:span text:style-name="T12">What went well</text:span></text:p>
          </draw:text-box>
        </draw:frame>
        <draw:custom-shape draw:name="Google Shape;395;p48" draw:style-name="gr2" draw:text-style-name="P8" draw:layer="layout" svg:width="16.4cm" svg:height="7.326cm" svg:x="1.388cm" svg:y="3.879cm">
          <text:list text:style-name="L4">
            <text:list-item>
              <text:p text:style-name="P9"><text:span text:style-name="T5">Referring back to the SRS document we met most of the requirements</text:span></text:p>
            </text:list-item>
            <text:list-item>
              <text:p text:style-name="P9"><text:span text:style-name="T5">Team Communication is excellent</text:span></text:p>
            </text:list-item>
            <text:list-item>
              <text:p text:style-name="P9"><text:span text:style-name="T5">Feedback from client and users</text:span></text:p>
            </text:list-item>
            <text:list-item>
              <text:p text:style-name="P9"><text:span text:style-name="T5">Getting closer to the MVP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96;p48" draw:style-name="gr3" draw:text-style-name="P10" draw:layer="layout" svg:width="7.735cm" svg:height="13.094cm" svg:x="17.338cm" svg:y="1.094cm">
          <draw:image xlink:href="Pictures/1000020100000267000004114B41D4DBDBF9D32B.png" xlink:type="simple" xlink:show="embed" xlink:actuate="onLoad">
            <text:p/>
          </draw:image>
        </draw:frame>
        <presentation:notes draw:style-name="dp2">
          <draw:page-thumbnail draw:name="Google Shape;391;g3cb9937ebcd_0_37:notes" draw:style-name="gr1" draw:layer="layout" svg:width="16.932cm" svg:height="9.524cm" svg:x="1.059cm" svg:y="1.905cm" draw:page-number="11" presentation:class="page"/>
          <draw:frame draw:name="Google Shape;392;g3cb9937ebcd_0_37:notes" presentation:style-name="pr1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went… not so well" draw:style-name="dp1" draw:master-page-name="BLANK">
        <draw:frame draw:name="Google Shape;401;p49" presentation:style-name="pr1" draw:text-style-name="P2" draw:layer="layout" svg:width="25.635cm" svg:height="2.386cm" svg:x="0.346cm" svg:y="0.402cm" presentation:class="title" presentation:user-transformed="true">
          <draw:text-box>
            <text:p text:style-name="P1"><text:span text:style-name="T12">What went… not so well</text:span></text:p>
          </draw:text-box>
        </draw:frame>
        <draw:custom-shape draw:name="Google Shape;402;p49" draw:style-name="gr2" draw:text-style-name="P8" draw:layer="layout" svg:width="16.4cm" svg:height="7.326cm" svg:x="6.629cm" svg:y="4.667cm">
          <text:list text:style-name="L4">
            <text:list-item>
              <text:p text:style-name="P11"><text:span text:style-name="T5"><text:s text:c="5"/></text:span></text:p>
            </text:list-item>
            <text:list-item>
              <text:p text:style-name="P9"><text:span text:style-name="T5">Lack of Low Level design for certain element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03;p49" draw:style-name="gr5" draw:text-style-name="P10" draw:layer="layout" svg:width="3.874cm" svg:height="2.053cm" svg:x="8.529cm" svg:y="4.399cm">
          <draw:image xlink:href="Pictures/10000004000001F200000175EBA536F2003E0CFE.gif" xlink:type="simple" xlink:show="embed" xlink:actuate="onLoad">
            <text:p/>
          </draw:image>
        </draw:frame>
        <presentation:notes draw:style-name="dp2">
          <draw:page-thumbnail draw:name="Google Shape;398;g3cb9937ebcd_0_47:notes" draw:style-name="gr1" draw:layer="layout" svg:width="16.932cm" svg:height="9.524cm" svg:x="1.059cm" svg:y="1.905cm" draw:page-number="12" presentation:class="page"/>
          <draw:frame draw:name="Google Shape;399;g3cb9937ebcd_0_47:notes" presentation:style-name="pr1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p Next" draw:style-name="dp1" draw:master-page-name="BLANK">
        <draw:frame draw:name="Google Shape;408;p50" presentation:style-name="pr1" draw:text-style-name="P2" draw:layer="layout" svg:width="25.635cm" svg:height="2.386cm" svg:x="0.346cm" svg:y="0.402cm" presentation:class="title" presentation:user-transformed="true">
          <draw:text-box>
            <text:p text:style-name="P1"><text:span text:style-name="T12">Up Next</text:span></text:p>
          </draw:text-box>
        </draw:frame>
        <draw:custom-shape draw:name="Google Shape;409;p50" draw:style-name="gr2" draw:text-style-name="P8" draw:layer="layout" svg:width="16.4cm" svg:height="7.326cm" svg:x="6.574cm" svg:y="5.077cm">
          <text:list text:style-name="L4">
            <text:list-item>
              <text:p text:style-name="P9"><text:span text:style-name="T5">UI/UX Ethics clearance for user testing</text:span></text:p>
            </text:list-item>
            <text:list-item>
              <text:p text:style-name="P9"><text:span text:style-name="T5">Shop System completion</text:span></text:p>
            </text:list-item>
            <text:list-item>
              <text:p text:style-name="P9"><text:span text:style-name="T5">Unit and Integration Test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10;p50" presentation:style-name="pr3" draw:text-style-name="P5" draw:layer="layout" svg:width="5.227cm" svg:height="8.287cm" svg:x="18.88cm" svg:y="11.536cm" presentation:class="subtitle" presentation:user-transformed="true">
          <draw:text-box>
            <text:p text:style-name="P4"><text:span text:style-name="T3">Marta Grazia</text:span></text:p>
          </draw:text-box>
        </draw:frame>
        <presentation:notes draw:style-name="dp2">
          <draw:page-thumbnail draw:name="Google Shape;405;g3cb9937ebcd_0_57:notes" draw:style-name="gr1" draw:layer="layout" svg:width="16.932cm" svg:height="9.524cm" svg:x="1.059cm" svg:y="1.905cm" draw:page-number="13" presentation:class="page"/>
          <draw:frame draw:name="Google Shape;406;g3cb9937ebcd_0_57:notes" presentation:style-name="pr1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e Brewing Game’s Team" draw:style-name="dp1" draw:master-page-name="BLANK">
        <draw:frame draw:name="Google Shape;415;p51" presentation:style-name="pr1" draw:text-style-name="P2" draw:layer="layout" svg:width="24.136cm" svg:height="2.386cm" svg:x="0.628cm" svg:y="0.402cm" presentation:class="title" presentation:user-transformed="true">
          <draw:text-box>
            <text:p text:style-name="P1"><text:span text:style-name="T2">Thank you!</text:span></text:p>
          </draw:text-box>
        </draw:frame>
        <draw:frame draw:name="Google Shape;416;p51" presentation:style-name="pr2" draw:text-style-name="P2" draw:layer="layout" svg:width="27.658cm" svg:height="6.333cm" svg:x="-2.468cm" svg:y="7.721cm" presentation:class="title" presentation:user-transformed="true">
          <draw:text-box>
            <text:p text:style-name="P3"><text:span text:style-name="T13">The Brewing Game’s Team</text:span></text:p>
          </draw:text-box>
        </draw:frame>
        <presentation:notes draw:style-name="dp2">
          <draw:page-thumbnail draw:name="Google Shape;412;g3c2cabe9ccb_0_390:notes" draw:style-name="gr1" draw:layer="layout" svg:width="16.932cm" svg:height="9.524cm" svg:x="1.059cm" svg:y="1.905cm" draw:page-number="14" presentation:class="page"/>
          <draw:frame draw:name="Google Shape;413;g3c2cabe9ccb_0_390:notes" presentation:style-name="pr1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Roboto" svg:font-family="Roboto"/>
    <style:font-face style:name="Space Grotesk" svg:font-family="'Space Grotesk'"/>
    <style:font-face style:name="Space Grotesk Light" svg:font-family="'Space Grotesk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gradient draw:name="Gradient_20_2" draw:display-name="Gradient 2" draw:style="linear" draw:start-color="#008585" draw:end-color="#070707" draw:start-intensity="100%" draw:end-intensity="100%" draw:angle="2991" draw:border="0%"/>
    <draw:gradient draw:name="msFillGradient_20_1" draw:display-name="msFillGradient 1" draw:style="linear" draw:start-color="#008585" draw:end-color="#070707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-background" style:family="presentation">
      <style:graphic-properties draw:stroke="none" draw:fill="gradient" draw:fill-gradient-name="msFillGradient_20_1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gradient" draw:fill-gradient-name="msFillGradient_20_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gradient" draw:fill-gradient-name="Gradient_20_2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2"/>
      <style:paragraph-properties fo:text-align="start" style:font-independent-line-spacing="true"/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BLANK" style:page-layout-name="PM1" draw:style-name="Mdp1">
      <draw:custom-shape draw:name="Google Shape;9;p2" draw:style-name="Mgr3" draw:text-style-name="MP5" draw:layer="backgroundobjects" svg:width="21.703cm" svg:height="21.703cm" draw:transform="rotate (-1.06447631079134) translate (25.869cm -7.61cm)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Google Shape;10;p2" presentation:style-name="BLANK-title" draw:layer="backgroundobjects" svg:width="24.136cm" svg:height="5.419cm" svg:x="0.628cm" svg:y="0.402cm" presentation:class="title" presentation:placeholder="true" presentation:user-transformed="true">
        <draw:text-box/>
      </draw:frame>
      <draw:frame draw:name="Google Shape;11;p2" presentation:style-name="BLANK-title" draw:layer="backgroundobjects" svg:width="20.974cm" svg:height="6.333cm" svg:x="3.901cm" svg:y="7.735cm" presentation:class="title" presentation:placeholder="true" presentation:user-transformed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94"/>
    <meta:generator>LibreOfficeDev/6.0.5.2$Linux_X86_64 LibreOffice_project/</meta:generator>
  </office:meta>
</office:document-meta>
</file>