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DB0000023D0351048816E5F05A.png" manifest:media-type="image/png"/>
  <manifest:file-entry manifest:full-path="Pictures/10000201000001810000019D21414AE6A0E4B738.png" manifest:media-type="image/png"/>
  <manifest:file-entry manifest:full-path="Pictures/10000201000006A700000318B84B75EDC9AB1E5E.png" manifest:media-type="image/png"/>
  <manifest:file-entry manifest:full-path="Pictures/1000020100000230000000337E501EF06D2760B2.png" manifest:media-type="image/png"/>
  <manifest:file-entry manifest:full-path="Pictures/10000201000002DD000001A9AE2BEC024E216785.png" manifest:media-type="image/png"/>
  <manifest:file-entry manifest:full-path="Pictures/1000020100000238000000C5FB1069CABA46C21D.png" manifest:media-type="image/png"/>
  <manifest:file-entry manifest:full-path="Pictures/100000DC000003200000023664B22927723DB060.gif" manifest:media-type="image/gif"/>
  <manifest:file-entry manifest:full-path="Pictures/1000020100000062000000A0FE4A47C3CE989093.png" manifest:media-type="image/png"/>
  <manifest:file-entry manifest:full-path="Pictures/10000201000002BC000000F924A3B57F503EA256.png" manifest:media-type="image/png"/>
  <manifest:file-entry manifest:full-path="Pictures/100002010000020000000200165B83DB1E16ECF1.png" manifest:media-type="image/png"/>
  <manifest:file-entry manifest:full-path="Pictures/1000009600000320000001C8B62A023256B54ECB.gif" manifest:media-type="image/gif"/>
  <manifest:file-entry manifest:full-path="Pictures/100002010000020000000200A75DCA922D893B22.png" manifest:media-type="image/png"/>
  <manifest:file-entry manifest:full-path="Pictures/1000020100000311000001D5DAC6EAB64E4CFB71.png" manifest:media-type="image/png"/>
  <manifest:file-entry manifest:full-path="Pictures/100002010000020000000200185C26447978F36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Space Grotesk" svg:font-family="'Space Grotesk'"/>
    <style:font-face style:name="Space Grotesk Light" svg:font-family="'Space Grotesk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LANK-title">
      <style:graphic-properties draw:stroke="none" svg:stroke-width="0cm" draw:fill="none" draw:textarea-vertical-align="top" draw:auto-grow-height="tru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BLANK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3" style:family="presentation" style:parent-style-name="BLANK-subtitle">
      <style:graphic-properties draw:stroke="none" svg:stroke-width="0cm" draw:fill="none" draw:fill-color="#ffffff" draw:textarea-vertical-align="top" draw:auto-grow-height="true" draw:fit-to-size="false" style:shrink-to-fit="false" fo:min-height="8.287cm" fo:padding-top="0cm" fo:padding-bottom="0cm" fo:padding-left="0cm" fo:padding-right="0cm" fo:wrap-option="wrap"/>
    </style:style>
    <style:style style:name="pr4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4pt"/>
    </style:style>
    <style:style style:name="P3" style:family="paragraph">
      <style:paragraph-properties fo:margin-left="0cm" fo:margin-right="0cm" fo:margin-top="0cm" fo:margin-bottom="0cm" fo:line-height="85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81f5ff" style:text-line-through-style="none" style:text-line-through-type="none" style:text-position="0% 100%" style:font-name="Space Grotesk Light" fo:font-size="64pt" fo:letter-spacing="normal" fo:font-style="normal" style:text-underline-style="none" fo:font-weight="normal" style:font-name-asian="Space Grotesk Light" style:font-size-asian="64pt" style:font-style-asian="normal" style:font-weight-asian="normal" style:font-name-complex="Space Grotesk Light" style:font-size-complex="6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pace Grotesk Light" fo:font-size="64pt" fo:letter-spacing="normal" fo:font-style="normal" style:text-underline-style="none" fo:font-weight="normal" style:font-name-asian="Space Grotesk Light" style:font-size-asian="64pt" style:font-style-asian="normal" style:font-weight-asian="normal" style:font-name-complex="Space Grotesk Light" style:font-size-complex="64pt" style:font-style-complex="normal" style:font-weight-complex="normal"/>
    </style:style>
    <style:style style:name="T3" style:family="text">
      <style:text-properties fo:font-variant="normal" fo:text-transform="none" fo:color="#81f5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4" style:family="text">
      <style:text-properties fo:font-variant="normal" fo:text-transform="none" fo:color="#81f5ff" style:text-line-through-style="none" style:text-line-through-type="none" style:text-position="0% 100%" style:font-name="Roboto" fo:font-size="17pt" fo:letter-spacing="normal" fo:font-style="normal" style:text-underline-style="none" fo:font-weight="normal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pace Grotesk" fo:font-size="22pt" fo:letter-spacing="normal" fo:font-style="normal" style:text-underline-style="none" fo:font-weight="normal" style:font-name-asian="Space Grotesk" style:font-size-asian="22pt" style:font-style-asian="normal" style:font-weight-asian="normal" style:font-name-complex="Space Grotesk" style:font-size-complex="22pt" style:font-style-complex="normal" style:font-weight-complex="normal"/>
    </style:style>
    <style:style style:name="T6" style:family="text">
      <style:text-properties fo:font-variant="normal" fo:text-transform="none" fo:color="#81f5ff" style:text-line-through-style="none" style:text-line-through-type="none" style:text-position="0% 100%" style:font-name="Space Grotesk Light" fo:font-size="41pt" fo:letter-spacing="normal" fo:font-style="normal" style:text-underline-style="none" fo:font-weight="normal" style:font-name-asian="Space Grotesk Light" style:font-size-asian="41pt" style:font-style-asian="normal" style:font-weight-asian="normal" style:font-name-complex="Space Grotesk Light" style:font-size-complex="41pt" style:font-style-complex="normal" style:font-weight-complex="normal"/>
    </style:style>
    <style:style style:name="T7" style:family="text">
      <style:text-properties fo:font-variant="normal" fo:text-transform="none" fo:color="#81f5ff" style:text-line-through-style="none" style:text-line-through-type="none" style:text-position="0% 100%" style:font-name="Space Grotesk Light" fo:font-size="21pt" fo:letter-spacing="normal" fo:font-style="normal" style:text-underline-style="none" fo:font-weight="normal" style:font-name-asian="Space Grotesk Light" style:font-size-asian="21pt" style:font-style-asian="normal" style:font-weight-asian="normal" style:font-name-complex="Space Grotesk Light" style:font-size-complex="21pt" style:font-style-complex="normal" style:font-weight-complex="normal"/>
    </style:style>
    <style:style style:name="T8" style:family="text">
      <style:text-properties fo:font-variant="normal" fo:text-transform="none" fo:color="#81f5ff" style:text-line-through-style="none" style:text-line-through-type="none" style:text-position="0% 100%" style:font-name="Space Grotesk Light" fo:font-size="46pt" fo:letter-spacing="normal" fo:font-style="normal" style:text-underline-style="none" fo:font-weight="normal" style:font-name-asian="Space Grotesk Light" style:font-size-asian="46pt" style:font-style-asian="normal" style:font-weight-asian="normal" style:font-name-complex="Space Grotesk Light" style:font-size-complex="46pt" style:font-style-complex="normal" style:font-weight-complex="normal"/>
    </style:style>
    <style:style style:name="T9" style:family="text">
      <style:text-properties fo:font-variant="normal" fo:text-transform="none" fo:color="#81f5ff" style:text-line-through-style="none" style:text-line-through-type="none" style:text-position="0% 100%" style:font-name="Space Grotesk Light" fo:font-size="52pt" fo:letter-spacing="normal" fo:font-style="normal" style:text-underline-style="none" fo:font-weight="normal" style:font-name-asian="Space Grotesk Light" style:font-size-asian="52pt" style:font-style-asian="normal" style:font-weight-asian="normal" style:font-name-complex="Space Grotesk Light" style:font-size-complex="5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Space Grotesk Light" fo:font-size="52pt" fo:letter-spacing="normal" fo:font-style="normal" style:text-underline-style="none" fo:font-weight="normal" style:font-name-asian="Space Grotesk Light" style:font-size-asian="52pt" style:font-style-asian="normal" style:font-weight-asian="normal" style:font-name-complex="Space Grotesk Light" style:font-size-complex="52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Space Grotesk Light" fo:font-size="20pt" fo:letter-spacing="normal" fo:font-style="normal" style:text-underline-style="none" fo:font-weight="normal" style:font-name-asian="Space Grotesk Light" style:font-size-asian="20pt" style:font-style-asian="normal" style:font-weight-asian="normal" style:font-name-complex="Space Grotesk Light" style:font-size-complex="2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Space Grotesk Light" fo:font-size="56pt" fo:letter-spacing="normal" fo:font-style="normal" style:text-underline-style="none" fo:font-weight="normal" style:font-name-asian="Space Grotesk Light" style:font-size-asian="56pt" style:font-style-asian="normal" style:font-weight-asian="normal" style:font-name-complex="Space Grotesk Light" style:font-size-complex="5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❏">
        <style:list-level-properties text:space-before="0.248cm" text:min-label-width="1.022cm"/>
        <style:text-properties style:font-name="Space Grotesk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6cm" text:min-label-width="0.81cm"/>
        <style:text-properties style:font-name="Robo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Brewing Game" draw:style-name="dp1" draw:master-page-name="BLANK">
        <draw:frame draw:name="Google Shape;319;p38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1">Sprint 6 - Review</text:span></text:p>
          </draw:text-box>
        </draw:frame>
        <draw:frame draw:name="Google Shape;320;p38" presentation:style-name="pr2" draw:text-style-name="P2" draw:layer="layout" svg:width="20.974cm" svg:height="6.333cm" svg:x="3.79cm" svg:y="7.789cm" presentation:class="title" presentation:user-transformed="true">
          <draw:text-box>
            <text:p text:style-name="P3"><text:span text:style-name="T2">The Brewing Game</text:span></text:p>
          </draw:text-box>
        </draw:frame>
        <draw:frame draw:name="Google Shape;321;p38" presentation:style-name="pr3" draw:text-style-name="P5" draw:layer="layout" svg:width="14.187cm" svg:height="8.287cm" svg:x="0.628cm" svg:y="6.306cm" presentation:class="subtitle" presentation:user-transformed="true">
          <draw:text-box>
            <text:p text:style-name="P4"><text:span text:style-name="T3">13th February 2026</text:span><text:span text:style-name="T3"><text:line-break/></text:span><text:span text:style-name="T4">Gracjan Blazejowski</text:span></text:p>
            <text:p text:style-name="P4"><text:span text:style-name="T4">Bruce Gray</text:span></text:p>
            <text:p text:style-name="P4"><text:span text:style-name="T4">Marta Grazia</text:span></text:p>
            <text:p text:style-name="P4"><text:span text:style-name="T4">Sergio Eneide</text:span></text:p>
            <text:p text:style-name="P4"><text:span text:style-name="T4">Aaron Stevens</text:span></text:p>
          </draw:text-box>
        </draw:frame>
        <presentation:notes draw:style-name="dp2">
          <draw:page-thumbnail draw:name="Google Shape;316;g3c2cabe9ccb_0_0:notes" draw:style-name="gr1" draw:layer="layout" svg:width="16.932cm" svg:height="9.524cm" svg:x="1.059cm" svg:y="1.905cm" draw:page-number="1" presentation:class="page"/>
          <draw:frame draw:name="Google Shape;317;g3c2cabe9ccb_0_0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326;p39" draw:style-name="gr2" draw:text-style-name="P7" draw:layer="layout" svg:width="24.552cm" svg:height="11.418cm" svg:x="0.423cm" svg:y="1.519cm">
          <draw:image xlink:href="Pictures/10000201000006A700000318B84B75EDC9AB1E5E.png" xlink:type="simple" xlink:show="embed" xlink:actuate="onLoad">
            <text:p/>
          </draw:image>
        </draw:frame>
        <presentation:notes draw:style-name="dp2">
          <draw:page-thumbnail draw:name="Google Shape;323;g3c2cabe9ccb_0_382:notes" draw:style-name="gr1" draw:layer="layout" svg:width="16.932cm" svg:height="9.524cm" svg:x="1.059cm" svg:y="1.905cm" draw:page-number="2" presentation:class="page"/>
          <draw:frame draw:name="Google Shape;324;g3c2cabe9ccb_0_382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work" draw:style-name="dp1" draw:master-page-name="BLANK">
        <draw:frame draw:name="Google Shape;331;p40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1">Sprint work</text:span></text:p>
          </draw:text-box>
        </draw:frame>
        <draw:frame draw:name="Google Shape;332;p40" presentation:style-name="pr3" draw:text-style-name="P5" draw:layer="layout" svg:width="5.159cm" svg:height="8.287cm" svg:x="19.605cm" svg:y="12.615cm" presentation:class="subtitle" presentation:user-transformed="true">
          <draw:text-box>
            <text:p text:style-name="P4"><text:span text:style-name="T3">Marta Grazia</text:span></text:p>
          </draw:text-box>
        </draw:frame>
        <draw:custom-shape draw:name="Google Shape;333;p40" draw:style-name="gr3" draw:text-style-name="P9" draw:layer="layout" svg:width="13.496cm" svg:height="5.339cm" svg:x="8.271cm" svg:y="3.678cm">
          <text:list text:style-name="L3">
            <text:list-item>
              <text:p text:style-name="P8"><text:span text:style-name="T5">Adding a basic Game Loop</text:span></text:p>
            </text:list-item>
            <text:list-item>
              <text:p text:style-name="P8"><text:span text:style-name="T5">Adding a second Instrument</text:span></text:p>
            </text:list-item>
            <text:list-item>
              <text:p text:style-name="P8"><text:span text:style-name="T5">Adding Tabbing Navigation</text:span></text:p>
            </text:list-item>
            <text:list-item>
              <text:p text:style-name="P8"><text:span text:style-name="T5">Text to Speech research</text:span></text:p>
            </text:list-item>
            <text:list-item>
              <text:p text:style-name="P8"><text:span text:style-name="T5">User Experience Consultation</text:span></text:p>
            </text:list-item>
            <text:list-item>
              <text:p text:style-name="P8"><text:span text:style-name="T5">Adding a tutorial</text:span></text:p>
            </text:list-item>
            <text:list-item>
              <text:p text:style-name="P8"><text:span text:style-name="T5">Adding score calculation formula to the gam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8;g3c7e6a59d7c_0_0:notes" draw:style-name="gr1" draw:layer="layout" svg:width="16.932cm" svg:height="9.524cm" svg:x="1.059cm" svg:y="1.905cm" draw:page-number="3" presentation:class="page"/>
          <draw:frame draw:name="Google Shape;329;g3c7e6a59d7c_0_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Google Shape;338;p41" presentation:style-name="pr1" draw:text-style-name="P2" draw:layer="layout" svg:width="24.913cm" svg:height="4.593cm" svg:x="0.632cm" svg:y="0.388cm" presentation:class="title" presentation:user-transformed="true">
          <draw:text-box>
            <text:p text:style-name="P1"><text:span text:style-name="T6">Added</text:span><text:span text:style-name="T6"><text:line-break/></text:span><text:span text:style-name="T6">Game Manager and score tracking</text:span><text:span text:style-name="T6"><text:line-break/></text:span><text:span text:style-name="T7">Adding a purpose to the game</text:span><text:span text:style-name="T7"><text:line-break/></text:span><text:span text:style-name="T7"/></text:p>
          </draw:text-box>
        </draw:frame>
        <draw:frame draw:name="Google Shape;339;p41" presentation:style-name="pr3" draw:text-style-name="P5" draw:layer="layout" svg:width="5.162cm" svg:height="8.287cm" svg:x="19.683cm" svg:y="12.605cm" presentation:class="subtitle" presentation:user-transformed="true">
          <draw:text-box>
            <text:p text:style-name="P4"><text:span text:style-name="T3">Marta Grazia</text:span></text:p>
          </draw:text-box>
        </draw:frame>
        <draw:frame draw:name="Google Shape;340;p41" draw:style-name="gr2" draw:text-style-name="P7" draw:layer="layout" svg:width="11.78cm" svg:height="6.714cm" svg:x="1.571cm" svg:y="5.417cm">
          <draw:image xlink:href="Pictures/1000009600000320000001C8B62A023256B54ECB.gif" xlink:type="simple" xlink:show="embed" xlink:actuate="onLoad">
            <text:p/>
          </draw:image>
        </draw:frame>
        <draw:frame draw:name="Google Shape;341;p41" draw:style-name="gr2" draw:text-style-name="P7" draw:layer="layout" svg:width="10.002cm" svg:height="3.469cm" svg:x="14.765cm" svg:y="7.144cm">
          <draw:image xlink:href="Pictures/1000020100000238000000C5FB1069CABA46C21D.png" xlink:type="simple" xlink:show="embed" xlink:actuate="onLoad">
            <text:p/>
          </draw:image>
        </draw:frame>
        <draw:frame draw:name="Google Shape;342;p41" draw:style-name="gr2" draw:text-style-name="P7" draw:layer="layout" svg:width="10.157cm" svg:height="0.924cm" svg:x="14.687cm" svg:y="5.895cm">
          <draw:image xlink:href="Pictures/1000020100000230000000337E501EF06D2760B2.png" xlink:type="simple" xlink:show="embed" xlink:actuate="onLoad">
            <text:p/>
          </draw:image>
        </draw:frame>
        <presentation:notes draw:style-name="dp2">
          <draw:page-thumbnail draw:name="Google Shape;335;g3c2cabe9ccb_0_343:notes" draw:style-name="gr1" draw:layer="layout" svg:width="16.932cm" svg:height="9.524cm" svg:x="1.059cm" svg:y="1.905cm" draw:page-number="4" presentation:class="page"/>
          <draw:frame draw:name="Google Shape;336;g3c2cabe9ccb_0_343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ed a second instrument&#10;More gameplay mechanics&#10;" draw:style-name="dp1" draw:master-page-name="BLANK">
        <draw:frame draw:name="Google Shape;347;p42" presentation:style-name="pr1" draw:text-style-name="P2" draw:layer="layout" svg:width="27.463cm" svg:height="3.299cm" svg:x="0.632cm" svg:y="0.388cm" presentation:class="title" presentation:user-transformed="true">
          <draw:text-box>
            <text:p text:style-name="P1"><text:span text:style-name="T8">Added a second instrument</text:span><text:span text:style-name="T8"><text:line-break/></text:span><text:span text:style-name="T7">More gameplay mechanics</text:span><text:span text:style-name="T7"><text:line-break/></text:span><text:span text:style-name="T7"/></text:p>
          </draw:text-box>
        </draw:frame>
        <draw:frame draw:name="Google Shape;348;p42" presentation:style-name="pr3" draw:text-style-name="P5" draw:layer="layout" svg:width="5.188cm" svg:height="8.287cm" svg:x="19.498cm" svg:y="12.605cm" presentation:class="subtitle" presentation:user-transformed="true">
          <draw:text-box>
            <text:p text:style-name="P4"><text:span text:style-name="T3">Marta Grazia</text:span></text:p>
          </draw:text-box>
        </draw:frame>
        <draw:frame draw:name="Google Shape;349;p42" draw:style-name="gr2" draw:text-style-name="P7" draw:layer="layout" svg:width="15.047cm" svg:height="10.645cm" svg:x="2.537cm" svg:y="3.065cm">
          <draw:image xlink:href="Pictures/100000DC000003200000023664B22927723DB060.gif" xlink:type="simple" xlink:show="embed" xlink:actuate="onLoad">
            <text:p/>
          </draw:image>
        </draw:frame>
        <presentation:notes draw:style-name="dp2">
          <draw:page-thumbnail draw:name="Google Shape;344;g3c7e6a59d7c_0_9:notes" draw:style-name="gr1" draw:layer="layout" svg:width="16.932cm" svg:height="9.524cm" svg:x="1.059cm" svg:y="1.905cm" draw:page-number="5" presentation:class="page"/>
          <draw:frame draw:name="Google Shape;345;g3c7e6a59d7c_0_9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ing accessibility features - Work In Progress" draw:style-name="dp1" draw:master-page-name="BLANK">
        <draw:frame draw:name="Google Shape;354;p43" presentation:style-name="pr1" draw:text-style-name="P2" draw:layer="layout" svg:width="24.136cm" svg:height="3.741cm" svg:x="0.628cm" svg:y="0.402cm" presentation:class="title" presentation:user-transformed="true">
          <draw:text-box>
            <text:p text:style-name="P1"><text:span text:style-name="T9">Adding accessibility features - Work In Progress</text:span></text:p>
          </draw:text-box>
        </draw:frame>
        <draw:frame draw:name="Google Shape;355;p43" presentation:style-name="pr3" draw:text-style-name="P5" draw:layer="layout" svg:width="5.536cm" svg:height="8.287cm" svg:x="19.205cm" svg:y="12.622cm" presentation:class="subtitle" presentation:user-transformed="true">
          <draw:text-box>
            <text:p text:style-name="P4"><text:span text:style-name="T3">Marta Grazia</text:span></text:p>
          </draw:text-box>
        </draw:frame>
        <draw:custom-shape draw:name="Google Shape;356;p43" draw:style-name="gr3" draw:text-style-name="P9" draw:layer="layout" svg:width="12.497cm" svg:height="5.339cm" svg:x="6.707cm" svg:y="6.2cm">
          <text:list text:style-name="L3">
            <text:list-item>
              <text:p text:style-name="P8"><text:span text:style-name="T5">Consultation with Heckie</text:span></text:p>
            </text:list-item>
            <text:list-item>
              <text:p text:style-name="P8"><text:span text:style-name="T5">Tabbing Navigation</text:span></text:p>
            </text:list-item>
            <text:list-item>
              <text:p text:style-name="P8"><text:span text:style-name="T5">Text to Speech researc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1;g3c61420dfc0_0_1:notes" draw:style-name="gr1" draw:layer="layout" svg:width="16.932cm" svg:height="9.524cm" svg:x="1.059cm" svg:y="1.905cm" draw:page-number="6" presentation:class="page"/>
          <draw:frame draw:name="Google Shape;352;g3c61420dfc0_0_1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ed Game Tutorial" draw:style-name="dp1" draw:master-page-name="BLANK">
        <draw:frame draw:name="Google Shape;361;p44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2">Added Game Tutorial</text:span></text:p>
          </draw:text-box>
        </draw:frame>
        <draw:frame draw:name="Google Shape;362;p44" presentation:style-name="pr3" draw:text-style-name="P5" draw:layer="layout" svg:width="8.157cm" svg:height="8.287cm" svg:x="16.607cm" svg:y="12.635cm" presentation:class="subtitle" presentation:user-transformed="true">
          <draw:text-box>
            <text:p text:style-name="P4"><text:span text:style-name="T3">Gracjan Blazejowski</text:span></text:p>
          </draw:text-box>
        </draw:frame>
        <draw:frame draw:name="Google Shape;363;p44" draw:style-name="gr2" draw:text-style-name="P7" draw:layer="layout" svg:width="15.707cm" svg:height="9.107cm" svg:x="0.628cm" svg:y="2.727cm">
          <draw:image xlink:href="Pictures/10000201000002DD000001A9AE2BEC024E216785.png" xlink:type="simple" xlink:show="embed" xlink:actuate="onLoad">
            <text:p/>
          </draw:image>
        </draw:frame>
        <draw:custom-shape draw:name="Google Shape;364;p44" draw:style-name="gr4" draw:text-style-name="P9" draw:layer="layout" svg:width="6.233cm" svg:height="1.778cm" svg:x="17.23cm" svg:y="2.727cm">
          <text:list text:style-name="L4">
            <text:list-item>
              <text:p text:style-name="P8"><text:span text:style-name="T10">Decided on the format</text:span></text:p>
            </text:list-item>
            <text:list-item>
              <text:p text:style-name="P8"><text:span text:style-name="T10">Utilized in-text sprites to aid Accessibilit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44" draw:style-name="gr4" draw:text-style-name="P9" draw:layer="layout" svg:width="6.233cm" svg:height="2.201cm" svg:x="17.23cm" svg:y="6.754cm">
          <text:list text:style-name="L4">
            <text:list-item>
              <text:p text:style-name="P8"><text:span text:style-name="T10">Looking for the most optimal way to “cut through” the fadeout revealing elements below i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8;g3c2cabe9ccb_0_319:notes" draw:style-name="gr1" draw:layer="layout" svg:width="16.932cm" svg:height="9.524cm" svg:x="1.059cm" svg:y="1.905cm" draw:page-number="7" presentation:class="page"/>
          <draw:frame draw:name="Google Shape;359;g3c2cabe9ccb_0_319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ed Game Tutorial" draw:style-name="dp1" draw:master-page-name="BLANK">
        <draw:frame draw:name="Google Shape;370;p45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2">Added Game Tutorial</text:span></text:p>
          </draw:text-box>
        </draw:frame>
        <draw:frame draw:name="Google Shape;371;p45" presentation:style-name="pr3" draw:text-style-name="P5" draw:layer="layout" svg:width="8.157cm" svg:height="8.287cm" svg:x="16.607cm" svg:y="12.62cm" presentation:class="subtitle" presentation:user-transformed="true">
          <draw:text-box>
            <text:p text:style-name="P4"><text:span text:style-name="T3">Gracjan Blazejowski</text:span></text:p>
          </draw:text-box>
        </draw:frame>
        <draw:frame draw:name="Google Shape;372;p45" draw:style-name="gr2" draw:text-style-name="P7" draw:layer="layout" svg:width="2.592cm" svg:height="4.232cm" svg:x="0.628cm" svg:y="3.228cm">
          <draw:image xlink:href="Pictures/1000020100000062000000A0FE4A47C3CE989093.png" xlink:type="simple" xlink:show="embed" xlink:actuate="onLoad">
            <text:p/>
          </draw:image>
        </draw:frame>
        <draw:custom-shape draw:name="Google Shape;373;p45" draw:style-name="gr4" draw:text-style-name="P9" draw:layer="layout" svg:width="6.233cm" svg:height="1.355cm" svg:x="5.382cm" svg:y="3.228cm">
          <text:list text:style-name="L4">
            <text:list-item>
              <text:p text:style-name="P8"><text:span text:style-name="T10">10 slides for now</text:span></text:p>
            </text:list-item>
            <text:list-item>
              <text:p text:style-name="P8"><text:span text:style-name="T10">&lt;15 slides upon comple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4;p45" draw:style-name="gr2" draw:text-style-name="P7" draw:layer="layout" svg:width="3.837cm" svg:height="3.837cm" svg:x="17.167cm" svg:y="3.426cm">
          <draw:image xlink:href="Pictures/100002010000020000000200165B83DB1E16ECF1.png" xlink:type="simple" xlink:show="embed" xlink:actuate="onLoad">
            <text:p/>
          </draw:image>
        </draw:frame>
        <draw:frame draw:name="Google Shape;375;p45" draw:style-name="gr2" draw:text-style-name="P7" draw:layer="layout" svg:width="2.928cm" svg:height="2.928cm" svg:x="4.218cm" svg:y="10.027cm">
          <draw:image xlink:href="Pictures/100002010000020000000200A75DCA922D893B22.png" xlink:type="simple" xlink:show="embed" xlink:actuate="onLoad">
            <text:p/>
          </draw:image>
        </draw:frame>
        <draw:frame draw:name="Google Shape;376;p45" draw:style-name="gr2" draw:text-style-name="P7" draw:layer="layout" svg:width="2.651cm" svg:height="2.651cm" svg:x="13.668cm" svg:y="8.54cm">
          <draw:image xlink:href="Pictures/100002010000020000000200185C26447978F365.png" xlink:type="simple" xlink:show="embed" xlink:actuate="onLoad">
            <text:p/>
          </draw:image>
        </draw:frame>
        <draw:frame draw:name="Google Shape;377;p45" draw:style-name="gr2" draw:text-style-name="P7" draw:layer="layout" svg:width="2.806cm" svg:height="3.01cm" svg:x="9.177cm" svg:y="6.315cm">
          <draw:image xlink:href="Pictures/10000201000001810000019D21414AE6A0E4B738.png" xlink:type="simple" xlink:show="embed" xlink:actuate="onLoad">
            <text:p/>
          </draw:image>
        </draw:frame>
        <presentation:notes draw:style-name="dp2">
          <draw:page-thumbnail draw:name="Google Shape;367;g3c7e6a59d7c_0_18:notes" draw:style-name="gr1" draw:layer="layout" svg:width="16.932cm" svg:height="9.524cm" svg:x="1.059cm" svg:y="1.905cm" draw:page-number="8" presentation:class="page"/>
          <draw:frame draw:name="Google Shape;368;g3c7e6a59d7c_0_18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frame draw:name="Google Shape;382;p46" presentation:style-name="pr1" draw:text-style-name="P2" draw:layer="layout" svg:width="26.283cm" svg:height="4.46cm" svg:x="0.628cm" svg:y="0.402cm" presentation:class="title" presentation:user-transformed="true">
          <draw:text-box>
            <text:p text:style-name="P1"><text:span text:style-name="T11">Implemented </text:span><text:span text:style-name="T11"><text:line-break/></text:span><text:span text:style-name="T11">score calculation formula</text:span><text:span text:style-name="T11"><text:line-break/></text:span><text:span text:style-name="T12">Converting the formula in C# and integrating it in the existing codebase</text:span></text:p>
          </draw:text-box>
        </draw:frame>
        <draw:frame draw:name="Google Shape;383;p46" presentation:style-name="pr3" draw:text-style-name="P5" draw:layer="layout" svg:width="4.93cm" svg:height="8.287cm" svg:x="19.817cm" svg:y="12.63cm" presentation:class="subtitle" presentation:user-transformed="true">
          <draw:text-box>
            <text:p text:style-name="P4"><text:span text:style-name="T3">Bruce Gray</text:span></text:p>
          </draw:text-box>
        </draw:frame>
        <draw:frame draw:name="Google Shape;384;p46" draw:style-name="gr2" draw:text-style-name="P7" draw:layer="layout" svg:width="9.884cm" svg:height="5.905cm" svg:x="0.807cm" svg:y="5.926cm">
          <draw:image xlink:href="Pictures/1000020100000311000001D5DAC6EAB64E4CFB71.png" xlink:type="simple" xlink:show="embed" xlink:actuate="onLoad">
            <text:p/>
          </draw:image>
        </draw:frame>
        <draw:frame draw:name="Google Shape;385;p46" draw:style-name="gr2" draw:text-style-name="P7" draw:layer="layout" svg:width="8.391cm" svg:height="2.984cm" svg:x="10.95cm" svg:y="10.898cm">
          <draw:image xlink:href="Pictures/10000201000002BC000000F924A3B57F503EA256.png" xlink:type="simple" xlink:show="embed" xlink:actuate="onLoad">
            <text:p/>
          </draw:image>
        </draw:frame>
        <draw:frame draw:name="Google Shape;386;p46" draw:style-name="gr2" draw:text-style-name="P7" draw:layer="layout" svg:width="7.118cm" svg:height="5.579cm" svg:x="11.668cm" svg:y="5.221cm">
          <draw:image xlink:href="Pictures/10000201000002DB0000023D0351048816E5F05A.png" xlink:type="simple" xlink:show="embed" xlink:actuate="onLoad">
            <text:p/>
          </draw:image>
        </draw:frame>
        <presentation:notes draw:style-name="dp2">
          <draw:page-thumbnail draw:name="Google Shape;379;g3c2cabe9ccb_0_365:notes" draw:style-name="gr1" draw:layer="layout" svg:width="16.932cm" svg:height="9.524cm" svg:x="1.059cm" svg:y="1.905cm" draw:page-number="9" presentation:class="page"/>
          <draw:frame draw:name="Google Shape;380;g3c2cabe9ccb_0_365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print" draw:style-name="dp1" draw:master-page-name="BLANK">
        <draw:frame draw:name="Google Shape;391;p47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1">Next Sprint</text:span></text:p>
          </draw:text-box>
        </draw:frame>
        <draw:frame draw:name="Google Shape;392;p47" presentation:style-name="pr3" draw:text-style-name="P5" draw:layer="layout" svg:width="5.402cm" svg:height="8.287cm" svg:x="19.537cm" svg:y="12.617cm" presentation:class="subtitle" presentation:user-transformed="true">
          <draw:text-box>
            <text:p text:style-name="P4"><text:span text:style-name="T3">Marta Grazia</text:span></text:p>
          </draw:text-box>
        </draw:frame>
        <draw:custom-shape draw:name="Google Shape;393;p47" draw:style-name="gr3" draw:text-style-name="P9" draw:layer="layout" svg:width="12.497cm" svg:height="5.339cm" svg:x="5.89cm" svg:y="5.213cm">
          <text:list text:style-name="L3">
            <text:list-item>
              <text:p text:style-name="P8"><text:span text:style-name="T5">User Feedback integration</text:span></text:p>
            </text:list-item>
            <text:list-item>
              <text:p text:style-name="P8"><text:span text:style-name="T5">Reassess roadmap</text:span></text:p>
            </text:list-item>
            <text:list-item>
              <text:p text:style-name="P8"><text:span text:style-name="T5">Accessibilit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8;g3c7e6a59d7c_0_26:notes" draw:style-name="gr1" draw:layer="layout" svg:width="16.932cm" svg:height="9.524cm" svg:x="1.059cm" svg:y="1.905cm" draw:page-number="10" presentation:class="page"/>
          <draw:frame draw:name="Google Shape;389;g3c7e6a59d7c_0_2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Brewing Game’s Team" draw:style-name="dp1" draw:master-page-name="BLANK">
        <draw:frame draw:name="Google Shape;398;p48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2">Thank you!</text:span></text:p>
          </draw:text-box>
        </draw:frame>
        <draw:frame draw:name="Google Shape;399;p48" presentation:style-name="pr2" draw:text-style-name="P2" draw:layer="layout" svg:width="27.658cm" svg:height="6.333cm" svg:x="-2.468cm" svg:y="7.721cm" presentation:class="title" presentation:user-transformed="true">
          <draw:text-box>
            <text:p text:style-name="P3"><text:span text:style-name="T13">The Brewing Game’s Team</text:span></text:p>
          </draw:text-box>
        </draw:frame>
        <presentation:notes draw:style-name="dp2">
          <draw:page-thumbnail draw:name="Google Shape;395;g3c2cabe9ccb_0_390:notes" draw:style-name="gr1" draw:layer="layout" svg:width="16.932cm" svg:height="9.524cm" svg:x="1.059cm" svg:y="1.905cm" draw:page-number="11" presentation:class="page"/>
          <draw:frame draw:name="Google Shape;396;g3c2cabe9ccb_0_390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Space Grotesk" svg:font-family="'Space Grotesk'"/>
    <style:font-face style:name="Space Grotesk Light" svg:font-family="'Space Grotesk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008585" draw:end-color="#070707" draw:start-intensity="100%" draw:end-intensity="100%" draw:angle="2991" draw:border="0%"/>
    <draw:gradient draw:name="msFillGradient_20_1" draw:display-name="msFillGradient 1" draw:style="linear" draw:start-color="#008585" draw:end-color="#070707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gradient" draw:fill-gradient-name="msFillGradient_20_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custom-shape draw:name="Google Shape;9;p2" draw:style-name="Mgr3" draw:text-style-name="MP5" draw:layer="backgroundobjects" svg:width="21.703cm" svg:height="21.703cm" draw:transform="rotate (-1.06447631079134) translate (25.869cm -7.61cm)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10;p2" presentation:style-name="BLANK-title" draw:layer="backgroundobjects" svg:width="24.136cm" svg:height="5.419cm" svg:x="0.628cm" svg:y="0.402cm" presentation:class="title" presentation:placeholder="true" presentation:user-transformed="true">
        <draw:text-box/>
      </draw:frame>
      <draw:frame draw:name="Google Shape;11;p2" presentation:style-name="BLANK-title" draw:layer="backgroundobjects" svg:width="20.974cm" svg:height="6.333cm" svg:x="3.901cm" svg:y="7.735cm" presentation:class="title" presentation:placeholder="true" presentation:user-transformed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3"/>
    <meta:generator>LibreOfficeDev/6.0.5.2$Linux_X86_64 LibreOffice_project/</meta:generator>
  </office:meta>
</office:document-meta>
</file>