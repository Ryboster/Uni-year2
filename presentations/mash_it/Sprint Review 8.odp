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5D0000032D130C3F8E15AB01F0.png" manifest:media-type="image/png"/>
  <manifest:file-entry manifest:full-path="Pictures/10000201000002100000022D7D3C99FB7068890F.png" manifest:media-type="image/png"/>
  <manifest:file-entry manifest:full-path="Pictures/1000020100000234000002682CF37A4948266F47.png" manifest:media-type="image/png"/>
  <manifest:file-entry manifest:full-path="Pictures/100002010000017100000155A4655AEEB28533D7.png" manifest:media-type="image/png"/>
  <manifest:file-entry manifest:full-path="Pictures/10000000000000800000009AB736445BDEB6FBB2.jpg" manifest:media-type="image/jpeg"/>
  <manifest:file-entry manifest:full-path="Pictures/10000201000002D50000035028AAE859EFA26B69.png" manifest:media-type="image/png"/>
  <manifest:file-entry manifest:full-path="Pictures/100000000000026A0000016834E4A575F3D89693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Space Grotesk" svg:font-family="'Space Grotesk'"/>
    <style:font-face style:name="Space Grotesk Light" svg:font-family="'Space Grotesk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title">
      <style:graphic-properties draw:stroke="none" svg:stroke-width="0cm" draw:fill="none" draw:textarea-vertical-align="top" draw:auto-grow-height="tru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BLANK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3" style:family="presentation" style:parent-style-name="BLANK-subtitle">
      <style:graphic-properties draw:stroke="none" svg:stroke-width="0cm" draw:fill="none" draw:fill-color="#ffffff" draw:textarea-vertical-align="top" draw:auto-grow-height="true" draw:fit-to-size="false" style:shrink-to-fit="false" fo:min-height="8.287cm" fo:padding-top="0cm" fo:padding-bottom="0cm" fo:padding-left="0cm" fo:padding-right="0cm" fo:wrap-option="wrap"/>
    </style:style>
    <style:style style:name="pr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4pt"/>
    </style:style>
    <style:style style:name="P3" style:family="paragraph">
      <style:paragraph-properties fo:margin-left="0cm" fo:margin-right="0cm" fo:margin-top="0cm" fo:margin-bottom="0cm" fo:line-height="85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85%" fo:text-align="start" fo:text-indent="0cm" style:writing-mode="lr-tb"/>
    </style:style>
    <style:style style:name="P12" style:family="paragraph">
      <style:paragraph-properties fo:margin-left="1.27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81f5ff" style:text-line-through-style="none" style:text-line-through-type="none" style:text-position="0% 100%" style:font-name="Space Grotesk Light" fo:font-size="64pt" fo:letter-spacing="normal" fo:font-style="normal" style:text-underline-style="none" fo:font-weight="normal" style:font-name-asian="Space Grotesk Light" style:font-size-asian="64pt" style:font-style-asian="normal" style:font-weight-asian="normal" style:font-name-complex="Space Grotesk Light" style:font-size-complex="6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pace Grotesk Light" fo:font-size="64pt" fo:letter-spacing="normal" fo:font-style="normal" style:text-underline-style="none" fo:font-weight="normal" style:font-name-asian="Space Grotesk Light" style:font-size-asian="64pt" style:font-style-asian="normal" style:font-weight-asian="normal" style:font-name-complex="Space Grotesk Light" style:font-size-complex="64pt" style:font-style-complex="normal" style:font-weight-complex="normal"/>
    </style:style>
    <style:style style:name="T3" style:family="text">
      <style:text-properties fo:font-variant="normal" fo:text-transform="none" fo:color="#81f5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4" style:family="text">
      <style:text-properties fo:font-variant="normal" fo:text-transform="none" fo:color="#81f5ff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pace Grotesk" fo:font-size="22pt" fo:letter-spacing="normal" fo:font-style="normal" style:text-underline-style="none" fo:font-weight="normal" style:font-name-asian="Space Grotesk" style:font-size-asian="22pt" style:font-style-asian="normal" style:font-weight-asian="normal" style:font-name-complex="Space Grotesk" style:font-size-complex="2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pace Grotesk Light" fo:font-size="22pt" fo:letter-spacing="normal" fo:font-style="normal" style:text-underline-style="none" fo:font-weight="normal" style:font-name-asian="Space Grotesk Light" style:font-size-asian="22pt" style:font-style-asian="normal" style:font-weight-asian="normal" style:font-name-complex="Space Grotesk Light" style:font-size-complex="2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Space Grotesk Light" fo:font-size="53pt" fo:letter-spacing="normal" fo:font-style="normal" style:text-underline-style="none" fo:font-weight="normal" style:font-name-asian="Space Grotesk Light" style:font-size-asian="53pt" style:font-style-asian="normal" style:font-weight-asian="normal" style:font-name-complex="Space Grotesk Light" style:font-size-complex="53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pace Grotesk Light" fo:font-size="57pt" fo:letter-spacing="normal" fo:font-style="normal" style:text-underline-style="none" fo:font-weight="normal" style:font-name-asian="Space Grotesk Light" style:font-size-asian="57pt" style:font-style-asian="normal" style:font-weight-asian="normal" style:font-name-complex="Space Grotesk Light" style:font-size-complex="57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Space Grotesk Light" fo:font-size="56pt" fo:letter-spacing="normal" fo:font-style="normal" style:text-underline-style="none" fo:font-weight="normal" style:font-name-asian="Space Grotesk Light" style:font-size-asian="56pt" style:font-style-asian="normal" style:font-weight-asian="normal" style:font-name-complex="Space Grotesk Light" style:font-size-complex="5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❏">
        <style:list-level-properties text:space-before="0.248cm" text:min-label-width="1.022cm"/>
        <style:text-properties style:font-name="Space Grotesk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❏">
        <style:list-level-properties text:space-before="0.248cm" text:min-label-width="1.022cm"/>
        <style:text-properties style:font-name="Space Grotesk Light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Brewing Game" draw:style-name="dp1" draw:master-page-name="BLANK">
        <draw:frame draw:name="Google Shape;319;p38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1">Mid-Sprint Review 8</text:span></text:p>
          </draw:text-box>
        </draw:frame>
        <draw:frame draw:name="Google Shape;320;p38" presentation:style-name="pr2" draw:text-style-name="P2" draw:layer="layout" svg:width="20.974cm" svg:height="6.333cm" svg:x="3.79cm" svg:y="7.789cm" presentation:class="title" presentation:user-transformed="true">
          <draw:text-box>
            <text:p text:style-name="P3"><text:span text:style-name="T2">The Brewing Game</text:span></text:p>
          </draw:text-box>
        </draw:frame>
        <draw:frame draw:name="Google Shape;321;p38" presentation:style-name="pr3" draw:text-style-name="P5" draw:layer="layout" svg:width="14.187cm" svg:height="8.287cm" svg:x="0.628cm" svg:y="6.306cm" presentation:class="subtitle" presentation:user-transformed="true">
          <draw:text-box>
            <text:p text:style-name="P4"><text:span text:style-name="T3">6th March 2026</text:span><text:span text:style-name="T3"><text:line-break/></text:span><text:span text:style-name="T4">Gracjan Blazejowski</text:span></text:p>
            <text:p text:style-name="P4"><text:span text:style-name="T4">Bruce Gray</text:span></text:p>
            <text:p text:style-name="P4"><text:span text:style-name="T4">Marta Grazia</text:span></text:p>
            <text:p text:style-name="P4"><text:span text:style-name="T4">Sergio Eneide</text:span></text:p>
            <text:p text:style-name="P4"><text:span text:style-name="T4">Aaron Stevens</text:span></text:p>
          </draw:text-box>
        </draw:frame>
        <presentation:notes draw:style-name="dp2">
          <draw:page-thumbnail draw:name="Google Shape;316;g3c2cabe9ccb_0_0:notes" draw:style-name="gr1" draw:layer="layout" svg:width="16.932cm" svg:height="9.524cm" svg:x="1.059cm" svg:y="1.905cm" draw:page-number="1" presentation:class="page"/>
          <draw:frame draw:name="Google Shape;317;g3c2cabe9ccb_0_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work" draw:style-name="dp1" draw:master-page-name="BLANK">
        <draw:frame draw:name="Google Shape;326;p39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1">Sprint work</text:span></text:p>
          </draw:text-box>
        </draw:frame>
        <draw:frame draw:name="Google Shape;327;p39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3">Gracjan B</text:span></text:p>
          </draw:text-box>
        </draw:frame>
        <draw:custom-shape draw:name="Google Shape;328;p39" draw:style-name="gr2" draw:text-style-name="P8" draw:layer="layout" svg:width="16.4cm" svg:height="10.574cm" svg:x="4.322cm" svg:y="2.43cm">
          <text:p text:style-name="P7"><text:span text:style-name="T5"/></text:p>
          <text:list text:style-name="L4">
            <text:list-item>
              <text:p text:style-name="P4"><text:span text:style-name="T5">CI/CD workflows for automatic build distribution,</text:span></text:p>
            </text:list-item>
            <text:list-item>
              <text:p text:style-name="P4"><text:span text:style-name="T5">Finished the in-game Shop,</text:span></text:p>
            </text:list-item>
            <text:list-item>
              <text:p text:style-name="P4"><text:span text:style-name="T5">Automated testing workflows,</text:span></text:p>
            </text:list-item>
            <text:list-item>
              <text:p text:style-name="P4"><text:span text:style-name="T5">Additional instruments underwa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3;g3c7e6a59d7c_0_26:notes" draw:style-name="gr1" draw:layer="layout" svg:width="16.932cm" svg:height="9.524cm" svg:x="1.059cm" svg:y="1.905cm" draw:page-number="2" presentation:class="page"/>
          <draw:frame draw:name="Google Shape;324;g3c7e6a59d7c_0_26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ished Shop" draw:style-name="dp1" draw:master-page-name="BLANK">
        <draw:frame draw:name="Google Shape;333;p40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2">Finished Shop</text:span></text:p>
          </draw:text-box>
        </draw:frame>
        <draw:custom-shape draw:name="Google Shape;334;p40" draw:style-name="gr2" draw:text-style-name="P8" draw:layer="layout" svg:width="16.4cm" svg:height="10.574cm" svg:x="4.322cm" svg:y="2.43cm">
          <text:list text:style-name="L4">
            <text:list-item>
              <text:p text:style-name="P9"><text:span text:style-name="T5">Redesigned the UI element,</text:span></text:p>
            </text:list-item>
            <text:list-item>
              <text:p text:style-name="P9"><text:span text:style-name="T5">Refactored Instruments to be available for purchase outside of the mash tuns,</text:span></text:p>
            </text:list-item>
            <text:list-item>
              <text:p text:style-name="P9"><text:span text:style-name="T5">Fixed scaling issues,</text:span></text:p>
            </text:list-item>
            <text:list-item>
              <text:p text:style-name="P9"><text:span text:style-name="T5">Applied purchased upgrades to mash tu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5;p40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3">Gracjan B</text:span></text:p>
          </draw:text-box>
        </draw:frame>
        <presentation:notes draw:style-name="dp2">
          <draw:page-thumbnail draw:name="Google Shape;330;g3cd89a3d8da_0_24:notes" draw:style-name="gr1" draw:layer="layout" svg:width="16.932cm" svg:height="9.524cm" svg:x="1.059cm" svg:y="1.905cm" draw:page-number="3" presentation:class="page"/>
          <draw:frame draw:name="Google Shape;331;g3cd89a3d8da_0_24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ished Shop&#10;" draw:style-name="dp1" draw:master-page-name="BLANK">
        <draw:frame draw:name="Google Shape;340;p41" presentation:style-name="pr1" draw:text-style-name="P2" draw:layer="layout" svg:width="24.136cm" svg:height="5.012cm" svg:x="0.628cm" svg:y="0.402cm" presentation:class="title" presentation:user-transformed="true">
          <draw:text-box>
            <text:p text:style-name="P1"><text:span text:style-name="T2">Finished Shop</text:span><text:span text:style-name="T2"><text:line-break/></text:span><text:span text:style-name="T2"/></text:p>
          </draw:text-box>
        </draw:frame>
        <draw:frame draw:name="Google Shape;341;p41" draw:style-name="gr3" draw:text-style-name="P10" draw:layer="layout" svg:width="17.364cm" svg:height="10.078cm" svg:x="1.584cm" svg:y="2.857cm">
          <draw:image xlink:href="Pictures/100000000000026A0000016834E4A575F3D89693.jpg" xlink:type="simple" xlink:show="embed" xlink:actuate="onLoad">
            <text:p/>
          </draw:image>
        </draw:frame>
        <draw:frame draw:name="Google Shape;342;p41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3">Gracjan B</text:span></text:p>
          </draw:text-box>
        </draw:frame>
        <presentation:notes draw:style-name="dp2">
          <draw:page-thumbnail draw:name="Google Shape;337;g3cd89a3d8da_0_30:notes" draw:style-name="gr1" draw:layer="layout" svg:width="16.932cm" svg:height="9.524cm" svg:x="1.059cm" svg:y="1.905cm" draw:page-number="4" presentation:class="page"/>
          <draw:frame draw:name="Google Shape;338;g3cd89a3d8da_0_3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/CD workflow" draw:style-name="dp1" draw:master-page-name="BLANK">
        <draw:frame draw:name="Google Shape;347;p42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2">CI/CD workflow</text:span></text:p>
          </draw:text-box>
        </draw:frame>
        <draw:custom-shape draw:name="Google Shape;348;p42" draw:style-name="gr2" draw:text-style-name="P8" draw:layer="layout" svg:width="16.4cm" svg:height="10.574cm" svg:x="4.322cm" svg:y="2.43cm">
          <text:list text:style-name="L4">
            <text:list-item>
              <text:p text:style-name="P9"><text:span text:style-name="T5">Made precursory research to evaluate the feasibility of automated builds,</text:span></text:p>
            </text:list-item>
            <text:list-item>
              <text:p text:style-name="P9"><text:span text:style-name="T5">Created a working .yaml prototype for the rest of the team to take over,</text:span></text:p>
            </text:list-item>
            <text:list-item>
              <text:p text:style-name="P9"><text:span text:style-name="T5">Created a docker container with Unity package pre-installed to minimize the amount of time per buil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9;p42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3">Gracjan B</text:span></text:p>
          </draw:text-box>
        </draw:frame>
        <presentation:notes draw:style-name="dp2">
          <draw:page-thumbnail draw:name="Google Shape;344;g3cd89a3d8da_0_35:notes" draw:style-name="gr1" draw:layer="layout" svg:width="16.932cm" svg:height="9.524cm" svg:x="1.059cm" svg:y="1.905cm" draw:page-number="5" presentation:class="page"/>
          <draw:frame draw:name="Google Shape;345;g3cd89a3d8da_0_3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Google Shape;354;p43" draw:style-name="gr3" draw:text-style-name="P10" draw:layer="layout" svg:width="11.073cm" svg:height="12.952cm" svg:x="0.201cm" svg:y="0.551cm">
          <draw:image xlink:href="Pictures/10000201000002D50000035028AAE859EFA26B69.png" xlink:type="simple" xlink:show="embed" xlink:actuate="onLoad">
            <text:p/>
          </draw:image>
        </draw:frame>
        <draw:frame draw:name="Google Shape;355;p43" draw:style-name="gr3" draw:text-style-name="P10" draw:layer="layout" svg:width="9.762cm" svg:height="9.021cm" svg:x="11.677cm" svg:y="0.551cm">
          <draw:image xlink:href="Pictures/100002010000017100000155A4655AEEB28533D7.png" xlink:type="simple" xlink:show="embed" xlink:actuate="onLoad">
            <text:p/>
          </draw:image>
        </draw:frame>
        <draw:frame draw:name="Google Shape;356;p43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3">Gracjan B</text:span></text:p>
          </draw:text-box>
        </draw:frame>
        <presentation:notes draw:style-name="dp2">
          <draw:page-thumbnail draw:name="Google Shape;351;g3cd89a3d8da_0_40:notes" draw:style-name="gr1" draw:layer="layout" svg:width="16.932cm" svg:height="9.524cm" svg:x="1.059cm" svg:y="1.905cm" draw:page-number="6" presentation:class="page"/>
          <draw:frame draw:name="Google Shape;352;g3cd89a3d8da_0_4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rta’s progress" draw:style-name="dp1" draw:master-page-name="BLANK">
        <draw:frame draw:name="Google Shape;361;p44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2">Marta’s progress</text:span></text:p>
          </draw:text-box>
        </draw:frame>
        <draw:frame draw:name="Google Shape;362;p44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3">Gracjan B</text:span></text:p>
          </draw:text-box>
        </draw:frame>
        <draw:custom-shape draw:name="Google Shape;363;p44" draw:style-name="gr2" draw:text-style-name="P8" draw:layer="layout" svg:width="16.4cm" svg:height="10.574cm" svg:x="4.258cm" svg:y="2.452cm">
          <text:list text:style-name="L4">
            <text:list-item>
              <text:p text:style-name="P11"><text:span text:style-name="T6">🤌🤌 </text:span><text:span text:style-name="T6">(they’re doing well),</text:span></text:p>
            </text:list-item>
          </text:list>
          <text:list text:style-name="L5">
            <text:list-item>
              <text:p text:style-name="P11"><text:span text:style-name="T6">Found &amp; fixed the color bug in the UI,</text:span></text:p>
            </text:list-item>
            <text:list-item>
              <text:p text:style-name="P11"><text:span text:style-name="T6">Researched further instrument additions and compiled their findings into a document,</text:span></text:p>
            </text:list-item>
            <text:list-item>
              <text:p text:style-name="P11"><text:span text:style-name="T6">Refactored existing instruments to better reflect the new item names,</text:span></text:p>
            </text:list-item>
            <text:list-item>
              <text:p text:style-name="P11"><text:span text:style-name="T6">Started work on updating our UML desig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8;g3cd89a3d8da_0_45:notes" draw:style-name="gr1" draw:layer="layout" svg:width="16.932cm" svg:height="9.524cm" svg:x="1.059cm" svg:y="1.905cm" draw:page-number="7" presentation:class="page"/>
          <draw:frame draw:name="Google Shape;359;g3cd89a3d8da_0_4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or bug" draw:style-name="dp1" draw:master-page-name="BLANK">
        <draw:frame draw:name="Google Shape;368;p45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2">Color bug</text:span></text:p>
          </draw:text-box>
        </draw:frame>
        <draw:frame draw:name="Google Shape;369;p45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3">Gracjan B</text:span></text:p>
          </draw:text-box>
        </draw:frame>
        <draw:custom-shape draw:name="Google Shape;370;p45" draw:style-name="gr2" draw:text-style-name="P8" draw:layer="layout" svg:width="16.4cm" svg:height="10.574cm" svg:x="4.322cm" svg:y="2.43cm">
          <text:list text:style-name="L5">
            <text:list-item>
              <text:p text:style-name="P11"><text:span text:style-name="T6">Upon finalizing the Shop, the color of the indicator when brewing beers stopped changing due to having refactored the Instrument class</text:span></text:p>
            </text:list-item>
          </text:list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1;p45" draw:style-name="gr3" draw:text-style-name="P10" draw:layer="layout" svg:width="2.142cm" svg:height="4.047cm" svg:x="11.745cm" svg:y="6.782cm">
          <draw:image xlink:href="Pictures/10000000000000800000009AB736445BDEB6FBB2.jpg" xlink:type="simple" xlink:show="embed" xlink:actuate="onLoad">
            <text:p/>
          </draw:image>
        </draw:frame>
        <presentation:notes draw:style-name="dp2">
          <draw:page-thumbnail draw:name="Google Shape;365;g3cd89a3d8da_0_91:notes" draw:style-name="gr1" draw:layer="layout" svg:width="16.932cm" svg:height="9.524cm" svg:x="1.059cm" svg:y="1.905cm" draw:page-number="8" presentation:class="page"/>
          <draw:frame draw:name="Google Shape;366;g3cd89a3d8da_0_91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rumentation Research" draw:style-name="dp1" draw:master-page-name="BLANK">
        <draw:frame draw:name="Google Shape;376;p46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7">Instrumentation Research</text:span></text:p>
          </draw:text-box>
        </draw:frame>
        <draw:frame draw:name="Google Shape;377;p46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3">Gracjan B</text:span></text:p>
          </draw:text-box>
        </draw:frame>
        <draw:frame draw:name="Google Shape;378;p46" draw:style-name="gr3" draw:text-style-name="P10" draw:layer="layout" svg:width="10.264cm" svg:height="11.21cm" svg:x="1.114cm" svg:y="2.446cm">
          <draw:image xlink:href="Pictures/1000020100000234000002682CF37A4948266F47.png" xlink:type="simple" xlink:show="embed" xlink:actuate="onLoad">
            <text:p/>
          </draw:image>
        </draw:frame>
        <draw:frame draw:name="Google Shape;379;p46" draw:style-name="gr3" draw:text-style-name="P10" draw:layer="layout" svg:width="8.964cm" svg:height="9.456cm" svg:x="11.379cm" svg:y="2.558cm">
          <draw:image xlink:href="Pictures/10000201000002100000022D7D3C99FB7068890F.png" xlink:type="simple" xlink:show="embed" xlink:actuate="onLoad">
            <text:p/>
          </draw:image>
        </draw:frame>
        <draw:frame draw:name="Google Shape;380;p46" presentation:style-name="pr3" draw:text-style-name="P5" draw:layer="layout" svg:width="5.227cm" svg:height="8.287cm" svg:x="20.819cm" svg:y="10.431cm" presentation:class="subtitle" presentation:user-transformed="true">
          <draw:text-box>
            <text:p text:style-name="P4"><text:span text:style-name="T3">(...)</text:span></text:p>
          </draw:text-box>
        </draw:frame>
        <presentation:notes draw:style-name="dp2">
          <draw:page-thumbnail draw:name="Google Shape;373;g3cd89a3d8da_0_83:notes" draw:style-name="gr1" draw:layer="layout" svg:width="16.932cm" svg:height="9.524cm" svg:x="1.059cm" svg:y="1.905cm" draw:page-number="9" presentation:class="page"/>
          <draw:frame draw:name="Google Shape;374;g3cd89a3d8da_0_83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named Instruments" draw:style-name="dp1" draw:master-page-name="BLANK">
        <draw:frame draw:name="Google Shape;385;p47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7">Renamed Instruments</text:span></text:p>
          </draw:text-box>
        </draw:frame>
        <draw:frame draw:name="Google Shape;386;p47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3">Gracjan B</text:span></text:p>
          </draw:text-box>
        </draw:frame>
        <draw:custom-shape draw:name="Google Shape;387;p47" draw:style-name="gr2" draw:text-style-name="P8" draw:layer="layout" svg:width="16.4cm" svg:height="10.574cm" svg:x="4.322cm" svg:y="2.43cm">
          <text:list text:style-name="L5">
            <text:list-item>
              <text:p text:style-name="P11"><text:span text:style-name="T6">AutoStopValve -&gt; FloatSwitch</text:span></text:p>
            </text:list-item>
            <text:list-item>
              <text:p text:style-name="P11"><text:span text:style-name="T6">WaterLevelGauge -&gt; SightGlass</text:span></text:p>
            </text:list-item>
          </text:list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2;g3cd89a3d8da_0_101:notes" draw:style-name="gr1" draw:layer="layout" svg:width="16.932cm" svg:height="9.524cm" svg:x="1.059cm" svg:y="1.905cm" draw:page-number="10" presentation:class="page"/>
          <draw:frame draw:name="Google Shape;383;g3cd89a3d8da_0_101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g UML" draw:style-name="dp1" draw:master-page-name="BLANK">
        <draw:frame draw:name="Google Shape;392;p48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7">Big UML</text:span></text:p>
          </draw:text-box>
        </draw:frame>
        <draw:frame draw:name="Google Shape;393;p48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3">Gracjan B</text:span></text:p>
          </draw:text-box>
        </draw:frame>
        <draw:frame draw:name="Google Shape;394;p48" draw:style-name="gr3" draw:text-style-name="P10" draw:layer="layout" svg:width="12.186cm" svg:height="11.506cm" svg:x="3.845cm" svg:y="2.15cm">
          <draw:image xlink:href="Pictures/100002010000035D0000032D130C3F8E15AB01F0.png" xlink:type="simple" xlink:show="embed" xlink:actuate="onLoad">
            <text:p/>
          </draw:image>
        </draw:frame>
        <presentation:notes draw:style-name="dp2">
          <draw:page-thumbnail draw:name="Google Shape;389;g3cd89a3d8da_0_119:notes" draw:style-name="gr1" draw:layer="layout" svg:width="16.932cm" svg:height="9.524cm" svg:x="1.059cm" svg:y="1.905cm" draw:page-number="11" presentation:class="page"/>
          <draw:frame draw:name="Google Shape;390;g3cd89a3d8da_0_119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mated Testing" draw:style-name="dp1" draw:master-page-name="BLANK">
        <draw:frame draw:name="Google Shape;399;p49" presentation:style-name="pr1" draw:text-style-name="P2" draw:layer="layout" svg:width="25.635cm" svg:height="2.386cm" svg:x="0.346cm" svg:y="0.402cm" presentation:class="title" presentation:user-transformed="true">
          <draw:text-box>
            <text:p text:style-name="P1"><text:span text:style-name="T8">Automated Testing</text:span></text:p>
          </draw:text-box>
        </draw:frame>
        <draw:custom-shape draw:name="Google Shape;400;p49" draw:style-name="gr2" draw:text-style-name="P8" draw:layer="layout" svg:width="22.452cm" svg:height="7.326cm" svg:x="3.266cm" svg:y="3.341cm">
          <text:list text:style-name="L4">
            <text:list-item>
              <text:p text:style-name="P9"><text:span text:style-name="T5">Using EditMode tests for core game logic without UI</text:span></text:p>
            </text:list-item>
            <text:list-item>
              <text:p text:style-name="P9"><text:span text:style-name="T5">Can run automatically on pull request</text:span></text:p>
            </text:list-item>
          </text:list>
          <text:p text:style-name="P7"><text:span text:style-name="T5"/></text:p>
          <text:list text:continue-numbering="true" text:style-name="L4">
            <text:list-item>
              <text:p text:style-name="P4"><text:span text:style-name="T5">Serialized fields require a workaround for test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1;p49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3">Bruce G</text:span></text:p>
          </draw:text-box>
        </draw:frame>
        <presentation:notes draw:style-name="dp2">
          <draw:page-thumbnail draw:name="Google Shape;396;g3cd89a3d8da_0_132:notes" draw:style-name="gr1" draw:layer="layout" svg:width="16.932cm" svg:height="9.524cm" svg:x="1.059cm" svg:y="1.905cm" draw:page-number="12" presentation:class="page"/>
          <draw:frame draw:name="Google Shape;397;g3cd89a3d8da_0_132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Brewing Game’s Team" draw:style-name="dp1" draw:master-page-name="BLANK">
        <draw:frame draw:name="Google Shape;406;p50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2">Thank you!</text:span></text:p>
          </draw:text-box>
        </draw:frame>
        <draw:frame draw:name="Google Shape;407;p50" presentation:style-name="pr2" draw:text-style-name="P2" draw:layer="layout" svg:width="27.658cm" svg:height="6.333cm" svg:x="-2.468cm" svg:y="7.721cm" presentation:class="title" presentation:user-transformed="true">
          <draw:text-box>
            <text:p text:style-name="P3"><text:span text:style-name="T9">The Brewing Game’s Team</text:span></text:p>
          </draw:text-box>
        </draw:frame>
        <presentation:notes draw:style-name="dp2">
          <draw:page-thumbnail draw:name="Google Shape;403;g3c2cabe9ccb_0_390:notes" draw:style-name="gr1" draw:layer="layout" svg:width="16.932cm" svg:height="9.524cm" svg:x="1.059cm" svg:y="1.905cm" draw:page-number="13" presentation:class="page"/>
          <draw:frame draw:name="Google Shape;404;g3c2cabe9ccb_0_390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Space Grotesk" svg:font-family="'Space Grotesk'"/>
    <style:font-face style:name="Space Grotesk Light" svg:font-family="'Space Grotesk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08585" draw:end-color="#070707" draw:start-intensity="100%" draw:end-intensity="100%" draw:angle="2991" draw:border="0%"/>
    <draw:gradient draw:name="msFillGradient_20_1" draw:display-name="msFillGradient 1" draw:style="linear" draw:start-color="#008585" draw:end-color="#070707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gradient" draw:fill-gradient-name="msFillGradient_20_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custom-shape draw:name="Google Shape;9;p2" draw:style-name="Mgr3" draw:text-style-name="MP5" draw:layer="backgroundobjects" svg:width="21.703cm" svg:height="21.703cm" draw:transform="rotate (-1.06447631079134) translate (25.869cm -7.61cm)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0;p2" presentation:style-name="BLANK-title" draw:layer="backgroundobjects" svg:width="24.136cm" svg:height="5.419cm" svg:x="0.628cm" svg:y="0.402cm" presentation:class="title" presentation:placeholder="true" presentation:user-transformed="true">
        <draw:text-box/>
      </draw:frame>
      <draw:frame draw:name="Google Shape;11;p2" presentation:style-name="BLANK-title" draw:layer="backgroundobjects" svg:width="20.974cm" svg:height="6.333cm" svg:x="3.901cm" svg:y="7.735cm" presentation:class="title" presentation:placeholder="true" presentation:user-transformed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6.0.5.2$Linux_X86_64 LibreOffice_project/</meta:generator>
  </office:meta>
</office:document-meta>
</file>