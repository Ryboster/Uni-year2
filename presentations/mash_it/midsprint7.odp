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9000001841B79271BD6E37D01.png" manifest:media-type="image/png"/>
  <manifest:file-entry manifest:full-path="Pictures/1000010300000320000001C4F5D0563D3527BBEA.gif" manifest:media-type="image/gif"/>
  <manifest:file-entry manifest:full-path="Pictures/100000BE00000320000001C46C7E74A4994D820F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6" style:family="text">
      <style:text-properties fo:font-variant="normal" fo:text-transform="none" fo:color="#81f5ff" style:text-line-through-style="none" style:text-line-through-type="none" style:text-position="0% 100%" style:font-name="Space Grotesk Light" fo:font-size="41pt" fo:letter-spacing="normal" fo:font-style="normal" style:text-underline-style="none" fo:font-weight="normal" style:font-name-asian="Space Grotesk Light" style:font-size-asian="41pt" style:font-style-asian="normal" style:font-weight-asian="normal" style:font-name-complex="Space Grotesk Light" style:font-size-complex="4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8" style:family="text">
      <style:text-properties fo:font-variant="normal" fo:text-transform="none" fo:color="#81f5ff" style:text-line-through-style="none" style:text-line-through-type="none" style:text-position="0% 100%" style:font-name="Space Grotesk Light" fo:font-size="52pt" fo:letter-spacing="normal" fo:font-style="normal" style:text-underline-style="none" fo:font-weight="normal" style:font-name-asian="Space Grotesk Light" style:font-size-asian="52pt" style:font-style-asian="normal" style:font-weight-asian="normal" style:font-name-complex="Space Grotesk Light" style:font-size-complex="5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pace Grotesk Light" fo:font-size="52pt" fo:letter-spacing="normal" fo:font-style="normal" style:text-underline-style="none" fo:font-weight="normal" style:font-name-asian="Space Grotesk Light" style:font-size-asian="52pt" style:font-style-asian="normal" style:font-weight-asian="normal" style:font-name-complex="Space Grotesk Light" style:font-size-complex="52pt" style:font-style-complex="normal" style:font-weight-complex="normal"/>
    </style:style>
    <style:style style:name="T10" style:family="text">
      <style:text-properties fo:font-variant="normal" fo:text-transform="none" fo:color="#81f5ff" style:text-line-through-style="none" style:text-line-through-type="none" style:text-position="0% 100%" style:font-name="Space Grotesk" fo:font-size="24pt" fo:letter-spacing="normal" fo:font-style="normal" style:text-underline-style="none" fo:font-weight="normal" style:font-name-asian="Space Grotesk" style:font-size-asian="24pt" style:font-style-asian="normal" style:font-weight-asian="normal" style:font-name-complex="Space Grotesk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❏">
        <style:list-level-properties text:space-before="1.51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7 - mid Sprint</text:span></text:p>
          </draw:text-box>
        </draw:frame>
        <draw:frame draw:name="Google Shape;320;p38" presentation:style-name="pr2" draw:text-style-name="P2" draw:layer="layout" svg:width="20.974cm" svg:height="6.333cm" svg:x="3.79cm" svg:y="7.789cm" presentation:class="title" presentation:user-transformed="true">
          <draw:text-box>
            <text:p text:style-name="P3"><text:span text:style-name="T2">The Brewing Game</text:span></text:p>
          </draw:text-box>
        </draw:frame>
        <draw:frame draw:name="Google Shape;321;p38" presentation:style-name="pr3" draw:text-style-name="P5" draw:layer="layout" svg:width="14.187cm" svg:height="8.287cm" svg:x="0.628cm" svg:y="6.306cm" presentation:class="subtitle" presentation:user-transformed="true">
          <draw:text-box>
            <text:p text:style-name="P4"><text:span text:style-name="T3">20th February 2026</text:span><text:span text:style-name="T3"><text:line-break/></text:span><text:span text:style-name="T4">Gracjan Blazejowski</text:span></text:p>
            <text:p text:style-name="P4"><text:span text:style-name="T4">Bruce Gray</text:span></text:p>
            <text:p text:style-name="P4"><text:span text:style-name="T4">Marta Grazia</text:span></text:p>
            <text:p text:style-name="P4"><text:span text:style-name="T4">Sergio Eneide</text:span></text:p>
            <text:p text:style-name="P4"><text:span text:style-name="T4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26;p39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27;p39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28;p39" draw:style-name="gr2" draw:text-style-name="P8" draw:layer="layout" svg:width="16.4cm" svg:height="9.608cm" svg:x="6.153cm" svg:y="3.022cm">
          <text:list text:style-name="L3">
            <text:list-item>
              <text:p text:style-name="P7"><text:span text:style-name="T5">User Feedback integration</text:span></text:p>
            </text:list-item>
            <text:list-item>
              <text:p text:style-name="P7"><text:span text:style-name="T5">Reassess roadmap</text:span></text:p>
            </text:list-item>
            <text:list-item>
              <text:p text:style-name="P7"><text:span text:style-name="T5">Accessibility feature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Keyboard controls</text:span></text:p>
                </text:list-item>
                <text:list-item>
                  <text:p text:style-name="P7"><text:span text:style-name="T5">Text To Speech</text:span></text:p>
                </text:list-item>
                <text:list-item>
                  <text:p text:style-name="P7"><text:span text:style-name="T5">Tutorial</text:span></text:p>
                </text:list-item>
              </text:list>
            </text:list-item>
            <text:list-item>
              <text:p text:style-name="P7"><text:span text:style-name="T5">Intro Narrative Script</text:span></text:p>
            </text:list-item>
            <text:list-item>
              <text:p text:style-name="P7"><text:span text:style-name="T5">Rich text storage research and implementation</text:span></text:p>
            </text:list-item>
            <text:list-item>
              <text:p text:style-name="P7"><text:span text:style-name="T5">Instrument Shop 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c7e6a59d7c_0_26:notes" draw:style-name="gr1" draw:layer="layout" svg:width="16.932cm" svg:height="9.524cm" svg:x="1.059cm" svg:y="1.905cm" draw:page-number="2" presentation:class="page"/>
          <draw:frame draw:name="Google Shape;324;g3c7e6a59d7c_0_2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&#10;Tabbing Navigation and Selection Feedback&#10;" draw:style-name="dp1" draw:master-page-name="BLANK">
        <draw:frame draw:name="Google Shape;333;p40" presentation:style-name="pr1" draw:text-style-name="P2" draw:layer="layout" svg:width="24.913cm" svg:height="6.158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Tabbing Navigation and Selection Feedback</text:span><text:span text:style-name="T6"><text:line-break/></text:span><text:span text:style-name="T6"/></text:p>
          </draw:text-box>
        </draw:frame>
        <draw:frame draw:name="Google Shape;334;p40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35;p40" draw:style-name="gr2" draw:text-style-name="P8" draw:layer="layout" svg:width="15.724cm" svg:height="7.326cm" svg:x="5.791cm" svg:y="5.509cm">
          <text:list text:style-name="L3">
            <text:list-item>
              <text:p text:style-name="P7"><text:span text:style-name="T5">Additional way to interact with the game</text:span></text:p>
            </text:list-item>
            <text:list-item>
              <text:p text:style-name="P7"><text:span text:style-name="T5">Quality Of Life Addition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Selection feedback</text:span></text:p>
                </text:list-item>
                <text:list-item>
                  <text:p text:style-name="P7"><text:span text:style-name="T5">Active/Inactive HUD</text:span></text:p>
                </text:list-item>
                <text:list-item>
                  <text:p text:style-name="P7"><text:span text:style-name="T5">Changed Hover Highlight colo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0;g3c2cabe9ccb_0_343:notes" draw:style-name="gr1" draw:layer="layout" svg:width="16.932cm" svg:height="9.524cm" svg:x="1.059cm" svg:y="1.905cm" draw:page-number="3" presentation:class="page"/>
          <draw:frame draw:name="Google Shape;331;g3c2cabe9ccb_0_34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&#10;Tabbing Navigation and Selection Feedback&#10;" draw:style-name="dp1" draw:master-page-name="BLANK">
        <draw:frame draw:name="Google Shape;340;p41" presentation:style-name="pr1" draw:text-style-name="P2" draw:layer="layout" svg:width="25.758cm" svg:height="6.158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Tabbing Navigation and Selection Feedback</text:span><text:span text:style-name="T6"><text:line-break/></text:span><text:span text:style-name="T6"/></text:p>
          </draw:text-box>
        </draw:frame>
        <draw:frame draw:name="Google Shape;341;p41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42;p41" draw:style-name="gr3" draw:text-style-name="P9" draw:layer="layout" svg:width="14.23cm" svg:height="8.039cm" svg:x="6.482cm" svg:y="4.636cm">
          <draw:image xlink:href="Pictures/100000BE00000320000001C46C7E74A4994D820F.gif" xlink:type="simple" xlink:show="embed" xlink:actuate="onLoad">
            <text:p/>
          </draw:image>
        </draw:frame>
        <draw:custom-shape draw:name="Google Shape;343;p41" draw:style-name="gr2" draw:text-style-name="P8" draw:layer="layout" svg:width="7.77cm" svg:height="0.8cm" svg:x="9.871cm" svg:y="12.605cm">
          <text:p text:style-name="P4"><text:span text:style-name="T7">Input Feedback integration + Quality of li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g3bf26b3b2ea_0_2:notes" draw:style-name="gr1" draw:layer="layout" svg:width="16.932cm" svg:height="9.524cm" svg:x="1.059cm" svg:y="1.905cm" draw:page-number="4" presentation:class="page"/>
          <draw:frame draw:name="Google Shape;338;g3bf26b3b2ea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&#10;Tabbing Navigation and Selection Feedback&#10;" draw:style-name="dp1" draw:master-page-name="BLANK">
        <draw:frame draw:name="Google Shape;348;p42" presentation:style-name="pr1" draw:text-style-name="P2" draw:layer="layout" svg:width="24.913cm" svg:height="6.158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Tabbing Navigation and Selection Feedback</text:span><text:span text:style-name="T6"><text:line-break/></text:span><text:span text:style-name="T6"/></text:p>
          </draw:text-box>
        </draw:frame>
        <draw:frame draw:name="Google Shape;349;p42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50;p42" draw:style-name="gr3" draw:text-style-name="P9" draw:layer="layout" svg:width="14.158cm" svg:height="7.999cm" svg:x="6.473cm" svg:y="4.662cm">
          <draw:image xlink:href="Pictures/1000010300000320000001C4F5D0563D3527BBEA.gif" xlink:type="simple" xlink:show="embed" xlink:actuate="onLoad">
            <text:p/>
          </draw:image>
        </draw:frame>
        <draw:custom-shape draw:name="Google Shape;351;p42" draw:style-name="gr2" draw:text-style-name="P8" draw:layer="layout" svg:width="3.647cm" svg:height="0.8cm" svg:x="11.969cm" svg:y="12.907cm">
          <text:p text:style-name="P4"><text:span text:style-name="T7">Keyboard Contr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5;g3bf26b3b2ea_0_12:notes" draw:style-name="gr1" draw:layer="layout" svg:width="16.932cm" svg:height="9.524cm" svg:x="1.059cm" svg:y="1.905cm" draw:page-number="5" presentation:class="page"/>
          <draw:frame draw:name="Google Shape;346;g3bf26b3b2ea_0_1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ed Rich Text Storage in Unity" draw:style-name="dp1" draw:master-page-name="BLANK">
        <draw:frame draw:name="Google Shape;356;p43" presentation:style-name="pr1" draw:text-style-name="P2" draw:layer="layout" svg:width="24.136cm" svg:height="3.741cm" svg:x="0.628cm" svg:y="0.402cm" presentation:class="title" presentation:user-transformed="true">
          <draw:text-box>
            <text:p text:style-name="P1"><text:span text:style-name="T8">Researched Rich Text Storage in Unity</text:span></text:p>
          </draw:text-box>
        </draw:frame>
        <draw:frame draw:name="Google Shape;357;p43" presentation:style-name="pr3" draw:text-style-name="P5" draw:layer="layout" svg:width="4.516cm" svg:height="8.287cm" svg:x="20.248cm" svg:y="12.756cm" presentation:class="subtitle" presentation:user-transformed="true">
          <draw:text-box>
            <text:p text:style-name="P4"><text:span text:style-name="T3">Bruce Gray</text:span></text:p>
          </draw:text-box>
        </draw:frame>
        <draw:custom-shape draw:name="Google Shape;358;p43" draw:style-name="gr2" draw:text-style-name="P8" draw:layer="layout" svg:width="16.4cm" svg:height="7.326cm" svg:x="0.96cm" svg:y="4.846cm">
          <text:list text:style-name="L3">
            <text:list-item>
              <text:p text:style-name="P7"><text:span text:style-name="T5">Researched rich text loading and storage in unity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Direct storage in Unity objects</text:span></text:p>
                </text:list-item>
                <text:list-item>
                  <text:p text:style-name="P7"><text:span text:style-name="T5">JSON storage</text:span></text:p>
                </text:list-item>
              </text:list>
            </text:list-item>
            <text:list-item>
              <text:p text:style-name="P7"><text:span text:style-name="T5">Text To Speech consider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43" draw:style-name="gr3" draw:text-style-name="P9" draw:layer="layout" svg:width="11.785cm" svg:height="6.714cm" svg:x="16.021cm" svg:y="4.429cm">
          <draw:image xlink:href="Pictures/10000201000002A9000001841B79271BD6E37D01.png" xlink:type="simple" xlink:show="embed" xlink:actuate="onLoad">
            <text:p/>
          </draw:image>
        </draw:frame>
        <presentation:notes draw:style-name="dp2">
          <draw:page-thumbnail draw:name="Google Shape;353;g3c61420dfc0_0_1:notes" draw:style-name="gr1" draw:layer="layout" svg:width="16.932cm" svg:height="9.524cm" svg:x="1.059cm" svg:y="1.905cm" draw:page-number="6" presentation:class="page"/>
          <draw:frame draw:name="Google Shape;354;g3c61420dfc0_0_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Instruments Shop - WIP" draw:style-name="dp1" draw:master-page-name="BLANK">
        <draw:frame draw:name="Google Shape;364;p44" presentation:style-name="pr1" draw:text-style-name="P2" draw:layer="layout" svg:width="24.142cm" svg:height="3.741cm" svg:x="0.629cm" svg:y="0.5cm" presentation:class="title" presentation:user-transformed="true">
          <draw:text-box>
            <text:p text:style-name="P1"><text:span text:style-name="T9">Implementing Instruments Shop - WIP</text:span></text:p>
          </draw:text-box>
        </draw:frame>
        <draw:custom-shape draw:name="Google Shape;365;p44" draw:style-name="gr4" draw:text-style-name="P8" draw:layer="layout" svg:width="8.157cm" svg:height="1.017cm" svg:x="16.613cm" svg:y="12.634cm">
          <text:p text:style-name="P4"><text:span text:style-name="T10">Gracjan Blazejow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44" draw:style-name="gr2" draw:text-style-name="P8" draw:layer="layout" svg:width="16.4cm" svg:height="7.326cm" svg:x="5.544cm" svg:y="4.611cm">
          <text:list text:style-name="L3">
            <text:list-item>
              <text:p text:style-name="P7"><text:span text:style-name="T5">Users expressed interest in puzzle-focused gameplay</text:span></text:p>
            </text:list-item>
            <text:list-item>
              <text:p text:style-name="P7"><text:span text:style-name="T5">Picking the instrument to install adds cognitive work helping the educational process</text:span></text:p>
            </text:list-item>
            <text:list-item>
              <text:p text:style-name="P7"><text:span text:style-name="T5">Current upgrade system already meets MV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3c2cabe9ccb_0_365:notes" draw:style-name="gr1" draw:layer="layout" svg:width="16.932cm" svg:height="9.524cm" svg:x="1.059cm" svg:y="1.905cm" draw:page-number="7" presentation:class="page"/>
          <draw:frame draw:name="Google Shape;362;g3c2cabe9ccb_0_36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371;p45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372;p45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11">The Brewing Game’s Team</text:span></text:p>
          </draw:text-box>
        </draw:frame>
        <presentation:notes draw:style-name="dp2">
          <draw:page-thumbnail draw:name="Google Shape;368;g3c2cabe9ccb_0_390:notes" draw:style-name="gr1" draw:layer="layout" svg:width="16.932cm" svg:height="9.524cm" svg:x="1.059cm" svg:y="1.905cm" draw:page-number="8" presentation:class="page"/>
          <draw:frame draw:name="Google Shape;369;g3c2cabe9ccb_0_39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