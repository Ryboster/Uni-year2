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4A000002B613E21E3C35AAB48E.png" manifest:media-type="image/png"/>
  <manifest:file-entry manifest:full-path="Pictures/100000000000080000000800A97F1A5804C4E9B2.jpg" manifest:media-type="image/jpeg"/>
  <manifest:file-entry manifest:full-path="Pictures/10000000000008000000080022DD9ADB0B4FACB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4741" draw:stroke-linejoin="round" draw:fill="solid" draw:fill-color="#f4f4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4f4f4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85%" fo:text-align="start" fo:text-indent="0cm" style:writing-mode="lr-tb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pace Grotesk Light" fo:font-size="32pt" fo:letter-spacing="normal" fo:font-style="normal" style:text-underline-style="none" fo:font-weight="normal" style:font-name-asian="Space Grotesk Light" style:font-size-asian="32pt" style:font-style-asian="normal" style:font-weight-asian="normal" style:font-name-complex="Space Grotesk Light" style:font-size-complex="32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pace Grotesk Light" fo:font-size="48pt" fo:letter-spacing="normal" fo:font-style="normal" style:text-underline-style="none" fo:font-weight="normal" style:font-name-asian="Space Grotesk Light" style:font-size-asian="48pt" style:font-style-asian="normal" style:font-weight-asian="normal" style:font-name-complex="Space Grotesk Light" style:font-size-complex="4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pace Grotesk" fo:font-size="18pt" fo:letter-spacing="normal" fo:font-style="normal" style:text-underline-style="none" fo:font-weight="normal" style:font-name-asian="Space Grotesk" style:font-size-asian="18pt" style:font-style-asian="normal" style:font-weight-asian="normal" style:font-name-complex="Space Grotesk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pace Grotesk Light" fo:font-size="58pt" fo:letter-spacing="normal" fo:font-style="normal" style:text-underline-style="none" fo:font-weight="normal" style:font-name-asian="Space Grotesk Light" style:font-size-asian="58pt" style:font-style-asian="normal" style:font-weight-asian="normal" style:font-name-complex="Space Grotesk Light" style:font-size-complex="5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pace Grotesk Light" fo:font-size="53pt" fo:letter-spacing="normal" fo:font-style="normal" style:text-underline-style="none" fo:font-weight="normal" style:font-name-asian="Space Grotesk Light" style:font-size-asian="53pt" style:font-style-asian="normal" style:font-weight-asian="normal" style:font-name-complex="Space Grotesk Light" style:font-size-complex="5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pace Grotesk Light" fo:font-size="22pt" fo:letter-spacing="normal" fo:font-style="normal" style:text-underline-style="none" fo:font-weight="normal" style:font-name-asian="Space Grotesk Light" style:font-size-asian="22pt" style:font-style-asian="normal" style:font-weight-asian="normal" style:font-name-complex="Space Grotesk Light" style:font-size-complex="2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❏">
        <style:list-level-properties text:space-before="1.51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❏">
        <style:list-level-properties text:space-before="1.588cm" text:min-label-width="0.95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❏">
        <style:list-level-properties text:space-before="1.588cm" text:min-label-width="0.952cm"/>
        <style:text-properties style:font-name="Space Grotesk" fo:color="#ffffff" fo:font-size="100%"/>
      </text:list-level-style-bullet>
      <text:list-level-style-bullet text:level="3" text:bullet-char="❏">
        <style:list-level-properties text:space-before="2.858cm" text:min-label-width="0.952cm"/>
        <style:text-properties style:font-name="Space Grotesk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❏">
        <style:list-level-properties text:space-before="0.248cm" text:min-label-width="1.022cm"/>
        <style:text-properties style:font-name="Space Grotesk Ligh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&#10;(Mash It!)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Mid-Sprint Review 10</text:span></text:p>
          </draw:text-box>
        </draw:frame>
        <draw:frame draw:name="Google Shape;320;p38" presentation:style-name="pr2" draw:text-style-name="P2" draw:layer="layout" svg:width="20.974cm" svg:height="6.333cm" svg:x="3.79cm" svg:y="7.784cm" presentation:class="title" presentation:user-transformed="true">
          <draw:text-box>
            <text:p text:style-name="P3"><text:span text:style-name="T2">The Brewing Game</text:span><text:span text:style-name="T2"><text:line-break/></text:span><text:span text:style-name="T3">(Mash It!)</text:span></text:p>
          </draw:text-box>
        </draw:frame>
        <draw:frame draw:name="Google Shape;321;p38" presentation:style-name="pr3" draw:text-style-name="P5" draw:layer="layout" svg:width="14.187cm" svg:height="8.287cm" svg:x="0.628cm" svg:y="5.7cm" presentation:class="subtitle" presentation:user-transformed="true">
          <draw:text-box>
            <text:p text:style-name="P4"><text:span text:style-name="T4">2nd April 2026</text:span><text:span text:style-name="T4"><text:line-break/></text:span><text:span text:style-name="T5">Gracjan Blazejowski</text:span></text:p>
            <text:p text:style-name="P4"><text:span text:style-name="T5">Bruce Gray</text:span></text:p>
            <text:p text:style-name="P4"><text:span text:style-name="T5">Marta Grazia</text:span></text:p>
            <text:p text:style-name="P4"><text:span text:style-name="T5">Sergio Eneide</text:span></text:p>
            <text:p text:style-name="P4"><text:span text:style-name="T5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26;p39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27;p39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custom-shape draw:name="Google Shape;328;p39" draw:style-name="gr2" draw:text-style-name="P8" draw:layer="layout" svg:width="16.4cm" svg:height="10.574cm" svg:x="4.496cm" svg:y="2.727cm">
          <text:p text:style-name="P7"><text:span text:style-name="T6"/></text:p>
          <text:list text:style-name="L4">
            <text:list-item>
              <text:p text:style-name="P4"><text:span text:style-name="T6">Playtesting notes into reports</text:span></text:p>
            </text:list-item>
            <text:list-item>
              <text:p text:style-name="P4"><text:span text:style-name="T6">Created tickets to address issues/feedback</text:span></text:p>
            </text:list-item>
            <text:list-item>
              <text:p text:style-name="P4"><text:span text:style-name="T6">Red Amber Green (RAG) Analysis for ticket priority</text:span></text:p>
            </text:list-item>
            <text:list-item>
              <text:p text:style-name="P4"><text:span text:style-name="T6">Sprint planning tackling most urgent (Red) ticke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c7e6a59d7c_0_26:notes" draw:style-name="gr1" draw:layer="layout" svg:width="16.932cm" svg:height="9.524cm" svg:x="1.059cm" svg:y="1.905cm" draw:page-number="2" presentation:class="page"/>
          <draw:frame draw:name="Google Shape;324;g3c7e6a59d7c_0_2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ytesting reports" draw:style-name="dp1" draw:master-page-name="BLANK">
        <draw:frame draw:name="Google Shape;333;p40" presentation:style-name="pr1" draw:text-style-name="P2" draw:layer="layout" svg:width="25.399cm" svg:height="2.386cm" svg:x="0.205cm" svg:y="0.43cm" presentation:class="title" presentation:user-transformed="true">
          <draw:text-box>
            <text:p text:style-name="P1"><text:span text:style-name="T7">Playtesting reports</text:span></text:p>
          </draw:text-box>
        </draw:frame>
        <draw:custom-shape draw:name="Google Shape;334;p40" draw:style-name="gr2" draw:text-style-name="P8" draw:layer="layout" svg:width="16.4cm" svg:height="10.574cm" svg:x="1.312cm" svg:y="2.72cm">
          <text:p text:style-name="P7"><text:span text:style-name="T6"/></text:p>
          <text:list text:style-name="L4">
            <text:list-item>
              <text:p text:style-name="P4"><text:span text:style-name="T6">Transcribed notes into reports to describe how the session went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6">User Experience</text:span></text:p>
                </text:list-item>
                <text:list-item>
                  <text:p text:style-name="P4"><text:span text:style-name="T6">User Interface</text:span></text:p>
                </text:list-item>
                <text:list-item>
                  <text:p text:style-name="P4"><text:span text:style-name="T6">Game Loop</text:span></text:p>
                </text:list-item>
                <text:list-item>
                  <text:p text:style-name="P4"><text:span text:style-name="T6">General Feedbac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40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frame draw:name="Google Shape;336;p40" draw:style-name="gr3" draw:text-style-name="P9" draw:layer="layout" svg:width="4.142cm" svg:height="4.142cm" svg:x="16.634cm" svg:y="2.174cm">
          <draw:image xlink:href="Pictures/10000000000008000000080022DD9ADB0B4FACBD.jpg" xlink:type="simple" xlink:show="embed" xlink:actuate="onLoad">
            <text:p/>
          </draw:image>
        </draw:frame>
        <draw:frame draw:name="Google Shape;337;p40" draw:style-name="gr3" draw:text-style-name="P9" draw:layer="layout" svg:width="4.142cm" svg:height="4.142cm" svg:x="16.634cm" svg:y="7.676cm">
          <draw:image xlink:href="Pictures/100000000000080000000800A97F1A5804C4E9B2.jpg" xlink:type="simple" xlink:show="embed" xlink:actuate="onLoad">
            <text:p/>
          </draw:image>
        </draw:frame>
        <draw:custom-shape draw:name="Google Shape;338;p40" draw:style-name="gr4" draw:text-style-name="P10" xml:id="id1" draw:id="id1" draw:layer="layout" svg:width="3.083cm" svg:height="5.121cm" svg:x="21.029cm" svg:y="4.583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330;g3cd89a3d8da_0_24:notes" draw:style-name="gr1" draw:layer="layout" svg:width="16.932cm" svg:height="9.524cm" svg:x="1.059cm" svg:y="1.905cm" draw:page-number="3" presentation:class="page"/>
          <draw:frame draw:name="Google Shape;331;g3cd89a3d8da_0_2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 findings" draw:style-name="dp1" draw:master-page-name="BLANK">
        <draw:frame draw:name="Google Shape;343;p41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Key findings</text:span></text:p>
          </draw:text-box>
        </draw:frame>
        <draw:frame draw:name="Google Shape;344;p41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Bruce G</text:span></text:p>
          </draw:text-box>
        </draw:frame>
        <draw:custom-shape draw:name="Google Shape;345;p41" draw:style-name="gr2" draw:text-style-name="P8" draw:layer="layout" svg:width="25.691cm" svg:height="10.574cm" svg:x="1.312cm" svg:y="2.72cm">
          <text:list text:style-name="L6">
            <text:list-item>
              <text:list>
                <text:list-item>
                  <text:p text:style-name="P11"><text:span text:style-name="T8">Recurring issu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1"><text:span text:style-name="T8">Settings bug appeared on every session</text:span></text:p>
                    </text:list-item>
                    <text:list-item>
                      <text:p text:style-name="P11"><text:span text:style-name="T8">Float switch function initially unclear</text:span></text:p>
                    </text:list-item>
                  </text:list>
                </text:list-item>
                <text:list-item>
                  <text:p text:style-name="P11"><text:span text:style-name="T8">What worked well</text:span></text:p>
                  <text:list>
                    <text:list-item>
                      <text:p text:style-name="P11"><text:span text:style-name="T8">Shop used intuitively</text:span></text:p>
                    </text:list-item>
                    <text:list-item>
                      <text:p text:style-name="P11"><text:span text:style-name="T8">Optimal water level discovery</text:span></text:p>
                    </text:list-item>
                    <text:list-item>
                      <text:p text:style-name="P11"><text:span text:style-name="T8">UI</text:span></text:p>
                    </text:list-item>
                  </text:list>
                </text:list-item>
                <text:list-item>
                  <text:p text:style-name="P11"><text:span text:style-name="T8">Other notable feedback</text:span></text:p>
                  <text:list>
                    <text:list-item>
                      <text:p text:style-name="P11"><text:span text:style-name="T8">Mash tuns not consistently interacted with</text:span></text:p>
                    </text:list-item>
                    <text:list-item>
                      <text:p text:style-name="P11"><text:span text:style-name="T8">Win condition not remembered</text:span></text:p>
                    </text:list-item>
                    <text:list-item>
                      <text:p text:style-name="P11"><text:span text:style-name="T8">Per-brew score unclear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3d420b1390d_0_0:notes" draw:style-name="gr1" draw:layer="layout" svg:width="16.932cm" svg:height="9.524cm" svg:x="1.059cm" svg:y="1.905cm" draw:page-number="4" presentation:class="page"/>
          <draw:frame draw:name="Google Shape;341;g3d420b1390d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G Analysis" draw:style-name="dp1" draw:master-page-name="BLANK">
        <draw:frame draw:name="Google Shape;350;p42" presentation:style-name="pr1" draw:text-style-name="P2" draw:layer="layout" svg:width="27.481cm" svg:height="2.386cm" svg:x="0.628cm" svg:y="0.402cm" presentation:class="title" presentation:user-transformed="true">
          <draw:text-box>
            <text:p text:style-name="P1"><text:span text:style-name="T9">RAG Analysis</text:span></text:p>
          </draw:text-box>
        </draw:frame>
        <draw:frame draw:name="Google Shape;351;p42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custom-shape draw:name="Google Shape;352;p42" draw:style-name="gr2" draw:text-style-name="P8" draw:layer="layout" svg:width="16.4cm" svg:height="10.574cm" svg:x="6.168cm" svg:y="3.553cm">
          <text:p text:style-name="P7"><text:span text:style-name="T6"/></text:p>
          <text:list text:style-name="L4">
            <text:list-item>
              <text:p text:style-name="P4"><text:span text:style-name="T6">Balance between SRS and unwanted behaviour</text:span></text:p>
            </text:list-item>
            <text:list-item>
              <text:p text:style-name="P4"><text:span text:style-name="T6">Team effort to identify priorities</text:span></text:p>
            </text:list-item>
            <text:list-item>
              <text:p text:style-name="P4"><text:span text:style-name="T6">Led to create tickets for the spri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7;g396cce2b8c1_0_4:notes" draw:style-name="gr1" draw:layer="layout" svg:width="16.932cm" svg:height="9.524cm" svg:x="1.059cm" svg:y="1.905cm" draw:page-number="5" presentation:class="page"/>
          <draw:frame draw:name="Google Shape;348;g396cce2b8c1_0_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G Analysis" draw:style-name="dp1" draw:master-page-name="BLANK">
        <draw:frame draw:name="Google Shape;357;p43" presentation:style-name="pr1" draw:text-style-name="P2" draw:layer="layout" svg:width="27.481cm" svg:height="2.386cm" svg:x="0.628cm" svg:y="0.402cm" presentation:class="title" presentation:user-transformed="true">
          <draw:text-box>
            <text:p text:style-name="P1"><text:span text:style-name="T9">RAG Analysis</text:span></text:p>
          </draw:text-box>
        </draw:frame>
        <draw:frame draw:name="Google Shape;358;p43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frame draw:name="Google Shape;359;p43" draw:style-name="gr3" draw:text-style-name="P9" draw:layer="layout" svg:width="19.43cm" svg:height="9.959cm" svg:x="2.984cm" svg:y="2.671cm">
          <draw:image xlink:href="Pictures/100002010000054A000002B613E21E3C35AAB48E.png" xlink:type="simple" xlink:show="embed" xlink:actuate="onLoad">
            <text:p/>
          </draw:image>
        </draw:frame>
        <presentation:notes draw:style-name="dp2">
          <draw:page-thumbnail draw:name="Google Shape;354;g3d2f340f08f_0_4:notes" draw:style-name="gr1" draw:layer="layout" svg:width="16.932cm" svg:height="9.524cm" svg:x="1.059cm" svg:y="1.905cm" draw:page-number="6" presentation:class="page"/>
          <draw:frame draw:name="Google Shape;355;g3d2f340f08f_0_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sprint’s epics" draw:style-name="dp1" draw:master-page-name="BLANK">
        <draw:frame draw:name="Google Shape;364;p44" presentation:style-name="pr1" draw:text-style-name="P2" draw:layer="layout" svg:width="26.875cm" svg:height="2.386cm" svg:x="0.628cm" svg:y="0.402cm" presentation:class="title" presentation:user-transformed="true">
          <draw:text-box>
            <text:p text:style-name="P1"><text:span text:style-name="T10">This sprint’s epics</text:span></text:p>
          </draw:text-box>
        </draw:frame>
        <draw:custom-shape draw:name="Google Shape;365;p44" draw:style-name="gr2" draw:text-style-name="P8" draw:layer="layout" svg:width="14.312cm" svg:height="7.467cm" svg:x="6.909cm" svg:y="3.969cm">
          <text:list text:style-name="L8">
            <text:list-item>
              <text:p text:style-name="P12"><text:span text:style-name="T11">Fixing the Settings bug</text:span></text:p>
            </text:list-item>
            <text:list-item>
              <text:p text:style-name="P12"><text:span text:style-name="T11">Fixing Float Switch UI</text:span></text:p>
            </text:list-item>
            <text:list-item>
              <text:p text:style-name="P12"><text:span text:style-name="T11">Fixing Float Switch behaviour when purchased after Ultrasonic Flow Me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4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presentation:notes draw:style-name="dp2">
          <draw:page-thumbnail draw:name="Google Shape;361;g3d2f340f08f_1_0:notes" draw:style-name="gr1" draw:layer="layout" svg:width="16.932cm" svg:height="9.524cm" svg:x="1.059cm" svg:y="1.905cm" draw:page-number="7" presentation:class="page"/>
          <draw:frame draw:name="Google Shape;362;g3d2f340f08f_1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371;p45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372;p45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12">The Brewing Game’s Team</text:span></text:p>
          </draw:text-box>
        </draw:frame>
        <presentation:notes draw:style-name="dp2">
          <draw:page-thumbnail draw:name="Google Shape;368;g3c2cabe9ccb_0_390:notes" draw:style-name="gr1" draw:layer="layout" svg:width="16.932cm" svg:height="9.524cm" svg:x="1.059cm" svg:y="1.905cm" draw:page-number="8" presentation:class="page"/>
          <draw:frame draw:name="Google Shape;369;g3c2cabe9ccb_0_39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