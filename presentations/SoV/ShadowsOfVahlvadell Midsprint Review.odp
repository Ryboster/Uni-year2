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300000117637429D91BAFC9C9.png" manifest:media-type="image/png"/>
  <manifest:file-entry manifest:full-path="Pictures/100002010000038300000197527EA52E5A278144.png" manifest:media-type="image/png"/>
  <manifest:file-entry manifest:full-path="Pictures/100002010000033F000001A7F7806B2F55F8046B.png" manifest:media-type="image/png"/>
  <manifest:file-entry manifest:full-path="Pictures/10000201000001F200000239B29B0099C2BC8B8A.png" manifest:media-type="image/png"/>
  <manifest:file-entry manifest:full-path="Pictures/10000000000006B600000438BE6DB2BB41CBE435.jpg" manifest:media-type="image/jpeg"/>
  <manifest:file-entry manifest:full-path="Pictures/1000000000000358000002D08F7075B701CEBB6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Sans" svg:font-family="'IBM Plex Sans'"/>
    <style:font-face style:name="Sora" svg:font-family="Sora"/>
    <style:font-face style:name="Sora Light" svg:font-family="'Sor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BLANK_5f_2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BLANK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_5f_2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BLANK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3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e3dfd6" style:text-line-through-style="none" style:text-line-through-type="none" style:text-position="0% 100%" style:font-name="Sora" fo:font-size="15pt" fo:letter-spacing="normal" fo:font-style="normal" style:text-underline-style="none" fo:font-weight="normal" style:font-name-asian="Sora" style:font-size-asian="15pt" style:font-style-asian="normal" style:font-weight-asian="normal" style:font-name-complex="Sora" style:font-size-complex="15pt" style:font-style-complex="normal" style:font-weight-complex="normal"/>
    </style:style>
    <style:style style:name="T2" style:family="text">
      <style:text-properties fo:font-variant="normal" fo:text-transform="none" fo:color="#e3dfd6" style:text-line-through-style="none" style:text-line-through-type="none" style:text-position="0% 100%" style:font-name="IBM Plex Sans" fo:font-size="55pt" fo:letter-spacing="normal" fo:font-style="normal" style:text-underline-style="none" fo:font-weight="normal" style:font-name-asian="IBM Plex Sans" style:font-size-asian="55pt" style:font-style-asian="normal" style:font-weight-asian="normal" style:font-name-complex="IBM Plex Sans" style:font-size-complex="55pt" style:font-style-complex="normal" style:font-weight-complex="normal"/>
    </style:style>
    <style:style style:name="T3" style:family="text">
      <style:text-properties fo:font-variant="normal" fo:text-transform="none" fo:color="#e3dfd6" style:text-line-through-style="none" style:text-line-through-type="none" style:text-position="0% 100%" style:font-name="IBM Plex Sans" fo:font-size="36pt" fo:letter-spacing="normal" fo:font-style="normal" style:text-underline-style="none" fo:font-weight="normal" style:font-name-asian="IBM Plex Sans" style:font-size-asian="36pt" style:font-style-asian="normal" style:font-weight-asian="normal" style:font-name-complex="IBM Plex Sans" style:font-size-complex="36pt" style:font-style-complex="normal" style:font-weight-complex="normal"/>
    </style:style>
    <style:style style:name="T4" style:family="text">
      <style:text-properties fo:font-variant="normal" fo:text-transform="none" fo:color="#e3dfd6" style:text-line-through-style="none" style:text-line-through-type="none" style:text-position="0% 100%" style:font-name="Sora Light" fo:font-size="10pt" fo:letter-spacing="normal" fo:font-style="normal" style:text-underline-style="none" fo:font-weight="normal" style:font-name-asian="Sora Light" style:font-size-asian="10pt" style:font-style-asian="normal" style:font-weight-asian="normal" style:font-name-complex="Sora Light" style:font-size-complex="10pt" style:font-style-complex="normal" style:font-weight-complex="normal"/>
    </style:style>
    <style:style style:name="T5" style:family="text">
      <style:text-properties fo:font-variant="normal" fo:text-transform="none" fo:color="#e3dfd6" style:text-line-through-style="none" style:text-line-through-type="none" style:text-position="0% 100%" style:font-name="Sora" fo:font-size="10pt" fo:letter-spacing="normal" fo:font-style="normal" style:text-underline-style="none" fo:font-weight="normal" style:font-name-asian="Sora" style:font-size-asian="10pt" style:font-style-asian="normal" style:font-weight-asian="normal" style:font-name-complex="Sora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535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535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6cm" text:min-label-width="0.81cm"/>
        <style:text-properties style:font-name="Sora Light" fo:color="#e3dfd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3df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id-Sprint review" draw:style-name="dp1" draw:master-page-name="BLANK_5f_2">
        <draw:frame draw:name="Google Shape;888;p51" presentation:style-name="pr1" draw:text-style-name="P2" draw:layer="layout" svg:width="8.645cm" svg:height="0.94cm" svg:x="0.459cm" svg:y="0.635cm" presentation:class="subtitle" presentation:user-transformed="true">
          <draw:text-box>
            <text:p text:style-name="P1"><text:span text:style-name="T1">The Shadows of Vahlvadell</text:span></text:p>
            <text:p text:style-name="P1"><text:span text:style-name="T1"/></text:p>
          </draw:text-box>
        </draw:frame>
        <draw:frame draw:name="Google Shape;889;p51" presentation:style-name="pr2" draw:text-style-name="P4" draw:layer="layout" svg:width="16.323cm" svg:height="3.999cm" svg:x="0.207cm" svg:y="8.031cm" presentation:class="title" presentation:user-transformed="true">
          <draw:text-box>
            <text:p text:style-name="P3"><text:span text:style-name="T2">Mid-Sprint review</text:span></text:p>
          </draw:text-box>
        </draw:frame>
        <presentation:notes draw:style-name="dp2">
          <draw:page-thumbnail draw:name="Google Shape;885;g3c7ec3b2050_0_0:notes" draw:style-name="gr1" draw:layer="layout" svg:width="16.932cm" svg:height="9.524cm" svg:x="1.059cm" svg:y="1.905cm" draw:page-number="1" presentation:class="page"/>
          <draw:frame draw:name="Google Shape;886;g3c7ec3b2050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ished the Inventory System" draw:style-name="dp1" draw:master-page-name="BLANK_5f_2">
        <draw:frame draw:name="Google Shape;894;p52" presentation:style-name="pr2" draw:text-style-name="P4" draw:layer="layout" svg:width="25.192cm" svg:height="3.999cm" svg:x="-0.027cm" svg:y="8.362cm" presentation:class="title" presentation:user-transformed="true">
          <draw:text-box>
            <text:p text:style-name="P3"><text:span text:style-name="T3">Finished the Inventory System</text:span></text:p>
          </draw:text-box>
        </draw:frame>
        <draw:frame draw:name="Google Shape;895;p52" presentation:style-name="pr4" draw:text-style-name="P2" draw:layer="layout" svg:width="12.353cm" svg:height="2.079cm" svg:x="0.555cm" svg:y="8.232cm" presentation:class="subtitle" presentation:user-transformed="true">
          <draw:text-box>
            <text:list text:style-name="L3">
              <text:list-item>
                <text:p text:style-name="P6"><text:span text:style-name="T4">Finished handling all operations except stacking</text:span></text:p>
              </text:list-item>
              <text:list-item>
                <text:p text:style-name="P6"><text:span text:style-name="T4">Adjusted the system for multiplayer (Added replication)</text:span></text:p>
              </text:list-item>
              <text:list-item>
                <text:p text:style-name="P6"><text:span text:style-name="T4">Defined, optimised, and implemented the Inventory Item lifecycle</text:span></text:p>
              </text:list-item>
              <text:list-item>
                <text:p text:style-name="P6"><text:span text:style-name="T4">Finalized the UML</text:span></text:p>
              </text:list-item>
            </text:list>
          </draw:text-box>
        </draw:frame>
        <draw:frame draw:name="Google Shape;896;p52" presentation:style-name="pr4" draw:text-style-name="P2" draw:layer="layout" svg:width="13.672cm" svg:height="2.052cm" svg:x="0.362cm" svg:y="11.92cm" presentation:class="subtitle" presentation:user-transformed="true">
          <draw:text-box>
            <text:p text:style-name="P1"><text:span text:style-name="T5">Aaron Stevens &amp; Gracjan Blazejowski</text:span></text:p>
          </draw:text-box>
        </draw:frame>
        <presentation:notes draw:style-name="dp2">
          <draw:page-thumbnail draw:name="Google Shape;891;g3c7ec3b2050_0_886:notes" draw:style-name="gr1" draw:layer="layout" svg:width="16.932cm" svg:height="9.524cm" svg:x="1.059cm" svg:y="1.905cm" draw:page-number="2" presentation:class="page"/>
          <draw:frame draw:name="Google Shape;892;g3c7ec3b2050_0_88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_5f_2">
        <draw:frame draw:name="Google Shape;901;p53" draw:style-name="gr2" draw:text-style-name="P7" draw:layer="layout" svg:width="16.001cm" svg:height="13.469cm" svg:x="0.508cm" svg:y="0.409cm">
          <draw:image xlink:href="Pictures/1000000000000358000002D08F7075B701CEBB6B.jpg" xlink:type="simple" xlink:show="embed" xlink:actuate="onLoad">
            <text:p/>
          </draw:image>
        </draw:frame>
        <presentation:notes draw:style-name="dp2">
          <draw:page-thumbnail draw:name="Google Shape;898;g3c7ec3b2050_0_909:notes" draw:style-name="gr1" draw:layer="layout" svg:width="16.932cm" svg:height="9.524cm" svg:x="1.059cm" svg:y="1.905cm" draw:page-number="3" presentation:class="page"/>
          <draw:frame draw:name="Google Shape;899;g3c7ec3b2050_0_90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5f_2">
        <draw:frame draw:name="Google Shape;906;p54" draw:style-name="gr2" draw:text-style-name="P7" draw:layer="layout" svg:width="8.339cm" svg:height="9.528cm" svg:x="0.423cm" svg:y="0.501cm">
          <draw:image xlink:href="Pictures/10000201000001F200000239B29B0099C2BC8B8A.png" xlink:type="simple" xlink:show="embed" xlink:actuate="onLoad">
            <text:p/>
          </draw:image>
        </draw:frame>
        <draw:frame draw:name="Google Shape;907;p54" draw:style-name="gr2" draw:text-style-name="P7" draw:layer="layout" svg:width="15.789cm" svg:height="8.037cm" svg:x="8.996cm" svg:y="0.985cm">
          <draw:image xlink:href="Pictures/100002010000033F000001A7F7806B2F55F8046B.png" xlink:type="simple" xlink:show="embed" xlink:actuate="onLoad">
            <text:p/>
          </draw:image>
        </draw:frame>
        <presentation:notes draw:style-name="dp2">
          <draw:page-thumbnail draw:name="Google Shape;903;g3c7ec3b2050_1_1472:notes" draw:style-name="gr1" draw:layer="layout" svg:width="16.932cm" svg:height="9.524cm" svg:x="1.059cm" svg:y="1.905cm" draw:page-number="4" presentation:class="page"/>
          <draw:frame draw:name="Google Shape;904;g3c7ec3b2050_1_147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ed Optimisation Settings" draw:style-name="dp1" draw:master-page-name="BLANK_5f_2">
        <draw:frame draw:name="Google Shape;912;p55" presentation:style-name="pr2" draw:text-style-name="P4" draw:layer="layout" svg:width="25.192cm" svg:height="1.907cm" svg:x="0.207cm" svg:y="10.122cm" presentation:class="title" presentation:user-transformed="true">
          <draw:text-box>
            <text:p text:style-name="P3"><text:span text:style-name="T3">Implemented Optimisation Settings</text:span></text:p>
          </draw:text-box>
        </draw:frame>
        <draw:frame draw:name="Google Shape;913;p55" presentation:style-name="pr4" draw:text-style-name="P2" draw:layer="layout" svg:width="13.672cm" svg:height="2.052cm" svg:x="0.362cm" svg:y="11.92cm" presentation:class="subtitle" presentation:user-transformed="true">
          <draw:text-box>
            <text:p text:style-name="P1"><text:span text:style-name="T5">Sergio Eneide</text:span></text:p>
          </draw:text-box>
        </draw:frame>
        <draw:frame draw:name="Google Shape;914;p55" presentation:style-name="pr4" draw:text-style-name="P2" draw:layer="layout" svg:width="12.353cm" svg:height="2.079cm" svg:x="0.555cm" svg:y="8.232cm" presentation:class="subtitle" presentation:user-transformed="true">
          <draw:text-box>
            <text:list text:style-name="L3">
              <text:list-item>
                <text:p text:style-name="P6"><text:span text:style-name="T4">The optimisation settings have been bound to a UI and mapped to the keyboard.</text:span></text:p>
              </text:list-item>
            </text:list>
          </draw:text-box>
        </draw:frame>
        <presentation:notes draw:style-name="dp2">
          <draw:page-thumbnail draw:name="Google Shape;909;g3c7ec3b2050_0_892:notes" draw:style-name="gr1" draw:layer="layout" svg:width="16.932cm" svg:height="9.524cm" svg:x="1.059cm" svg:y="1.905cm" draw:page-number="5" presentation:class="page"/>
          <draw:frame draw:name="Google Shape;910;g3c7ec3b2050_0_89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5f_2">
        <draw:frame draw:name="Google Shape;919;p56" draw:style-name="gr2" draw:text-style-name="P7" draw:layer="layout" svg:width="23.785cm" svg:height="10.768cm" svg:x="0.677cm" svg:y="2.024cm">
          <draw:image xlink:href="Pictures/100002010000038300000197527EA52E5A278144.png" xlink:type="simple" xlink:show="embed" xlink:actuate="onLoad">
            <text:p/>
          </draw:image>
        </draw:frame>
        <draw:frame draw:name="Google Shape;920;p56" draw:style-name="gr2" draw:text-style-name="P7" draw:layer="layout" svg:width="3.179cm" svg:height="3.65cm" svg:x="0.46cm" svg:y="0.635cm">
          <draw:image xlink:href="Pictures/10000201000000F300000117637429D91BAFC9C9.png" xlink:type="simple" xlink:show="embed" xlink:actuate="onLoad">
            <text:p/>
          </draw:image>
        </draw:frame>
        <presentation:notes draw:style-name="dp2">
          <draw:page-thumbnail draw:name="Google Shape;916;g3c7ec3b2050_0_895:notes" draw:style-name="gr1" draw:layer="layout" svg:width="16.932cm" svg:height="9.524cm" svg:x="1.059cm" svg:y="1.905cm" draw:page-number="6" presentation:class="page"/>
          <draw:frame draw:name="Google Shape;917;g3c7ec3b2050_0_89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rted work on the Attack animation" draw:style-name="dp1" draw:master-page-name="BLANK_5f_2">
        <draw:frame draw:name="Google Shape;925;p57" presentation:style-name="pr4" draw:text-style-name="P2" draw:layer="layout" svg:width="13.672cm" svg:height="2.052cm" svg:x="0.362cm" svg:y="11.92cm" presentation:class="subtitle" presentation:user-transformed="true">
          <draw:text-box>
            <text:p text:style-name="P1"><text:span text:style-name="T5">Joshua Keitany</text:span></text:p>
          </draw:text-box>
        </draw:frame>
        <draw:frame draw:name="Google Shape;926;p57" presentation:style-name="pr2" draw:text-style-name="P4" draw:layer="layout" svg:width="25.192cm" svg:height="1.907cm" svg:x="0.207cm" svg:y="10.122cm" presentation:class="title" presentation:user-transformed="true">
          <draw:text-box>
            <text:p text:style-name="P3"><text:span text:style-name="T3">Started work on the Attack animation</text:span></text:p>
          </draw:text-box>
        </draw:frame>
        <presentation:notes draw:style-name="dp2">
          <draw:page-thumbnail draw:name="Google Shape;922;g3c7ec3b2050_0_898:notes" draw:style-name="gr1" draw:layer="layout" svg:width="16.932cm" svg:height="9.524cm" svg:x="1.059cm" svg:y="1.905cm" draw:page-number="7" presentation:class="page"/>
          <draw:frame draw:name="Google Shape;923;g3c7ec3b2050_0_89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5f_2">
        <draw:frame draw:name="Google Shape;931;p58" draw:style-name="gr2" draw:text-style-name="P7" xml:id="id1" draw:id="id1" draw:layer="layout" svg:width="21.378cm" svg:height="13.44cm" svg:x="2.141cm" svg:y="0.423cm">
          <draw:image xlink:href="Pictures/10000000000006B600000438BE6DB2BB41CBE435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928;g3c7ec3b2050_0_901:notes" draw:style-name="gr1" draw:layer="layout" svg:width="16.932cm" svg:height="9.524cm" svg:x="1.059cm" svg:y="1.905cm" draw:page-number="8" presentation:class="page"/>
          <draw:frame draw:name="Google Shape;929;g3c7ec3b2050_0_90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BLANK_5f_2">
        <draw:frame draw:name="Google Shape;936;p59" presentation:style-name="pr2" draw:text-style-name="P4" draw:layer="layout" svg:width="25.192cm" svg:height="1.907cm" svg:x="0.207cm" svg:y="10.122cm" presentation:class="title" presentation:user-transformed="true">
          <draw:text-box>
            <text:p text:style-name="P3"><text:span text:style-name="T3">Thank you</text:span></text:p>
          </draw:text-box>
        </draw:frame>
        <presentation:notes draw:style-name="dp2">
          <draw:page-thumbnail draw:name="Google Shape;933;g3c7ec3b2050_1_1463:notes" draw:style-name="gr1" draw:layer="layout" svg:width="16.932cm" svg:height="9.524cm" svg:x="1.059cm" svg:y="1.905cm" draw:page-number="9" presentation:class="page"/>
          <draw:frame draw:name="Google Shape;934;g3c7ec3b2050_1_146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Sans" svg:font-family="'IBM Plex Sans'"/>
    <style:font-face style:name="Sora" svg:font-family="Sora"/>
    <style:font-face style:name="Sora Light" svg:font-family="'Sor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0b03b" draw:end-color="#ffeb67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5f_2-background" style:display-name="BLANK_2-background" style:family="presentation">
      <style:graphic-properties draw:stroke="none" draw:fill="solid" draw:fill-color="#353535"/>
      <style:text-properties style:letter-kerning="true"/>
    </style:style>
    <style:style style:name="BLANK_5f_2-backgroundobjects" style:display-name="BLANK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2-notes" style:display-name="BLANK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2-outline1" style:display-name="BLANK_2-outline1" style:family="presentation">
      <style:graphic-properties draw:stroke="none" draw:fill="none" draw:auto-grow-height="false" draw:fit-to-size="shrink-to-fit" style:shrink-to-fit="true">
        <text:list-style style:name="BLANK_5f_2-outline1" style:display-name="BLANK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-outline2" style:display-name="BLANK_2-outline2" style:family="presentation" style:parent-style-name="BLANK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2-outline3" style:display-name="BLANK_2-outline3" style:family="presentation" style:parent-style-name="BLANK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2-outline4" style:display-name="BLANK_2-outline4" style:family="presentation" style:parent-style-name="BLANK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2-outline5" style:display-name="BLANK_2-outline5" style:family="presentation" style:parent-style-name="BLANK_5f_2-outline4">
      <style:paragraph-properties fo:margin-top="0.1cm" fo:margin-bottom="0cm"/>
      <style:text-properties fo:font-size="20pt" style:font-size-asian="20pt" style:font-size-complex="20pt"/>
    </style:style>
    <style:style style:name="BLANK_5f_2-outline6" style:display-name="BLANK_2-outline6" style:family="presentation" style:parent-style-name="BLANK_5f_2-outline5">
      <style:paragraph-properties fo:margin-top="0.1cm" fo:margin-bottom="0cm"/>
      <style:text-properties fo:font-size="20pt" style:font-size-asian="20pt" style:font-size-complex="20pt"/>
    </style:style>
    <style:style style:name="BLANK_5f_2-outline7" style:display-name="BLANK_2-outline7" style:family="presentation" style:parent-style-name="BLANK_5f_2-outline6">
      <style:paragraph-properties fo:margin-top="0.1cm" fo:margin-bottom="0cm"/>
      <style:text-properties fo:font-size="20pt" style:font-size-asian="20pt" style:font-size-complex="20pt"/>
    </style:style>
    <style:style style:name="BLANK_5f_2-outline8" style:display-name="BLANK_2-outline8" style:family="presentation" style:parent-style-name="BLANK_5f_2-outline7">
      <style:paragraph-properties fo:margin-top="0.1cm" fo:margin-bottom="0cm"/>
      <style:text-properties fo:font-size="20pt" style:font-size-asian="20pt" style:font-size-complex="20pt"/>
    </style:style>
    <style:style style:name="BLANK_5f_2-outline9" style:display-name="BLANK_2-outline9" style:family="presentation" style:parent-style-name="BLANK_5f_2-outline8">
      <style:paragraph-properties fo:margin-top="0.1cm" fo:margin-bottom="0cm"/>
      <style:text-properties fo:font-size="20pt" style:font-size-asian="20pt" style:font-size-complex="20pt"/>
    </style:style>
    <style:style style:name="BLANK_5f_2-subtitle" style:display-name="BLANK_2-subtitle" style:family="presentation">
      <style:graphic-properties draw:stroke="none" draw:fill="none" draw:textarea-vertical-align="middle">
        <text:list-style style:name="BLANK_5f_2-subtitle" style:display-name="BLANK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2-title" style:display-name="BLANK_2-title" style:family="presentation">
      <style:graphic-properties draw:stroke="none" draw:fill="none" draw:textarea-vertical-align="middle">
        <text:list-style style:name="BLANK_5f_2-title" style:display-name="BLANK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5353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69615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0b0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6961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5f_2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5f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0b03b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8" style:family="paragraph">
      <loext:graphic-properties draw:fill="solid" draw:fill-color="#69615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5f_2" style:display-name="BLANK_2" style:page-layout-name="PM1" draw:style-name="Mdp1">
      <draw:custom-shape draw:name="Google Shape;11;p2" draw:style-name="Mgr3" draw:text-style-name="MP5" draw:layer="backgroundobjects" svg:width="11.114cm" svg:height="4.687cm" draw:transform="rotate (0.261799387799149) translate (6.856cm -0.491cm)">
        <text:p/>
        <draw:enhanced-geometry draw:mirror-horizontal="false" draw:mirror-vertical="false" draw:text-areas="?f27 ?f29 ?f28 ?f30" svg:viewBox="0 0 0 0" draw:type="ooxml-chord" draw:modifiers="694140 11948531" draw:enhanced-path="M ?f16 ?f18 Z N" drawooo:enhanced-path="M ?f16 ?f18 G ?f5 ?f7 ?f31 ?f32 Z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?f5 *sin(pi*(?f1 )/10800000)"/>
          <draw:equation draw:name="f12" draw:formula="?f7 *cos(pi*(?f1 )/10800000)"/>
          <draw:equation draw:name="f13" draw:formula="?f5 *(cos(atan2(?f11 ,?f12 )))"/>
          <draw:equation draw:name="f14" draw:formula="?f7 *(sin(atan2(?f11 ,?f12 )))"/>
          <draw:equation draw:name="f15" draw:formula="logwidth/2"/>
          <draw:equation draw:name="f16" draw:formula="?f15 +?f9 -0"/>
          <draw:equation draw:name="f17" draw:formula="logheight/2"/>
          <draw:equation draw:name="f18" draw:formula="?f17 +?f10 -0"/>
          <draw:equation draw:name="f19" draw:formula="?f15 +?f13 -0"/>
          <draw:equation draw:name="f20" draw:formula="?f17 +?f14 -0"/>
          <draw:equation draw:name="f21" draw:formula="(?f16 +?f19 )/2"/>
          <draw:equation draw:name="f22" draw:formula="(?f18 +?f20 )/2"/>
          <draw:equation draw:name="f23" draw:formula="?f4 *1/2"/>
          <draw:equation draw:name="f24" draw:formula="?f0 +?f23 -10800000"/>
          <draw:equation draw:name="f25" draw:formula="?f5 *cos(pi*(2700000)/10800000)"/>
          <draw:equation draw:name="f26" draw:formula="?f7 *sin(pi*(2700000)/10800000)"/>
          <draw:equation draw:name="f27" draw:formula="?f15 +0-?f25 "/>
          <draw:equation draw:name="f28" draw:formula="?f15 +?f25 -0"/>
          <draw:equation draw:name="f29" draw:formula="?f17 +0-?f26 "/>
          <draw:equation draw:name="f30" draw:formula="?f17 +?f26 -0"/>
          <draw:equation draw:name="f31" draw:formula="(?f0 )/60000.0"/>
          <draw:equation draw:name="f32" draw:formula="(?f4 )/60000.0"/>
          <draw:handle draw:handle-position="?f16 ?f18"/>
          <draw:handle draw:handle-position="?f19 ?f20"/>
        </draw:enhanced-geometry>
      </draw:custom-shape>
      <draw:custom-shape draw:name="Google Shape;13;p2" draw:style-name="Mgr4" draw:text-style-name="MP6" draw:layer="backgroundobjects" svg:width="13.398cm" svg:height="0.057cm" svg:x="0.635cm" svg:y="12.3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5" draw:text-style-name="MP7" draw:layer="layout" svg:width="10.964cm" svg:height="7.767cm" svg:x="14.435cm" svg:y="-0.002cm">
          <text:p/>
          <draw:enhanced-geometry draw:mirror-horizontal="false" draw:mirror-vertical="true" drawooo:sub-view-size="198513 140640" draw:text-areas="0 0 ?f0 ?f1" svg:viewBox="0 0 0 0" draw:type="ooxml-non-primitive" draw:enhanced-path="M 31387 0 L 0 140640 198513 140640 198513 63700 Z N">
            <draw:equation draw:name="f0" draw:formula="logwidth"/>
            <draw:equation draw:name="f1" draw:formula="logheight"/>
          </draw:enhanced-geometry>
        </draw:custom-shape>
        <draw:custom-shape draw:name="Google Shape;16;p2" draw:style-name="Mgr6" draw:text-style-name="MP8" draw:layer="layout" svg:width="3.967cm" svg:height="7.771cm" svg:x="12.209cm" svg:y="-0.002cm">
          <text:p/>
          <draw:enhanced-geometry draw:mirror-horizontal="false" draw:mirror-vertical="true" drawooo:sub-view-size="71839 140702" draw:text-areas="0 0 ?f0 ?f1" svg:viewBox="0 0 0 0" draw:type="ooxml-non-primitive" draw:enhanced-path="M 71839 0 L 40808 140702 0 140702 Z N">
            <draw:equation draw:name="f0" draw:formula="logwidth"/>
            <draw:equation draw:name="f1" draw:formula="logheight"/>
          </draw:enhanced-geometry>
        </draw:custom-shape>
      </draw:g>
      <draw:g draw:name="Google Shape;17;p2">
        <draw:g draw:name="Google Shape;18;p2">
          <draw:g draw:name="Google Shape;19;p2">
            <draw:custom-shape draw:name="Google Shape;20;p2" draw:style-name="Mgr3" draw:text-style-name="MP5" draw:layer="layout" svg:width="1.311cm" svg:height="1.311cm" svg:x="24.086cm" svg:y="7.76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1;p2" draw:style-name="Mgr3" draw:text-style-name="MP5" draw:layer="layout" svg:width="1.311cm" svg:height="1.311cm" svg:x="22.773cm" svg:y="7.76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2;p2" draw:style-name="Mgr3" draw:text-style-name="MP5" draw:layer="layout" svg:width="1.311cm" svg:height="1.311cm" svg:x="18.836cm" svg:y="7.76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23;p2">
            <draw:custom-shape draw:name="Google Shape;24;p2" draw:style-name="Mgr3" draw:text-style-name="MP5" draw:layer="layout" svg:width="1.311cm" svg:height="1.311cm" svg:x="24.086cm" svg:y="9.073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;p2" draw:style-name="Mgr3" draw:text-style-name="MP5" draw:layer="layout" svg:width="1.311cm" svg:height="1.311cm" svg:x="22.773cm" svg:y="9.073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6;p2" draw:style-name="Mgr3" draw:text-style-name="MP5" draw:layer="layout" svg:width="1.311cm" svg:height="1.311cm" svg:x="21.461cm" svg:y="9.073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7;p2" draw:style-name="Mgr3" draw:text-style-name="MP5" draw:layer="layout" svg:width="1.311cm" svg:height="1.311cm" svg:x="20.149cm" svg:y="9.073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28;p2">
            <draw:custom-shape draw:name="Google Shape;29;p2" draw:style-name="Mgr3" draw:text-style-name="MP5" draw:layer="layout" svg:width="1.311cm" svg:height="1.311cm" svg:x="24.086cm" svg:y="10.386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;p2" draw:style-name="Mgr3" draw:text-style-name="MP5" draw:layer="layout" svg:width="1.311cm" svg:height="1.311cm" svg:x="21.461cm" svg:y="10.386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;p2" draw:style-name="Mgr3" draw:text-style-name="MP5" draw:layer="layout" svg:width="1.311cm" svg:height="1.311cm" svg:x="20.149cm" svg:y="10.386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2;p2" draw:style-name="Mgr3" draw:text-style-name="MP5" draw:layer="layout" svg:width="1.311cm" svg:height="1.311cm" svg:x="18.836cm" svg:y="10.386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3;p2">
            <draw:custom-shape draw:name="Google Shape;34;p2" draw:style-name="Mgr3" draw:text-style-name="MP5" draw:layer="layout" svg:width="1.311cm" svg:height="1.311cm" svg:x="24.086cm" svg:y="11.698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;p2" draw:style-name="Mgr3" draw:text-style-name="MP5" draw:layer="layout" svg:width="1.311cm" svg:height="1.311cm" svg:x="20.149cm" svg:y="11.698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36;p2" draw:style-name="Mgr3" draw:text-style-name="MP5" draw:layer="layout" svg:width="1.311cm" svg:height="1.311cm" svg:x="17.524cm" svg:y="11.695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7;p2" presentation:style-name="BLANK_5f_2-title" draw:layer="backgroundobjects" svg:width="16.323cm" svg:height="3.999cm" svg:x="0.207cm" svg:y="8.031cm" presentation:class="title" presentation:placeholder="true" presentation:user-transformed="true">
        <draw:text-box/>
      </draw:frame>
      <draw:frame presentation:style-name="BLANK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2-title" draw:layer="backgroundobjects" svg:width="19.798cm" svg:height="11.136cm" svg:x="0.6cm" svg:y="2.257cm" presentation:class="page"/>
        <draw:frame presentation:style-name="BLANK_5f_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8"/>
    <meta:generator>LibreOfficeDev/6.0.5.2$Linux_X86_64 LibreOffice_project/</meta:generator>
  </office:meta>
</office:document-meta>
</file>